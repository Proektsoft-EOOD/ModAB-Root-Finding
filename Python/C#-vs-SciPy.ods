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Arial Nova" svg:font-family="'Arial Nova'" style:font-family-generic="swiss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ascadia Mono" svg:font-family="'Cascadia Mono'" style:font-family-generic="modern" style:font-pitch="fixed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 style:font-pitch="fixed"/>
  </office:font-face-decls>
  <office:automatic-styles>
    <style:style style:name="co1" style:family="table-column">
      <style:table-column-properties fo:break-before="auto" style:column-width="1.2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51pt solid #000000" fo:background-color="#eeeeee" style:text-align-source="fix" style:repeat-content="false" fo:border-left="0.74pt solid #000000" fo:padding="0.101cm" fo:border-right="0.51pt solid #000000" fo:border-top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padding="0.101cm" fo:border-right="0.51pt solid #000000" fo:border-top="0.51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border-left="0.74pt solid #000000" fo:padding="0.101cm" fo:border-right="0.51pt solid #000000" fo:border-top="0.51pt solid #000000" style:vertical-align="middle"/>
      <style:paragraph-properties fo:text-align="center" fo:margin-left="0cm"/>
      <style:text-properties style:font-name="Carlito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0.74pt solid #000000" fo:padding="0.101cm" fo:border-right="0.51pt solid #000000" fo:border-top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font-name="Carlito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padding="0.101cm" fo:border-right="0.51pt solid #000000" fo:border-top="0.51pt solid #000000" style:vertical-align="middle"/>
      <style:paragraph-properties fo:text-align="center" fo:margin-left="0cm"/>
      <style:text-properties style:font-name="Carlito"/>
    </style:style>
    <style:style style:name="ce8" style:family="table-cell" style:parent-style-name="Default">
      <style:table-cell-properties fo:border-bottom="0.51pt solid #000000" fo:background-color="#eeeeee" style:text-align-source="fix" style:repeat-content="false" fo:border-left="0.74pt solid #000000" fo:padding="0.101cm" fo:border-right="0.74pt solid #000000" fo:border-top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0.74pt solid #000000" fo:padding="0.101cm" fo:border-right="0.74pt solid #000000" fo:border-top="0.51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style:text-align-source="fix" style:repeat-content="false" fo:border-left="0.74pt solid #000000" fo:padding="0.101cm" fo:border-right="0.74pt solid #000000" fo:border-top="0.51pt solid #000000" style:vertical-align="middle"/>
      <style:paragraph-properties fo:text-align="center" fo:margin-left="0cm"/>
      <style:text-properties style:font-name="Carlito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padding="0.101cm" fo:border-right="0.74pt solid #000000" fo:border-top="0.51pt solid #000000" style:vertical-align="middle"/>
      <style:paragraph-properties fo:text-align="center" fo:margin-left="0cm"/>
      <style:text-properties style:font-name="Carlito"/>
    </style:style>
    <style:style style:name="ce1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Carlito"/>
    </style:style>
    <style:style style:name="ce13" style:family="table-cell" style:parent-style-name="Default">
      <style:table-cell-properties fo:border="none" fo:padding="0.101cm" style:vertical-align="middle"/>
      <style:text-properties style:font-name="Carlito"/>
    </style:style>
    <style:style style:name="ce14" style:family="table-cell" style:parent-style-name="Default">
      <style:table-cell-properties fo:border-bottom="0.51pt solid #000000" fo:border-left="0.74pt solid #000000" fo:padding="0.101cm" fo:border-right="0.51pt solid #000000" fo:border-top="0.51pt solid #000000" style:vertical-align="middle"/>
      <style:text-properties style:font-name="Carlito"/>
    </style:style>
    <style:style style:name="ce15" style:family="table-cell" style:parent-style-name="Default">
      <style:table-cell-properties fo:border-bottom="0.74pt solid #000000" fo:background-color="#eeeeee" fo:border-left="0.74pt solid #000000" fo:padding="0.101cm" fo:border-right="0.51pt solid #000000" fo:border-top="0.74pt solid #000000" style:vertical-align="middle"/>
      <style:text-properties style:font-name="Carlit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0.74pt solid #000000" fo:padding="0.101cm" fo:border-right="0.51pt solid #000000" fo:border-top="0.51pt solid #000000" style:vertical-align="middle"/>
      <style:text-properties style:font-name="Carlito"/>
    </style:style>
    <style:style style:name="ce17" style:family="table-cell" style:parent-style-name="Default" style:data-style-name="N110">
      <style:table-cell-properties fo:border-bottom="0.51pt solid #000000" fo:border-left="0.74pt solid #000000" fo:padding="0.101cm" fo:border-right="0.51pt solid #000000" fo:border-top="0.51pt solid #000000" style:vertical-align="middle"/>
      <style:text-properties style:font-name="Carlito"/>
    </style:style>
    <style:style style:name="ce18" style:family="table-cell" style:parent-style-name="Default" style:data-style-name="N110">
      <style:table-cell-properties fo:border-bottom="0.74pt solid #000000" fo:border-left="0.74pt solid #000000" fo:padding="0.101cm" fo:border-right="0.51pt solid #000000" fo:border-top="0.51pt solid #000000" style:vertical-align="middle"/>
      <style:text-properties style:font-name="Carlito"/>
    </style:style>
    <style:style style:name="ce19" style:family="table-cell" style:parent-style-name="Default">
      <style:table-cell-properties fo:padding="0.101cm" style:vertical-align="middle"/>
      <style:text-properties style:font-name="Carlito"/>
    </style:style>
    <style:style style:name="ce20" style:family="table-cell" style:parent-style-name="Default">
      <style:table-cell-properties fo:border-bottom="0.51pt solid #000000" fo:background-color="#eeeeee" style:text-align-source="fix" style:repeat-content="false" fo:border-left="0.51pt solid #000000" fo:padding="0.101cm" fo:border-right="0.51pt solid #000000" fo:border-top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eeeeee" style:text-align-source="fix" style:repeat-content="false" fo:border-left="0.51pt solid #000000" fo:padding="0.101cm" fo:border-right="0.51pt solid #000000" fo:border-top="0.51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22" style:family="table-cell" style:parent-style-name="Default">
      <style:table-cell-properties fo:border="0.51pt solid #000000" fo:padding="0.101cm" style:vertical-align="middle"/>
      <style:text-properties style:font-name="Carlito"/>
    </style:style>
    <style:style style:name="ce23" style:family="table-cell" style:parent-style-name="Default">
      <style:table-cell-properties fo:border-bottom="0.74pt solid #000000" fo:background-color="#eeeeee" fo:border-left="0.51pt solid #000000" fo:padding="0.101cm" fo:border-right="0.51pt solid #000000" fo:border-top="0.74pt solid #000000" style:vertical-align="middle"/>
      <style:text-properties style:font-name="Carlito" fo:font-weight="bold" style:font-weight-asian="bold" style:font-weight-complex="bold"/>
    </style:style>
    <style:style style:name="ce24" style:family="table-cell" style:parent-style-name="Default" style:data-style-name="N81">
      <style:table-cell-properties fo:border="0.51pt solid #000000" fo:padding="0.101cm" style:vertical-align="middle"/>
      <style:text-properties style:font-name="Carlito"/>
    </style:style>
    <style:style style:name="ce25" style:family="table-cell" style:parent-style-name="Default">
      <style:table-cell-properties fo:border-bottom="0.74pt solid #000000" fo:border-left="0.51pt solid #000000" fo:padding="0.101cm" fo:border-right="0.51pt solid #000000" fo:border-top="0.51pt solid #000000" style:vertical-align="middle"/>
      <style:text-properties style:font-name="Carlito"/>
    </style:style>
    <style:style style:name="ce26" style:family="table-cell" style:parent-style-name="Default" style:data-style-name="N110">
      <style:table-cell-properties fo:border="0.51pt solid #000000" fo:padding="0.101cm" style:vertical-align="middle"/>
      <style:text-properties style:font-name="Carlito"/>
    </style:style>
    <style:style style:name="ce27" style:family="table-cell" style:parent-style-name="Default" style:data-style-name="N110">
      <style:table-cell-properties fo:border-bottom="0.74pt solid #000000" fo:border-left="0.51pt solid #000000" fo:padding="0.101cm" fo:border-right="0.51pt solid #000000" fo:border-top="0.51pt solid #000000" style:vertical-align="middle"/>
      <style:text-properties style:font-name="Carlito"/>
    </style:style>
    <style:style style:name="ce28" style:family="table-cell" style:parent-style-name="Default">
      <style:table-cell-properties fo:border-bottom="0.51pt solid #000000" fo:background-color="#eeeeee" style:text-align-source="fix" style:repeat-content="false" fo:border-left="0.51pt solid #000000" fo:padding="0.101cm" fo:border-right="0.74pt solid #000000" fo:border-top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0.51pt solid #000000" fo:padding="0.101cm" fo:border-right="0.74pt solid #000000" fo:border-top="0.51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30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</style:style>
    <style:style style:name="ce31" style:family="table-cell" style:parent-style-name="Default">
      <style:table-cell-properties fo:border-bottom="0.74pt solid #000000" fo:background-color="#eeeeee" fo:border-left="0.51pt solid #000000" fo:padding="0.101cm" fo:border-right="0.74pt solid #000000" fo:border-top="0.74pt solid #000000" style:vertical-align="middle"/>
      <style:text-properties style:font-name="Carlito" fo:font-weight="bold" style:font-weight-asian="bold" style:font-weight-complex="bold"/>
    </style:style>
    <style:style style:name="ce32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3" style:family="table-cell" style:parent-style-name="Default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4" style:family="table-cell" style:parent-style-name="Default" style:data-style-name="N110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5" style:family="table-cell" style:parent-style-name="Default" style:data-style-name="N110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6" style:family="table-cell" style:parent-style-name="Default">
      <style:table-cell-properties fo:border="0.51pt solid #000000" fo:padding="0.101cm" style:vertical-align="middle"/>
      <style:text-properties style:font-name="Carlito"/>
    </style:style>
    <style:style style:name="ce37" style:family="table-cell" style:parent-style-name="Default">
      <style:table-cell-properties fo:border="0.51pt solid #000000" fo:padding="0.101cm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8" style:family="table-cell" style:parent-style-name="Default">
      <style:table-cell-properties fo:border-bottom="0.74pt solid #000000" fo:border-left="0.51pt solid #000000" fo:padding="0.101cm" fo:border-right="0.51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39" style:family="table-cell" style:parent-style-name="Default" style:data-style-name="N110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G197"/>
    </style:style>
    <style:style style:name="ce40" style:family="table-cell" style:parent-style-name="Default" style:data-style-name="N110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G197"/>
    </style:style>
    <style:style style:name="ce41" style:family="table-cell" style:parent-style-name="Default">
      <style:table-cell-properties fo:background-color="#ffd8ce" fo:border="0.51pt solid #000000" fo:padding="0.101cm" style:vertical-align="middle"/>
      <style:text-properties fo:color="#c9211e" style:font-name="Carlito" fo:font-weight="bold" style:font-weight-asian="bold" style:font-weight-complex="bold"/>
    </style:style>
    <style:style style:name="ce42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</style:style>
    <style:style style:name="ce43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44" style:family="table-cell" style:parent-style-name="Default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45" style:family="table-cell" style:parent-style-name="Default" style:data-style-name="N110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J197"/>
    </style:style>
    <style:style style:name="ce46" style:family="table-cell" style:parent-style-name="Default" style:data-style-name="N110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J197"/>
    </style:style>
    <style:style style:name="ce47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</style:style>
    <style:style style:name="ce48" style:family="table-cell" style:parent-style-name="Default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49" style:family="table-cell" style:parent-style-name="Default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D197"/>
    </style:style>
    <style:style style:name="ce50" style:family="table-cell" style:parent-style-name="Default" style:data-style-name="N110">
      <style:table-cell-properties fo:border-bottom="0.51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M197"/>
    </style:style>
    <style:style style:name="ce51" style:family="table-cell" style:parent-style-name="Default" style:data-style-name="N110">
      <style:table-cell-properties fo:border-bottom="0.74pt solid #000000" fo:border-left="0.51pt solid #000000" fo:padding="0.101cm" fo:border-right="0.74pt solid #000000" fo:border-top="0.51pt solid #000000" style:vertical-align="middle"/>
      <style:text-properties style:font-name="Carlito"/>
      <style:map style:condition="cell-content()&gt;0.0000000000001" style:apply-style-name="Bad" style:base-cell-address="Лист1.M197"/>
    </style:style>
    <style:style style:name="ce52" style:family="table-cell" style:parent-style-name="Default" style:data-style-name="N81">
      <style:table-cell-properties fo:padding="0.101cm" style:vertical-align="middle"/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2"/>
        <table:table-column table:style-name="co2" table:number-columns-repeated="1023" table:default-cell-style-name="ce19"/>
        <table:table-row table:style-name="ro1">
          <table:table-cell table:style-name="ce1" office:value-type="string" calcext:value-type="string">
            <text:p>Evaluation count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8" office:value-type="string" calcext:value-type="string" table:number-columns-spanned="3" table:number-rows-spanned="1">
            <text:p>bisect</text:p>
          </table:table-cell>
          <table:covered-table-cell table:style-name="ce20"/>
          <table:covered-table-cell table:style-name="ce28"/>
          <table:table-cell table:style-name="ce20" office:value-type="string" calcext:value-type="string" table:number-columns-spanned="3" table:number-rows-spanned="1">
            <text:p>brentq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ridder</text:p>
          </table:table-cell>
          <table:covered-table-cell table:style-name="ce20"/>
          <table:covered-table-cell table:style-name="ce28"/>
          <table:table-cell table:style-name="ce28" office:value-type="string" calcext:value-type="string" table:number-columns-spanned="3" table:number-rows-spanned="1">
            <text:p>modAB</text:p>
          </table:table-cell>
          <table:covered-table-cell table:style-name="ce20"/>
          <table:covered-table-cell table:style-name="ce28"/>
          <table:table-cell table:number-columns-repeated="1011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21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1" office:value-type="string" calcext:value-type="string">
            <text:p>Diff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21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1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0" table:formula="of:=[.C4]-[.B4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4]-[.E4]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42" table:formula="of:=[.I4]-[.H4]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47" table:formula="of:=[.L4]-[.K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2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5]-[.B5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5]-[.E5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5]-[.H5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5]-[.K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3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6]-[.B6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6]-[.E6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6]-[.H6]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47" table:formula="of:=[.L6]-[.K6]"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4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7]-[.B7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7]-[.E7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7]-[.H7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7]-[.K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5</text:p>
          </table:table-cell>
          <table:table-cell table:style-name="ce14" office:value-type="float" office:value="47" calcext:value-type="float">
            <text:p>47</text:p>
          </table:table-cell>
          <table:table-cell table:style-name="ce22" office:value-type="float" office:value="47" calcext:value-type="float">
            <text:p>47</text:p>
          </table:table-cell>
          <table:table-cell table:style-name="ce30" table:formula="of:=[.C8]-[.B8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8]-[.E8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8]-[.H8]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47" table:formula="of:=[.L8]-[.K8]"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6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9]-[.B9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9]-[.E9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9]-[.H9]" office:value-type="float" office:value="-2" calcext:value-type="float">
            <text:p>-2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9]-[.K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7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0]-[.B10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10]-[.E10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10]-[.H10]" office:value-type="float" office:value="-2" calcext:value-type="float">
            <text:p>-2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10]-[.K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8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1]-[.B11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11]-[.E11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11]-[.H11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11]-[.K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9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2]-[.B12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12]-[.E12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12]-[.H12]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47" table:formula="of:=[.L12]-[.K12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3]-[.B13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13]-[.E13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13]-[.H13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13]-[.K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4]-[.B14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14]-[.E14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14]-[.H14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14]-[.K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5]-[.B15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15]-[.E15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15]-[.H15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15]-[.K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3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6]-[.B16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16]-[.E16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16]-[.H16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16]-[.K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4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7]-[.B17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17]-[.E17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17]-[.H17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17]-[.K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5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8]-[.B18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18]-[.E18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18]-[.H18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18]-[.K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6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19]-[.B19]" office:value-type="float" office:value="0" calcext:value-type="float">
            <text:p>0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6" table:formula="of:=[.F19]-[.E19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19]-[.H19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47" table:formula="of:=[.L19]-[.K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7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20]-[.B20]" office:value-type="float" office:value="0" calcext:value-type="float">
            <text:p>0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6" table:formula="of:=[.F20]-[.E20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20]-[.H20]" office:value-type="float" office:value="2" calcext:value-type="float">
            <text:p>2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47" table:formula="of:=[.L20]-[.K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8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1]-[.B21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21]-[.E21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21]-[.H21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21]-[.K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9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2]-[.B22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22]-[.E22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22]-[.H22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22]-[.K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0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3]-[.B23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23]-[.E23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23]-[.H23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47" table:formula="of:=[.L23]-[.K23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24]-[.B24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24]-[.E24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24]-[.H24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24]-[.K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2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5]-[.B25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25]-[.E25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25]-[.H25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25]-[.K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3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6]-[.B26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26]-[.E26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26]-[.H26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26]-[.K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4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7]-[.B27]" office:value-type="float" office:value="0" calcext:value-type="float">
            <text:p>0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27]-[.E27]" office:value-type="float" office:value="-35" calcext:value-type="float">
            <text:p>-35</text:p>
          </table:table-cell>
          <table:table-cell table:style-name="ce14" office:value-type="float" office:value="80" calcext:value-type="float">
            <text:p>80</text:p>
          </table:table-cell>
          <table:table-cell table:style-name="ce22" office:value-type="float" office:value="78" calcext:value-type="float">
            <text:p>78</text:p>
          </table:table-cell>
          <table:table-cell table:style-name="ce42" table:formula="of:=[.I27]-[.H27]" office:value-type="float" office:value="-2" calcext:value-type="float">
            <text:p>-2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style-name="ce47" table:formula="of:=[.L27]-[.K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5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8]-[.B28]" office:value-type="float" office:value="0" calcext:value-type="float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28]-[.E28]" office:value-type="float" office:value="-16" calcext:value-type="float">
            <text:p>-16</text:p>
          </table:table-cell>
          <table:table-cell table:style-name="ce14" office:value-type="float" office:value="62" calcext:value-type="float">
            <text:p>62</text:p>
          </table:table-cell>
          <table:table-cell table:style-name="ce22" office:value-type="float" office:value="72" calcext:value-type="float">
            <text:p>72</text:p>
          </table:table-cell>
          <table:table-cell table:style-name="ce42" table:formula="of:=[.I28]-[.H28]" office:value-type="float" office:value="10" calcext:value-type="float">
            <text:p>1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style-name="ce47" table:formula="of:=[.L28]-[.K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6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29]-[.B29]" office:value-type="float" office:value="0" calcext:value-type="float">
            <text:p>0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29]-[.E29]" office:value-type="float" office:value="-35" calcext:value-type="float">
            <text:p>-35</text:p>
          </table:table-cell>
          <table:table-cell table:style-name="ce14" office:value-type="float" office:value="78" calcext:value-type="float">
            <text:p>78</text:p>
          </table:table-cell>
          <table:table-cell table:style-name="ce22" office:value-type="float" office:value="78" calcext:value-type="float">
            <text:p>78</text:p>
          </table:table-cell>
          <table:table-cell table:style-name="ce42" table:formula="of:=[.I29]-[.H29]" office:value-type="float" office:value="0" calcext:value-type="float">
            <text:p>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style-name="ce47" table:formula="of:=[.L29]-[.K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7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30" table:formula="of:=[.C30]-[.B30]" office:value-type="float" office:value="0" calcext:value-type="float">
            <text:p>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36" table:formula="of:=[.F30]-[.E30]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float" office:value="24" calcext:value-type="float">
            <text:p>24</text:p>
          </table:table-cell>
          <table:table-cell table:style-name="ce42" table:formula="of:=[.I30]-[.H30]" office:value-type="float" office:value="0" calcext:value-type="float">
            <text:p>0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47" table:formula="of:=[.L30]-[.K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8</text:p>
          </table:table-cell>
          <table:table-cell table:style-name="ce14" office:value-type="float" office:value="46" calcext:value-type="float">
            <text:p>46</text:p>
          </table:table-cell>
          <table:table-cell table:style-name="ce22" office:value-type="float" office:value="46" calcext:value-type="float">
            <text:p>46</text:p>
          </table:table-cell>
          <table:table-cell table:style-name="ce30" table:formula="of:=[.C31]-[.B31]" office:value-type="float" office:value="0" calcext:value-type="float">
            <text:p>0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31]-[.E31]" office:value-type="float" office:value="-29" calcext:value-type="float">
            <text:p>-29</text:p>
          </table:table-cell>
          <table:table-cell table:style-name="ce14" office:value-type="float" office:value="70" calcext:value-type="float">
            <text:p>70</text:p>
          </table:table-cell>
          <table:table-cell table:style-name="ce22" office:value-type="float" office:value="76" calcext:value-type="float">
            <text:p>76</text:p>
          </table:table-cell>
          <table:table-cell table:style-name="ce42" table:formula="of:=[.I31]-[.H31]" office:value-type="float" office:value="6" calcext:value-type="float">
            <text:p>6</text:p>
          </table:table-cell>
          <table:table-cell table:number-columns-repeated="2" table:style-name="ce22" office:value-type="float" office:value="46" calcext:value-type="float">
            <text:p>46</text:p>
          </table:table-cell>
          <table:table-cell table:style-name="ce47" table:formula="of:=[.L31]-[.K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9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30" table:formula="of:=[.C32]-[.B32]" office:value-type="float" office:value="0" calcext:value-type="float">
            <text:p>0</text:p>
          </table:table-cell>
          <table:table-cell table:number-columns-repeated="2" table:style-name="ce22" office:value-type="float" office:value="30" calcext:value-type="float">
            <text:p>30</text:p>
          </table:table-cell>
          <table:table-cell table:style-name="ce36" table:formula="of:=[.F32]-[.E32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32]-[.H32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32]-[.K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0</text:p>
          </table:table-cell>
          <table:table-cell table:style-name="ce14" office:value-type="float" office:value="47" calcext:value-type="float">
            <text:p>47</text:p>
          </table:table-cell>
          <table:table-cell table:style-name="ce22" office:value-type="float" office:value="47" calcext:value-type="float">
            <text:p>47</text:p>
          </table:table-cell>
          <table:table-cell table:style-name="ce30" table:formula="of:=[.C33]-[.B33]" office:value-type="float" office:value="0" calcext:value-type="float">
            <text:p>0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36" table:formula="of:=[.F33]-[.E33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33]-[.H33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33]-[.K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1</text:p>
          </table:table-cell>
          <table:table-cell table:style-name="ce14" office:value-type="float" office:value="51" calcext:value-type="float">
            <text:p>51</text:p>
          </table:table-cell>
          <table:table-cell table:style-name="ce22" office:value-type="float" office:value="51" calcext:value-type="float">
            <text:p>51</text:p>
          </table:table-cell>
          <table:table-cell table:style-name="ce30" table:formula="of:=[.C34]-[.B34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34]-[.E34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34]-[.H34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34]-[.K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2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35]-[.B35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35]-[.E35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35]-[.H35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47" table:formula="of:=[.L35]-[.K35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3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36]-[.B36]" office:value-type="float" office:value="0" calcext:value-type="float">
            <text:p>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36" table:formula="of:=[.F36]-[.E36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36]-[.H36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36]-[.K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4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37]-[.B37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37]-[.E37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37]-[.H37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37]-[.K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5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38]-[.B38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38]-[.E38]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float" office:value="24" calcext:value-type="float">
            <text:p>24</text:p>
          </table:table-cell>
          <table:table-cell table:style-name="ce42" table:formula="of:=[.I38]-[.H38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47" table:formula="of:=[.L38]-[.K38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6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39]-[.B39]" office:value-type="float" office:value="0" calcext:value-type="float">
            <text:p>0</text:p>
          </table:table-cell>
          <table:table-cell table:number-columns-repeated="2" table:style-name="ce22" office:value-type="float" office:value="44" calcext:value-type="float">
            <text:p>44</text:p>
          </table:table-cell>
          <table:table-cell table:style-name="ce36" table:formula="of:=[.F39]-[.E39]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22" office:value-type="float" office:value="54" calcext:value-type="float">
            <text:p>54</text:p>
          </table:table-cell>
          <table:table-cell table:style-name="ce42" table:formula="of:=[.I39]-[.H39]" office:value-type="float" office:value="0" calcext:value-type="float">
            <text:p>0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47" table:formula="of:=[.L39]-[.K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7</text:p>
          </table:table-cell>
          <table:table-cell table:style-name="ce14" office:value-type="float" office:value="52" calcext:value-type="float">
            <text:p>52</text:p>
          </table:table-cell>
          <table:table-cell table:style-name="ce22" office:value-type="float" office:value="52" calcext:value-type="float">
            <text:p>52</text:p>
          </table:table-cell>
          <table:table-cell table:style-name="ce30" table:formula="of:=[.C40]-[.B40]" office:value-type="float" office:value="0" calcext:value-type="float">
            <text:p>0</text:p>
          </table:table-cell>
          <table:table-cell table:number-columns-repeated="2" table:style-name="ce22" office:value-type="float" office:value="31" calcext:value-type="float">
            <text:p>31</text:p>
          </table:table-cell>
          <table:table-cell table:style-name="ce36" table:formula="of:=[.F40]-[.E40]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float" office:value="24" calcext:value-type="float">
            <text:p>24</text:p>
          </table:table-cell>
          <table:table-cell table:style-name="ce42" table:formula="of:=[.I40]-[.H40]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47" table:formula="of:=[.L40]-[.K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8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41]-[.B41]" office:value-type="float" office:value="0" calcext:value-type="float">
            <text:p>0</text:p>
          </table:table-cell>
          <table:table-cell table:number-columns-repeated="2" table:style-name="ce22" office:value-type="float" office:value="53" calcext:value-type="float">
            <text:p>53</text:p>
          </table:table-cell>
          <table:table-cell table:style-name="ce36" table:formula="of:=[.F41]-[.E41]" office:value-type="float" office:value="0" calcext:value-type="float">
            <text:p>0</text:p>
          </table:table-cell>
          <table:table-cell table:style-name="ce14" office:value-type="float" office:value="56" calcext:value-type="float">
            <text:p>56</text:p>
          </table:table-cell>
          <table:table-cell table:style-name="ce22" office:value-type="float" office:value="54" calcext:value-type="float">
            <text:p>54</text:p>
          </table:table-cell>
          <table:table-cell table:style-name="ce42" table:formula="of:=[.I41]-[.H41]" office:value-type="float" office:value="-2" calcext:value-type="float">
            <text:p>-2</text:p>
          </table:table-cell>
          <table:table-cell table:number-columns-repeated="2" table:style-name="ce22" office:value-type="float" office:value="53" calcext:value-type="float">
            <text:p>53</text:p>
          </table:table-cell>
          <table:table-cell table:style-name="ce47" table:formula="of:=[.L41]-[.K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9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42]-[.B42]" office:value-type="float" office:value="0" calcext:value-type="float">
            <text:p>0</text:p>
          </table:table-cell>
          <table:table-cell table:number-columns-repeated="2" table:style-name="ce22" office:value-type="float" office:value="83" calcext:value-type="float">
            <text:p>83</text:p>
          </table:table-cell>
          <table:table-cell table:style-name="ce36" table:formula="of:=[.F42]-[.E42]" office:value-type="float" office:value="0" calcext:value-type="float">
            <text:p>0</text:p>
          </table:table-cell>
          <table:table-cell table:style-name="ce14" office:value-type="float" office:value="84" calcext:value-type="float">
            <text:p>84</text:p>
          </table:table-cell>
          <table:table-cell table:style-name="ce22" office:value-type="float" office:value="92" calcext:value-type="float">
            <text:p>92</text:p>
          </table:table-cell>
          <table:table-cell table:style-name="ce42" table:formula="of:=[.I42]-[.H42]" office:value-type="float" office:value="8" calcext:value-type="float">
            <text:p>8</text:p>
          </table:table-cell>
          <table:table-cell table:number-columns-repeated="2" table:style-name="ce22" office:value-type="float" office:value="53" calcext:value-type="float">
            <text:p>53</text:p>
          </table:table-cell>
          <table:table-cell table:style-name="ce47" table:formula="of:=[.L42]-[.K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0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43]-[.B43]" office:value-type="float" office:value="0" calcext:value-type="float">
            <text:p>0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36" table:formula="of:=[.F43]-[.E43]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22" office:value-type="float" office:value="68" calcext:value-type="float">
            <text:p>68</text:p>
          </table:table-cell>
          <table:table-cell table:style-name="ce42" table:formula="of:=[.I43]-[.H43]" office:value-type="float" office:value="8" calcext:value-type="float">
            <text:p>8</text:p>
          </table:table-cell>
          <table:table-cell table:number-columns-repeated="2" table:style-name="ce22" office:value-type="float" office:value="53" calcext:value-type="float">
            <text:p>53</text:p>
          </table:table-cell>
          <table:table-cell table:style-name="ce47" table:formula="of:=[.L43]-[.K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1</text:p>
          </table:table-cell>
          <table:table-cell table:style-name="ce14" office:value-type="float" office:value="52" calcext:value-type="float">
            <text:p>52</text:p>
          </table:table-cell>
          <table:table-cell table:style-name="ce22" office:value-type="float" office:value="52" calcext:value-type="float">
            <text:p>52</text:p>
          </table:table-cell>
          <table:table-cell table:style-name="ce30" table:formula="of:=[.C44]-[.B44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44]-[.E44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44]-[.H44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44]-[.K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2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45]-[.B45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45]-[.E45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45]-[.H45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45]-[.K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3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46]-[.B46]" office:value-type="float" office:value="0" calcext:value-type="float">
            <text:p>0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46]-[.E46]" office:value-type="float" office:value="-22" calcext:value-type="float">
            <text:p>-22</text:p>
          </table:table-cell>
          <table:table-cell table:style-name="ce14" office:value-type="float" office:value="84" calcext:value-type="float">
            <text:p>84</text:p>
          </table:table-cell>
          <table:table-cell table:style-name="ce22" office:value-type="float" office:value="82" calcext:value-type="float">
            <text:p>82</text:p>
          </table:table-cell>
          <table:table-cell table:style-name="ce42" table:formula="of:=[.I46]-[.H46]" office:value-type="float" office:value="-2" calcext:value-type="float">
            <text:p>-2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46]-[.K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4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47]-[.B47]" office:value-type="float" office:value="0" calcext:value-type="float">
            <text:p>0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47]-[.E47]" office:value-type="float" office:value="-25" calcext:value-type="float">
            <text:p>-25</text:p>
          </table:table-cell>
          <table:table-cell table:style-name="ce14" office:value-type="float" office:value="56" calcext:value-type="float">
            <text:p>56</text:p>
          </table:table-cell>
          <table:table-cell table:style-name="ce22" office:value-type="float" office:value="74" calcext:value-type="float">
            <text:p>74</text:p>
          </table:table-cell>
          <table:table-cell table:style-name="ce42" table:formula="of:=[.I47]-[.H47]" office:value-type="float" office:value="18" calcext:value-type="float">
            <text:p>18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47]-[.K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5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48]-[.B48]" office:value-type="float" office:value="0" calcext:value-type="float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48]-[.E48]" office:value-type="float" office:value="-33" calcext:value-type="float">
            <text:p>-33</text:p>
          </table:table-cell>
          <table:table-cell table:style-name="ce14" office:value-type="float" office:value="52" calcext:value-type="float">
            <text:p>52</text:p>
          </table:table-cell>
          <table:table-cell table:style-name="ce22" office:value-type="float" office:value="82" calcext:value-type="float">
            <text:p>82</text:p>
          </table:table-cell>
          <table:table-cell table:style-name="ce42" table:formula="of:=[.I48]-[.H48]" office:value-type="float" office:value="30" calcext:value-type="float">
            <text:p>30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48]-[.K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6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49]-[.B49]" office:value-type="float" office:value="0" calcext:value-type="float">
            <text:p>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36" table:formula="of:=[.F49]-[.E49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49]-[.H49]" office:value-type="float" office:value="0" calcext:value-type="float">
            <text:p>0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47" table:formula="of:=[.L49]-[.K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7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50]-[.B50]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36" table:formula="of:=[.F50]-[.E50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50]-[.H50]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47" table:formula="of:=[.L50]-[.K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8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51]-[.B51]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36" table:formula="of:=[.F51]-[.E51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51]-[.H51]" office:value-type="float" office:value="0" calcext:value-type="float">
            <text:p>0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47" table:formula="of:=[.L51]-[.K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9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52]-[.B52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52]-[.E52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52]-[.H52]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47" table:formula="of:=[.L52]-[.K52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0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53]-[.B53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53]-[.E53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53]-[.H53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53]-[.K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1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54]-[.B54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54]-[.E54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54]-[.H54]" office:value-type="float" office:value="2" calcext:value-type="float">
            <text:p>2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54]-[.K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2</text:p>
          </table:table-cell>
          <table:table-cell table:style-name="ce14" office:value-type="float" office:value="51" calcext:value-type="float">
            <text:p>51</text:p>
          </table:table-cell>
          <table:table-cell table:style-name="ce22" office:value-type="float" office:value="51" calcext:value-type="float">
            <text:p>51</text:p>
          </table:table-cell>
          <table:table-cell table:style-name="ce30" table:formula="of:=[.C55]-[.B55]" office:value-type="float" office:value="0" calcext:value-type="float">
            <text:p>0</text:p>
          </table:table-cell>
          <table:table-cell table:number-columns-repeated="2" table:style-name="ce22" office:value-type="float" office:value="17" calcext:value-type="float">
            <text:p>17</text:p>
          </table:table-cell>
          <table:table-cell table:style-name="ce36" table:formula="of:=[.F55]-[.E55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55]-[.H55]" office:value-type="float" office:value="0" calcext:value-type="float">
            <text:p>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47" table:formula="of:=[.L55]-[.K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3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56]-[.B56]" office:value-type="float" office:value="0" calcext:value-type="float">
            <text:p>0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36" table:formula="of:=[.F56]-[.E56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56]-[.H56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56]-[.K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4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57]-[.B57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57]-[.E57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57]-[.H57]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47" table:formula="of:=[.L57]-[.K57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5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58]-[.B58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58]-[.E58]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42" table:formula="of:=[.I58]-[.H58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58]-[.K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6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59]-[.B59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59]-[.E59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59]-[.H59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59]-[.K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7</text:p>
          </table:table-cell>
          <table:table-cell table:style-name="ce14" office:value-type="float" office:value="47" calcext:value-type="float">
            <text:p>47</text:p>
          </table:table-cell>
          <table:table-cell table:style-name="ce22" office:value-type="float" office:value="47" calcext:value-type="float">
            <text:p>47</text:p>
          </table:table-cell>
          <table:table-cell table:style-name="ce30" table:formula="of:=[.C60]-[.B60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60]-[.E60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60]-[.H60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60]-[.K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8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61]-[.B61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61]-[.E61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61]-[.H61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61]-[.K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9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62]-[.B62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62]-[.E62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62]-[.H62]" office:value-type="float" office:value="-2" calcext:value-type="float">
            <text:p>-2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62]-[.K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0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63]-[.B63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63]-[.E63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63]-[.H63]" office:value-type="float" office:value="-2" calcext:value-type="float">
            <text:p>-2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63]-[.K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64]-[.B64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64]-[.E64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64]-[.H64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47" table:formula="of:=[.L64]-[.K64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2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table:style-name="ce30" table:formula="of:=[.C65]-[.B65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65]-[.E65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65]-[.H65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65]-[.K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3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66]-[.B66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66]-[.E66]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2" table:formula="of:=[.I66]-[.H66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66]-[.K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4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67]-[.B67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6" table:formula="of:=[.F67]-[.E67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67]-[.H67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47" table:formula="of:=[.L67]-[.K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5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68]-[.B68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68]-[.E68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68]-[.H68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68]-[.K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6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69]-[.B69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69]-[.E69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69]-[.H69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69]-[.K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7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70]-[.B70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70]-[.E70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70]-[.H70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47" table:formula="of:=[.L70]-[.K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8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71]-[.B71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71]-[.E71]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2" table:formula="of:=[.I71]-[.H71]" office:value-type="float" office:value="0" calcext:value-type="float">
            <text:p>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71]-[.K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9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72]-[.B72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6" table:formula="of:=[.F72]-[.E72]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42" table:formula="of:=[.I72]-[.H72]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47" table:formula="of:=[.L72]-[.K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0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73]-[.B73]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36" table:formula="of:=[.F73]-[.E73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73]-[.H73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47" table:formula="of:=[.L73]-[.K73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74]-[.B74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74]-[.E74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74]-[.H74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47" table:formula="of:=[.L74]-[.K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2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75]-[.B75]" office:value-type="float" office:value="0" calcext:value-type="float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75]-[.E75]" office:value-type="float" office:value="-37" calcext:value-type="float">
            <text:p>-37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86" calcext:value-type="float">
            <text:p>86</text:p>
          </table:table-cell>
          <table:table-cell table:style-name="ce42" table:formula="of:=[.I75]-[.H75]" office:value-type="float" office:value="80" calcext:value-type="float">
            <text:p>80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75]-[.K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3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76]-[.B76]" office:value-type="float" office:value="0" calcext:value-type="float">
            <text:p>0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76]-[.E76]" office:value-type="float" office:value="-39" calcext:value-type="float">
            <text:p>-39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86" calcext:value-type="float">
            <text:p>86</text:p>
          </table:table-cell>
          <table:table-cell table:style-name="ce42" table:formula="of:=[.I76]-[.H76]" office:value-type="float" office:value="80" calcext:value-type="float">
            <text:p>80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76]-[.K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4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77]-[.B77]" office:value-type="float" office:value="0" calcext:value-type="float">
            <text:p>0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77]-[.E77]" office:value-type="float" office:value="-40" calcext:value-type="float">
            <text:p>-40</text:p>
          </table:table-cell>
          <table:table-cell table:style-name="ce14" office:value-type="float" office:value="82" calcext:value-type="float">
            <text:p>82</text:p>
          </table:table-cell>
          <table:table-cell table:style-name="ce22" office:value-type="float" office:value="80" calcext:value-type="float">
            <text:p>80</text:p>
          </table:table-cell>
          <table:table-cell table:style-name="ce42" table:formula="of:=[.I77]-[.H77]" office:value-type="float" office:value="-2" calcext:value-type="float">
            <text:p>-2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77]-[.K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5</text:p>
          </table:table-cell>
          <table:table-cell table:style-name="ce14" office:value-type="float" office:value="27" calcext:value-type="float">
            <text:p>27</text:p>
          </table:table-cell>
          <table:table-cell table:style-name="ce22" office:value-type="float" office:value="27" calcext:value-type="float">
            <text:p>27</text:p>
          </table:table-cell>
          <table:table-cell table:style-name="ce30" table:formula="of:=[.C78]-[.B78]" office:value-type="float" office:value="0" calcext:value-type="float">
            <text:p>0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36" table:formula="of:=[.F78]-[.E78]" office:value-type="float" office:value="0" calcext:value-type="float">
            <text:p>0</text:p>
          </table:table-cell>
          <table:table-cell table:style-name="ce14" office:value-type="float" office:value="38" calcext:value-type="float">
            <text:p>38</text:p>
          </table:table-cell>
          <table:table-cell table:style-name="ce22" office:value-type="float" office:value="38" calcext:value-type="float">
            <text:p>38</text:p>
          </table:table-cell>
          <table:table-cell table:style-name="ce42" table:formula="of:=[.I78]-[.H78]" office:value-type="float" office:value="0" calcext:value-type="float">
            <text:p>0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style-name="ce47" table:formula="of:=[.L78]-[.K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6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79]-[.B79]" office:value-type="float" office:value="0" calcext:value-type="float">
            <text:p>0</text:p>
          </table:table-cell>
          <table:table-cell table:number-columns-repeated="2" table:style-name="ce22" office:value-type="float" office:value="49" calcext:value-type="float">
            <text:p>49</text:p>
          </table:table-cell>
          <table:table-cell table:style-name="ce36" table:formula="of:=[.F79]-[.E79]" office:value-type="float" office:value="0" calcext:value-type="float">
            <text:p>0</text:p>
          </table:table-cell>
          <table:table-cell table:style-name="ce14" office:value-type="float" office:value="52" calcext:value-type="float">
            <text:p>52</text:p>
          </table:table-cell>
          <table:table-cell table:style-name="ce22" office:value-type="float" office:value="202" calcext:value-type="float">
            <text:p>202</text:p>
          </table:table-cell>
          <table:table-cell table:style-name="ce42" table:formula="of:=[.I79]-[.H79]" office:value-type="float" office:value="150" calcext:value-type="float">
            <text:p>150</text:p>
          </table:table-cell>
          <table:table-cell table:number-columns-repeated="2" table:style-name="ce22" office:value-type="float" office:value="39" calcext:value-type="float">
            <text:p>39</text:p>
          </table:table-cell>
          <table:table-cell table:style-name="ce47" table:formula="of:=[.L79]-[.K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7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0]-[.B80]" office:value-type="float" office:value="0" calcext:value-type="float">
            <text:p>0</text:p>
          </table:table-cell>
          <table:table-cell table:number-columns-repeated="2" table:style-name="ce22" office:value-type="float" office:value="53" calcext:value-type="float">
            <text:p>53</text:p>
          </table:table-cell>
          <table:table-cell table:style-name="ce36" table:formula="of:=[.F80]-[.E80]" office:value-type="float" office:value="0" calcext:value-type="float">
            <text:p>0</text:p>
          </table:table-cell>
          <table:table-cell table:style-name="ce14" office:value-type="float" office:value="66" calcext:value-type="float">
            <text:p>66</text:p>
          </table:table-cell>
          <table:table-cell table:style-name="ce22" office:value-type="float" office:value="72" calcext:value-type="float">
            <text:p>72</text:p>
          </table:table-cell>
          <table:table-cell table:style-name="ce42" table:formula="of:=[.I80]-[.H80]" office:value-type="float" office:value="6" calcext:value-type="float">
            <text:p>6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80]-[.K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8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1]-[.B81]" office:value-type="float" office:value="0" calcext:value-type="float">
            <text:p>0</text:p>
          </table:table-cell>
          <table:table-cell table:number-columns-repeated="2" table:style-name="ce22" office:value-type="float" office:value="51" calcext:value-type="float">
            <text:p>51</text:p>
          </table:table-cell>
          <table:table-cell table:style-name="ce36" table:formula="of:=[.F81]-[.E81]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22" office:value-type="float" office:value="38" calcext:value-type="float">
            <text:p>38</text:p>
          </table:table-cell>
          <table:table-cell table:style-name="ce42" table:formula="of:=[.I81]-[.H81]" office:value-type="float" office:value="-2" calcext:value-type="float">
            <text:p>-2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47" table:formula="of:=[.L81]-[.K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9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2]-[.B82]" office:value-type="float" office:value="0" calcext:value-type="float">
            <text:p>0</text:p>
          </table:table-cell>
          <table:table-cell table:number-columns-repeated="2" table:style-name="ce22" office:value-type="float" office:value="47" calcext:value-type="float">
            <text:p>47</text:p>
          </table:table-cell>
          <table:table-cell table:style-name="ce36" table:formula="of:=[.F82]-[.E82]" office:value-type="float" office:value="0" calcext:value-type="float">
            <text:p>0</text:p>
          </table:table-cell>
          <table:table-cell table:style-name="ce14" office:value-type="float" office:value="38" calcext:value-type="float">
            <text:p>38</text:p>
          </table:table-cell>
          <table:table-cell table:style-name="ce22" office:value-type="float" office:value="36" calcext:value-type="float">
            <text:p>36</text:p>
          </table:table-cell>
          <table:table-cell table:style-name="ce42" table:formula="of:=[.I82]-[.H82]" office:value-type="float" office:value="-2" calcext:value-type="float">
            <text:p>-2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47" table:formula="of:=[.L82]-[.K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0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3]-[.B83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36" table:formula="of:=[.F83]-[.E83]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22" office:value-type="float" office:value="28" calcext:value-type="float">
            <text:p>28</text:p>
          </table:table-cell>
          <table:table-cell table:style-name="ce42" table:formula="of:=[.I83]-[.H83]" office:value-type="float" office:value="2" calcext:value-type="float">
            <text:p>2</text:p>
          </table:table-cell>
          <table:table-cell table:number-columns-repeated="2" table:style-name="ce22" office:value-type="float" office:value="25" calcext:value-type="float">
            <text:p>25</text:p>
          </table:table-cell>
          <table:table-cell table:style-name="ce47" table:formula="of:=[.L83]-[.K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84]-[.B84]" office:value-type="float" office:value="0" calcext:value-type="float">
            <text:p>0</text:p>
          </table:table-cell>
          <table:table-cell table:number-columns-repeated="2" table:style-name="ce22" office:value-type="float" office:value="51" calcext:value-type="float">
            <text:p>51</text:p>
          </table:table-cell>
          <table:table-cell table:style-name="ce36" table:formula="of:=[.F84]-[.E84]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41" office:value-type="float" office:value="202" calcext:value-type="float">
            <text:p>202</text:p>
          </table:table-cell>
          <table:table-cell table:style-name="ce42" table:formula="of:=[.I84]-[.H84]" office:value-type="float" office:value="162" calcext:value-type="float">
            <text:p>162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47" table:formula="of:=[.L84]-[.K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2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5]-[.B85]" office:value-type="float" office:value="0" calcext:value-type="float">
            <text:p>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36" table:formula="of:=[.F85]-[.E85]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42" table:formula="of:=[.I85]-[.H85]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47" table:formula="of:=[.L85]-[.K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3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86]-[.B86]" office:value-type="float" office:value="0" calcext:value-type="float">
            <text:p>0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02" calcext:value-type="float">
            <text:p>102</text:p>
          </table:table-cell>
          <table:table-cell table:style-name="ce36" table:formula="of:=[.F86]-[.E86]" office:value-type="float" office:value="-23" calcext:value-type="float">
            <text:p>-23</text:p>
          </table:table-cell>
          <table:table-cell table:style-name="ce14" office:value-type="float" office:value="70" calcext:value-type="float">
            <text:p>70</text:p>
          </table:table-cell>
          <table:table-cell table:style-name="ce22" office:value-type="float" office:value="68" calcext:value-type="float">
            <text:p>68</text:p>
          </table:table-cell>
          <table:table-cell table:style-name="ce42" table:formula="of:=[.I86]-[.H86]" office:value-type="float" office:value="-2" calcext:value-type="float">
            <text:p>-2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47" table:formula="of:=[.L86]-[.K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4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87]-[.B87]" office:value-type="float" office:value="0" calcext:value-type="float">
            <text:p>0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6" table:formula="of:=[.F87]-[.E8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87]-[.H87]" office:value-type="float" office:value="-2" calcext:value-type="float">
            <text:p>-2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47" table:formula="of:=[.L87]-[.K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5</text:p>
          </table:table-cell>
          <table:table-cell table:style-name="ce14" office:value-type="float" office:value="52" calcext:value-type="float">
            <text:p>52</text:p>
          </table:table-cell>
          <table:table-cell table:style-name="ce22" office:value-type="float" office:value="52" calcext:value-type="float">
            <text:p>52</text:p>
          </table:table-cell>
          <table:table-cell table:style-name="ce30" table:formula="of:=[.C88]-[.B88]" office:value-type="float" office:value="0" calcext:value-type="float">
            <text:p>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88]-[.E8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1" office:value-type="float" office:value="202" calcext:value-type="float">
            <text:p>202</text:p>
          </table:table-cell>
          <table:table-cell table:style-name="ce42" table:formula="of:=[.I88]-[.H88]" office:value-type="float" office:value="182" calcext:value-type="float">
            <text:p>182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47" table:formula="of:=[.L88]-[.K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6</text:p>
          </table:table-cell>
          <table:table-cell table:style-name="ce14" office:value-type="float" office:value="51" calcext:value-type="float">
            <text:p>51</text:p>
          </table:table-cell>
          <table:table-cell table:style-name="ce22" office:value-type="float" office:value="51" calcext:value-type="float">
            <text:p>51</text:p>
          </table:table-cell>
          <table:table-cell table:style-name="ce30" table:formula="of:=[.C89]-[.B89]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36" table:formula="of:=[.F89]-[.E8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42" table:formula="of:=[.I89]-[.H89]" office:value-type="float" office:value="0" calcext:value-type="float">
            <text:p>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47" table:formula="of:=[.L89]-[.K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7</text:p>
          </table:table-cell>
          <table:table-cell table:style-name="ce14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90]-[.B90]" office:value-type="float" office:value="1" calcext:value-type="float">
            <text:p>1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36" table:formula="of:=[.F90]-[.E90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42" table:formula="of:=[.I90]-[.H90]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47" table:formula="of:=[.L90]-[.K90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8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C91]-[.B91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91]-[.E91]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91]-[.H91]" office:value-type="float" office:value="-2" calcext:value-type="float">
            <text:p>-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47" table:formula="of:=[.L91]-[.K91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9</text:p>
          </table:table-cell>
          <table:table-cell table:style-name="ce14" office:value-type="float" office:value="51" calcext:value-type="float">
            <text:p>51</text:p>
          </table:table-cell>
          <table:table-cell table:style-name="ce22" office:value-type="float" office:value="51" calcext:value-type="float">
            <text:p>51</text:p>
          </table:table-cell>
          <table:table-cell table:style-name="ce30" table:formula="of:=[.C92]-[.B92]" office:value-type="float" office:value="0" calcext:value-type="float">
            <text:p>0</text:p>
          </table:table-cell>
          <table:table-cell table:number-columns-repeated="2" table:style-name="ce22" office:value-type="float" office:value="17" calcext:value-type="float">
            <text:p>17</text:p>
          </table:table-cell>
          <table:table-cell table:style-name="ce36" table:formula="of:=[.F92]-[.E9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1" office:value-type="float" office:value="202" calcext:value-type="float">
            <text:p>202</text:p>
          </table:table-cell>
          <table:table-cell table:style-name="ce42" table:formula="of:=[.I92]-[.H92]" office:value-type="float" office:value="182" calcext:value-type="float">
            <text:p>182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92]-[.K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90</text:p>
          </table:table-cell>
          <table:table-cell table:style-name="ce14" office:value-type="float" office:value="51" calcext:value-type="float">
            <text:p>51</text:p>
          </table:table-cell>
          <table:table-cell table:style-name="ce22" office:value-type="float" office:value="51" calcext:value-type="float">
            <text:p>51</text:p>
          </table:table-cell>
          <table:table-cell table:style-name="ce30" table:formula="of:=[.C93]-[.B93]" office:value-type="float" office:value="0" calcext:value-type="float">
            <text:p>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36" table:formula="of:=[.F93]-[.E93]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42" table:formula="of:=[.I93]-[.H93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93]-[.K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91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float" office:value="49" calcext:value-type="float">
            <text:p>49</text:p>
          </table:table-cell>
          <table:table-cell table:style-name="ce30" table:formula="of:=[.C94]-[.B94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36" table:formula="of:=[.F94]-[.E94]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42" table:formula="of:=[.I94]-[.H94]" office:value-type="float" office:value="0" calcext:value-type="float">
            <text:p>0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47" table:formula="of:=[.L94]-[.K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92</text:p>
          </table:table-cell>
          <table:table-cell table:style-name="ce14" office:value-type="float" office:value="53" calcext:value-type="float">
            <text:p>53</text:p>
          </table:table-cell>
          <table:table-cell table:style-name="ce22" office:value-type="float" office:value="53" calcext:value-type="float">
            <text:p>53</text:p>
          </table:table-cell>
          <table:table-cell table:style-name="ce30" table:formula="of:=[.C95]-[.B95]" office:value-type="float" office:value="0" calcext:value-type="float">
            <text:p>0</text:p>
          </table:table-cell>
          <table:table-cell table:number-columns-repeated="2" table:style-name="ce22" office:value-type="float" office:value="24" calcext:value-type="float">
            <text:p>24</text:p>
          </table:table-cell>
          <table:table-cell table:style-name="ce36" table:formula="of:=[.F95]-[.E95]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22" office:value-type="float" office:value="28" calcext:value-type="float">
            <text:p>28</text:p>
          </table:table-cell>
          <table:table-cell table:style-name="ce42" table:formula="of:=[.I95]-[.H95]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4" calcext:value-type="float">
            <text:p>24</text:p>
          </table:table-cell>
          <table:table-cell table:style-name="ce47" table:formula="of:=[.L95]-[.K95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15" office:value-type="float" office:value="4410" calcext:value-type="float">
            <text:p>4410</text:p>
          </table:table-cell>
          <table:table-cell table:style-name="ce23" office:value-type="float" office:value="4411" calcext:value-type="float">
            <text:p>4411</text:p>
          </table:table-cell>
          <table:table-cell table:style-name="ce31" table:formula="of:=[.C96]-[.B96]" office:value-type="float" office:value="1" calcext:value-type="float">
            <text:p>1</text:p>
          </table:table-cell>
          <table:table-cell table:style-name="ce23" office:value-type="float" office:value="2880" calcext:value-type="float">
            <text:p>2880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table:formula="of:=[.F96]-[.E96]" office:value-type="float" office:value="-332" calcext:value-type="float">
            <text:p>-332</text:p>
          </table:table-cell>
          <table:table-cell table:style-name="ce15" office:value-type="float" office:value="2256" calcext:value-type="float">
            <text:p>2256</text:p>
          </table:table-cell>
          <table:table-cell table:style-name="ce23" office:value-type="float" office:value="3158" calcext:value-type="float">
            <text:p>3158</text:p>
          </table:table-cell>
          <table:table-cell table:style-name="ce31" table:formula="of:=[.I96]-[.H96]" office:value-type="float" office:value="902" calcext:value-type="float">
            <text:p>902</text:p>
          </table:table-cell>
          <table:table-cell table:style-name="ce23" office:value-type="float" office:value="1741" calcext:value-type="float">
            <text:p>1741</text:p>
          </table:table-cell>
          <table:table-cell table:style-name="ce23" office:value-type="float" office:value="1723" calcext:value-type="float">
            <text:p>1723</text:p>
          </table:table-cell>
          <table:table-cell table:style-name="ce31" table:formula="of:=[.L96]-[.K96]" office:value-type="float" office:value="-18" calcext:value-type="float">
            <text:p>-18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Root Values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8" office:value-type="string" calcext:value-type="string" table:number-columns-spanned="3" table:number-rows-spanned="1">
            <text:p>bisect</text:p>
          </table:table-cell>
          <table:covered-table-cell table:style-name="ce20"/>
          <table:covered-table-cell table:style-name="ce28"/>
          <table:table-cell table:style-name="ce20" office:value-type="string" calcext:value-type="string" table:number-columns-spanned="3" table:number-rows-spanned="1">
            <text:p>brentq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ridder</text:p>
          </table:table-cell>
          <table:covered-table-cell table:style-name="ce20"/>
          <table:covered-table-cell table:style-name="ce28"/>
          <table:table-cell table:style-name="ce28" office:value-type="string" calcext:value-type="string" table:number-columns-spanned="3" table:number-rows-spanned="1">
            <text:p>modAB</text:p>
          </table:table-cell>
          <table:covered-table-cell table:style-name="ce20"/>
          <table:covered-table-cell table:style-name="ce28"/>
          <table:table-cell table:number-columns-repeated="1011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21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1" office:value-type="string" calcext:value-type="string">
            <text:p>Diff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21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table:formula="of:=[.C101]-[.B101]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7" table:formula="of:=[.F101]-[.E101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43" table:formula="of:=[.I101]-[.H101]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8" table:formula="of:=[.L101]-[.K1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2</text:p>
          </table:table-cell>
          <table:table-cell table:style-name="ce14" office:value-type="float" office:value="0.39942229171097" calcext:value-type="float">
            <text:p>0,39942229171097</text:p>
          </table:table-cell>
          <table:table-cell table:style-name="ce22" office:value-type="float" office:value="0.399422291710955" calcext:value-type="float">
            <text:p>0,399422291710955</text:p>
          </table:table-cell>
          <table:table-cell table:style-name="ce32" table:formula="of:=[.C102]-[.B102]" office:value-type="float" office:value="-0.00000000000001498801" calcext:value-type="float">
            <text:p>-1,49880108324396E-14</text:p>
          </table:table-cell>
          <table:table-cell table:style-name="ce22" office:value-type="float" office:value="0.39942229171097" calcext:value-type="float">
            <text:p>0,39942229171097</text:p>
          </table:table-cell>
          <table:table-cell table:style-name="ce22" office:value-type="float" office:value="0.399422291710968" calcext:value-type="float">
            <text:p>0,399422291710968</text:p>
          </table:table-cell>
          <table:table-cell table:style-name="ce37" table:formula="of:=[.F102]-[.E102]" office:value-type="float" office:value="-1.99840144432528E-015" calcext:value-type="float">
            <text:p>-1,99840144432528E-15</text:p>
          </table:table-cell>
          <table:table-cell table:style-name="ce14" office:value-type="float" office:value="0.39942229171097" calcext:value-type="float">
            <text:p>0,39942229171097</text:p>
          </table:table-cell>
          <table:table-cell table:style-name="ce22" office:value-type="float" office:value="0.399422291710975" calcext:value-type="float">
            <text:p>0,399422291710975</text:p>
          </table:table-cell>
          <table:table-cell table:style-name="ce43" table:formula="of:=[.I102]-[.H102]" office:value-type="float" office:value="4.9960036108132E-015" calcext:value-type="float">
            <text:p>4,9960036108132E-15</text:p>
          </table:table-cell>
          <table:table-cell table:style-name="ce22" office:value-type="float" office:value="0.39942229171097" calcext:value-type="float">
            <text:p>0,39942229171097</text:p>
          </table:table-cell>
          <table:table-cell table:style-name="ce22" office:value-type="float" office:value="0.399422291710968" calcext:value-type="float">
            <text:p>0,399422291710968</text:p>
          </table:table-cell>
          <table:table-cell table:style-name="ce48" table:formula="of:=[.L102]-[.K102]" office:value-type="float" office:value="-1.99840144432528E-015" calcext:value-type="float">
            <text:p>-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3</text:p>
          </table:table-cell>
          <table:table-cell table:style-name="ce14" office:value-type="float" office:value="0.80413309750366" calcext:value-type="float">
            <text:p>0,80413309750366</text:p>
          </table:table-cell>
          <table:table-cell table:style-name="ce22" office:value-type="float" office:value="0.804133097503675" calcext:value-type="float">
            <text:p>0,804133097503675</text:p>
          </table:table-cell>
          <table:table-cell table:style-name="ce32" table:formula="of:=[.C103]-[.B103]" office:value-type="float" office:value="0.00000000000001498801" calcext:value-type="float">
            <text:p>1,49880108324396E-14</text:p>
          </table:table-cell>
          <table:table-cell table:style-name="ce22" office:value-type="float" office:value="0.80413309750366" calcext:value-type="float">
            <text:p>0,80413309750366</text:p>
          </table:table-cell>
          <table:table-cell table:style-name="ce22" office:value-type="float" office:value="0.804133097503664" calcext:value-type="float">
            <text:p>0,804133097503664</text:p>
          </table:table-cell>
          <table:table-cell table:style-name="ce37" table:formula="of:=[.F103]-[.E103]" office:value-type="float" office:value="3.99680288865056E-015" calcext:value-type="float">
            <text:p>3,99680288865056E-15</text:p>
          </table:table-cell>
          <table:table-cell table:style-name="ce14" office:value-type="float" office:value="0.80413309750366" calcext:value-type="float">
            <text:p>0,80413309750366</text:p>
          </table:table-cell>
          <table:table-cell table:style-name="ce22" office:value-type="float" office:value="0.804133097503673" calcext:value-type="float">
            <text:p>0,804133097503673</text:p>
          </table:table-cell>
          <table:table-cell table:style-name="ce43" table:formula="of:=[.I103]-[.H103]" office:value-type="float" office:value="0.00000000000001298961" calcext:value-type="float">
            <text:p>1,29896093881143E-14</text:p>
          </table:table-cell>
          <table:table-cell table:style-name="ce22" office:value-type="float" office:value="0.80413309750366" calcext:value-type="float">
            <text:p>0,80413309750366</text:p>
          </table:table-cell>
          <table:table-cell table:style-name="ce22" office:value-type="float" office:value="0.804133097503664" calcext:value-type="float">
            <text:p>0,804133097503664</text:p>
          </table:table-cell>
          <table:table-cell table:style-name="ce48" table:formula="of:=[.L103]-[.K103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4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-0.99999999999999" calcext:value-type="float">
            <text:p>-0,99999999999999</text:p>
          </table:table-cell>
          <table:table-cell table:style-name="ce32" table:formula="of:=[.C104]-[.B104]" office:value-type="float" office:value="9.99200722162641E-015" calcext:value-type="float">
            <text:p>9,99200722162641E-15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table:formula="of:=[.F104]-[.E104]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43" table:formula="of:=[.I104]-[.H104]" office:value-type="float" office:value="0" calcext:value-type="float">
            <text:p>0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48" table:formula="of:=[.L104]-[.K1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5</text:p>
          </table:table-cell>
          <table:table-cell table:style-name="ce14" office:value-type="float" office:value="2.09455148154232" calcext:value-type="float">
            <text:p>2,09455148154232</text:p>
          </table:table-cell>
          <table:table-cell table:style-name="ce22" office:value-type="float" office:value="2.09455148154231" calcext:value-type="float">
            <text:p>2,09455148154231</text:p>
          </table:table-cell>
          <table:table-cell table:style-name="ce32" table:formula="of:=[.C105]-[.B105]" office:value-type="float" office:value="-9.76996261670138E-015" calcext:value-type="float">
            <text:p>-9,76996261670138E-15</text:p>
          </table:table-cell>
          <table:table-cell table:style-name="ce22" office:value-type="float" office:value="2.09455148154232" calcext:value-type="float">
            <text:p>2,09455148154232</text:p>
          </table:table-cell>
          <table:table-cell table:style-name="ce22" office:value-type="float" office:value="2.09455148154233" calcext:value-type="float">
            <text:p>2,09455148154233</text:p>
          </table:table-cell>
          <table:table-cell table:style-name="ce37" table:formula="of:=[.F105]-[.E105]" office:value-type="float" office:value="0.00000000000001021405" calcext:value-type="float">
            <text:p>1,02140518265514E-14</text:p>
          </table:table-cell>
          <table:table-cell table:style-name="ce14" office:value-type="float" office:value="2.09455148154232" calcext:value-type="float">
            <text:p>2,09455148154232</text:p>
          </table:table-cell>
          <table:table-cell table:style-name="ce22" office:value-type="float" office:value="2.09455148154234" calcext:value-type="float">
            <text:p>2,09455148154234</text:p>
          </table:table-cell>
          <table:table-cell table:style-name="ce43" table:formula="of:=[.I105]-[.H105]" office:value-type="float" office:value="0.00000000000001998401" calcext:value-type="float">
            <text:p>1,99840144432528E-14</text:p>
          </table:table-cell>
          <table:table-cell table:style-name="ce22" office:value-type="float" office:value="2.09455148154232" calcext:value-type="float">
            <text:p>2,09455148154232</text:p>
          </table:table-cell>
          <table:table-cell table:style-name="ce22" office:value-type="float" office:value="2.09455148154233" calcext:value-type="float">
            <text:p>2,09455148154233</text:p>
          </table:table-cell>
          <table:table-cell table:style-name="ce48" table:formula="of:=[.L105]-[.K105]" office:value-type="float" office:value="0.00000000000001021405" calcext:value-type="float">
            <text:p>1,02140518265514E-1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6</text:p>
          </table:table-cell>
          <table:table-cell table:style-name="ce14" office:value-type="float" office:value="0.13825715505682" calcext:value-type="float">
            <text:p>0,13825715505682</text:p>
          </table:table-cell>
          <table:table-cell table:style-name="ce22" office:value-type="float" office:value="0.138257155056827" calcext:value-type="float">
            <text:p>0,138257155056827</text:p>
          </table:table-cell>
          <table:table-cell table:style-name="ce32" table:formula="of:=[.C106]-[.B106]" office:value-type="float" office:value="6.99440505513849E-015" calcext:value-type="float">
            <text:p>6,99440505513849E-15</text:p>
          </table:table-cell>
          <table:table-cell table:style-name="ce22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37" table:formula="of:=[.F106]-[.E106]" office:value-type="float" office:value="3.99680288865056E-015" calcext:value-type="float">
            <text:p>3,99680288865056E-15</text:p>
          </table:table-cell>
          <table:table-cell table:style-name="ce14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43" table:formula="of:=[.I106]-[.H106]" office:value-type="float" office:value="3.99680288865056E-015" calcext:value-type="float">
            <text:p>3,99680288865056E-15</text:p>
          </table:table-cell>
          <table:table-cell table:style-name="ce22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48" table:formula="of:=[.L106]-[.K106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7</text:p>
          </table:table-cell>
          <table:table-cell table:style-name="ce14" office:value-type="float" office:value="0.06931408868702" calcext:value-type="float">
            <text:p>0,06931408868702</text:p>
          </table:table-cell>
          <table:table-cell table:style-name="ce22" office:value-type="float" office:value="0.0693140886870296" calcext:value-type="float">
            <text:p>0,0693140886870296</text:p>
          </table:table-cell>
          <table:table-cell table:style-name="ce32" table:formula="of:=[.C107]-[.B107]" office:value-type="float" office:value="9.58955137519979E-015" calcext:value-type="float">
            <text:p>9,58955137519979E-15</text:p>
          </table:table-cell>
          <table:table-cell table:style-name="ce22" office:value-type="float" office:value="0.06931408868702" calcext:value-type="float">
            <text:p>0,06931408868702</text:p>
          </table:table-cell>
          <table:table-cell table:style-name="ce22" office:value-type="float" office:value="0.0693140886870235" calcext:value-type="float">
            <text:p>0,0693140886870235</text:p>
          </table:table-cell>
          <table:table-cell table:style-name="ce37" table:formula="of:=[.F107]-[.E107]" office:value-type="float" office:value="3.49720252756924E-015" calcext:value-type="float">
            <text:p>3,49720252756924E-15</text:p>
          </table:table-cell>
          <table:table-cell table:style-name="ce14" office:value-type="float" office:value="0.06931408868702" calcext:value-type="float">
            <text:p>0,06931408868702</text:p>
          </table:table-cell>
          <table:table-cell table:style-name="ce22" office:value-type="float" office:value="0.0693140886870235" calcext:value-type="float">
            <text:p>0,0693140886870235</text:p>
          </table:table-cell>
          <table:table-cell table:style-name="ce43" table:formula="of:=[.I107]-[.H107]" office:value-type="float" office:value="3.49720252756924E-015" calcext:value-type="float">
            <text:p>3,49720252756924E-15</text:p>
          </table:table-cell>
          <table:table-cell table:style-name="ce22" office:value-type="float" office:value="0.06931408868702" calcext:value-type="float">
            <text:p>0,06931408868702</text:p>
          </table:table-cell>
          <table:table-cell table:style-name="ce22" office:value-type="float" office:value="0.0693140886870235" calcext:value-type="float">
            <text:p>0,0693140886870235</text:p>
          </table:table-cell>
          <table:table-cell table:style-name="ce48" table:formula="of:=[.L107]-[.K107]" office:value-type="float" office:value="3.49720252756924E-015" calcext:value-type="float">
            <text:p>3,49720252756924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8</text:p>
          </table:table-cell>
          <table:table-cell table:style-name="ce14" office:value-type="float" office:value="0.03465735902085" calcext:value-type="float">
            <text:p>0,03465735902085</text:p>
          </table:table-cell>
          <table:table-cell table:style-name="ce22" office:value-type="float" office:value="0.0346573590208479" calcext:value-type="float">
            <text:p>0,0346573590208479</text:p>
          </table:table-cell>
          <table:table-cell table:style-name="ce32" table:formula="of:=[.C108]-[.B108]" office:value-type="float" office:value="-2.10248485288389E-015" calcext:value-type="float">
            <text:p>-2,10248485288389E-15</text:p>
          </table:table-cell>
          <table:table-cell table:style-name="ce22" office:value-type="float" office:value="0.03465735902085" calcext:value-type="float">
            <text:p>0,03465735902085</text:p>
          </table:table-cell>
          <table:table-cell table:style-name="ce22" office:value-type="float" office:value="0.0346573590208539" calcext:value-type="float">
            <text:p>0,0346573590208539</text:p>
          </table:table-cell>
          <table:table-cell table:style-name="ce37" table:formula="of:=[.F108]-[.E108]" office:value-type="float" office:value="3.89965837399586E-015" calcext:value-type="float">
            <text:p>3,89965837399586E-15</text:p>
          </table:table-cell>
          <table:table-cell table:style-name="ce14" office:value-type="float" office:value="0.03465735902085" calcext:value-type="float">
            <text:p>0,03465735902085</text:p>
          </table:table-cell>
          <table:table-cell table:style-name="ce22" office:value-type="float" office:value="0.0346573590208538" calcext:value-type="float">
            <text:p>0,0346573590208538</text:p>
          </table:table-cell>
          <table:table-cell table:style-name="ce43" table:formula="of:=[.I108]-[.H108]" office:value-type="float" office:value="3.79557496543725E-015" calcext:value-type="float">
            <text:p>3,79557496543725E-15</text:p>
          </table:table-cell>
          <table:table-cell table:style-name="ce22" office:value-type="float" office:value="0.03465735902085" calcext:value-type="float">
            <text:p>0,03465735902085</text:p>
          </table:table-cell>
          <table:table-cell table:style-name="ce22" office:value-type="float" office:value="0.0346573590208539" calcext:value-type="float">
            <text:p>0,0346573590208539</text:p>
          </table:table-cell>
          <table:table-cell table:style-name="ce48" table:formula="of:=[.L108]-[.K108]" office:value-type="float" office:value="3.89965837399586E-015" calcext:value-type="float">
            <text:p>3,8996583739958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09</text:p>
          </table:table-cell>
          <table:table-cell table:style-name="ce14" office:value-type="float" office:value="0.10961179679779" calcext:value-type="float">
            <text:p>0,10961179679779</text:p>
          </table:table-cell>
          <table:table-cell table:style-name="ce22" office:value-type="float" office:value="0.109611796797786" calcext:value-type="float">
            <text:p>0,109611796797786</text:p>
          </table:table-cell>
          <table:table-cell table:style-name="ce32" table:formula="of:=[.C109]-[.B109]" office:value-type="float" office:value="-3.99680288865056E-015" calcext:value-type="float">
            <text:p>-3,99680288865056E-15</text:p>
          </table:table-cell>
          <table:table-cell table:style-name="ce22" office:value-type="float" office:value="0.10961179679779" calcext:value-type="float">
            <text:p>0,10961179679779</text:p>
          </table:table-cell>
          <table:table-cell table:style-name="ce22" office:value-type="float" office:value="0.109611796797792" calcext:value-type="float">
            <text:p>0,109611796797792</text:p>
          </table:table-cell>
          <table:table-cell table:style-name="ce37" table:formula="of:=[.F109]-[.E109]" office:value-type="float" office:value="1.99840144432528E-015" calcext:value-type="float">
            <text:p>1,99840144432528E-15</text:p>
          </table:table-cell>
          <table:table-cell table:style-name="ce14" office:value-type="float" office:value="0.10961179679779" calcext:value-type="float">
            <text:p>0,10961179679779</text:p>
          </table:table-cell>
          <table:table-cell table:style-name="ce22" office:value-type="float" office:value="0.109611796797797" calcext:value-type="float">
            <text:p>0,109611796797797</text:p>
          </table:table-cell>
          <table:table-cell table:style-name="ce43" table:formula="of:=[.I109]-[.H109]" office:value-type="float" office:value="7.0082828429463E-015" calcext:value-type="float">
            <text:p>7,0082828429463E-15</text:p>
          </table:table-cell>
          <table:table-cell table:style-name="ce22" office:value-type="float" office:value="0.10961179679779" calcext:value-type="float">
            <text:p>0,10961179679779</text:p>
          </table:table-cell>
          <table:table-cell table:style-name="ce22" office:value-type="float" office:value="0.109611796797792" calcext:value-type="float">
            <text:p>0,109611796797792</text:p>
          </table:table-cell>
          <table:table-cell table:style-name="ce48" table:formula="of:=[.L109]-[.K109]" office:value-type="float" office:value="1.99840144432528E-015" calcext:value-type="float">
            <text:p>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14" office:value-type="float" office:value="0.05247860343681" calcext:value-type="float">
            <text:p>0,05247860343681</text:p>
          </table:table-cell>
          <table:table-cell table:style-name="ce22" office:value-type="float" office:value="0.0524786034368034" calcext:value-type="float">
            <text:p>0,0524786034368034</text:p>
          </table:table-cell>
          <table:table-cell table:style-name="ce32" table:formula="of:=[.C110]-[.B110]" office:value-type="float" office:value="-6.59888810261577E-015" calcext:value-type="float">
            <text:p>-6,59888810261577E-15</text:p>
          </table:table-cell>
          <table:table-cell table:style-name="ce22" office:value-type="float" office:value="0.05247860343681" calcext:value-type="float">
            <text:p>0,05247860343681</text:p>
          </table:table-cell>
          <table:table-cell table:style-name="ce22" office:value-type="float" office:value="0.0524786034368102" calcext:value-type="float">
            <text:p>0,0524786034368102</text:p>
          </table:table-cell>
          <table:table-cell table:style-name="ce37" table:formula="of:=[.F110]-[.E110]" office:value-type="float" office:value="2.0122792321331E-016" calcext:value-type="float">
            <text:p>2,0122792321331E-16</text:p>
          </table:table-cell>
          <table:table-cell table:style-name="ce14" office:value-type="float" office:value="0.05247860343681" calcext:value-type="float">
            <text:p>0,05247860343681</text:p>
          </table:table-cell>
          <table:table-cell table:style-name="ce22" office:value-type="float" office:value="0.0524786034368102" calcext:value-type="float">
            <text:p>0,0524786034368102</text:p>
          </table:table-cell>
          <table:table-cell table:style-name="ce43" table:formula="of:=[.I110]-[.H110]" office:value-type="float" office:value="2.0122792321331E-016" calcext:value-type="float">
            <text:p>2,0122792321331E-16</text:p>
          </table:table-cell>
          <table:table-cell table:style-name="ce22" office:value-type="float" office:value="0.05247860343681" calcext:value-type="float">
            <text:p>0,05247860343681</text:p>
          </table:table-cell>
          <table:table-cell table:style-name="ce22" office:value-type="float" office:value="0.0524786034368102" calcext:value-type="float">
            <text:p>0,0524786034368102</text:p>
          </table:table-cell>
          <table:table-cell table:style-name="ce48" table:formula="of:=[.L110]-[.K110]" office:value-type="float" office:value="2.0122792321331E-016" calcext:value-type="float">
            <text:p>2,0122792321331E-1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1</text:p>
          </table:table-cell>
          <table:table-cell table:style-name="ce14" office:value-type="float" office:value="0.02562374761999" calcext:value-type="float">
            <text:p>0,02562374761999</text:p>
          </table:table-cell>
          <table:table-cell table:style-name="ce22" office:value-type="float" office:value="0.0256237476199814" calcext:value-type="float">
            <text:p>0,0256237476199814</text:p>
          </table:table-cell>
          <table:table-cell table:style-name="ce32" table:formula="of:=[.C111]-[.B111]" office:value-type="float" office:value="-8.60075899389301E-015" calcext:value-type="float">
            <text:p>-8,60075899389301E-15</text:p>
          </table:table-cell>
          <table:table-cell table:style-name="ce22" office:value-type="float" office:value="0.02562374761999" calcext:value-type="float">
            <text:p>0,02562374761999</text:p>
          </table:table-cell>
          <table:table-cell table:style-name="ce22" office:value-type="float" office:value="0.0256237476199884" calcext:value-type="float">
            <text:p>0,0256237476199884</text:p>
          </table:table-cell>
          <table:table-cell table:style-name="ce37" table:formula="of:=[.F111]-[.E111]" office:value-type="float" office:value="-1.59941504485062E-015" calcext:value-type="float">
            <text:p>-1,59941504485062E-15</text:p>
          </table:table-cell>
          <table:table-cell table:style-name="ce14" office:value-type="float" office:value="0.02562374761999" calcext:value-type="float">
            <text:p>0,02562374761999</text:p>
          </table:table-cell>
          <table:table-cell table:style-name="ce22" office:value-type="float" office:value="0.0256237476199882" calcext:value-type="float">
            <text:p>0,0256237476199882</text:p>
          </table:table-cell>
          <table:table-cell table:style-name="ce43" table:formula="of:=[.I111]-[.H111]" office:value-type="float" office:value="-1.80064296806393E-015" calcext:value-type="float">
            <text:p>-1,80064296806393E-15</text:p>
          </table:table-cell>
          <table:table-cell table:style-name="ce22" office:value-type="float" office:value="0.02562374761999" calcext:value-type="float">
            <text:p>0,02562374761999</text:p>
          </table:table-cell>
          <table:table-cell table:style-name="ce22" office:value-type="float" office:value="0.0256237476199882" calcext:value-type="float">
            <text:p>0,0256237476199882</text:p>
          </table:table-cell>
          <table:table-cell table:style-name="ce48" table:formula="of:=[.L111]-[.K111]" office:value-type="float" office:value="-1.80064296806393E-015" calcext:value-type="float">
            <text:p>-1,80064296806393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14" office:value-type="float" office:value="0.34595481584824" calcext:value-type="float">
            <text:p>0,34595481584824</text:p>
          </table:table-cell>
          <table:table-cell table:style-name="ce22" office:value-type="float" office:value="0.345954815848238" calcext:value-type="float">
            <text:p>0,345954815848238</text:p>
          </table:table-cell>
          <table:table-cell table:style-name="ce32" table:formula="of:=[.C112]-[.B112]" office:value-type="float" office:value="-1.99840144432528E-015" calcext:value-type="float">
            <text:p>-1,99840144432528E-15</text:p>
          </table:table-cell>
          <table:table-cell table:style-name="ce22" office:value-type="float" office:value="0.34595481584824" calcext:value-type="float">
            <text:p>0,34595481584824</text:p>
          </table:table-cell>
          <table:table-cell table:style-name="ce22" office:value-type="float" office:value="0.345954815848242" calcext:value-type="float">
            <text:p>0,345954815848242</text:p>
          </table:table-cell>
          <table:table-cell table:style-name="ce37" table:formula="of:=[.F112]-[.E112]" office:value-type="float" office:value="1.99840144432528E-015" calcext:value-type="float">
            <text:p>1,99840144432528E-15</text:p>
          </table:table-cell>
          <table:table-cell table:style-name="ce14" office:value-type="float" office:value="0.34595481584824" calcext:value-type="float">
            <text:p>0,34595481584824</text:p>
          </table:table-cell>
          <table:table-cell table:style-name="ce22" office:value-type="float" office:value="0.345954815848249" calcext:value-type="float">
            <text:p>0,345954815848249</text:p>
          </table:table-cell>
          <table:table-cell table:style-name="ce43" table:formula="of:=[.I112]-[.H112]" office:value-type="float" office:value="8.99280649946377E-015" calcext:value-type="float">
            <text:p>8,99280649946377E-15</text:p>
          </table:table-cell>
          <table:table-cell table:style-name="ce22" office:value-type="float" office:value="0.34595481584824" calcext:value-type="float">
            <text:p>0,34595481584824</text:p>
          </table:table-cell>
          <table:table-cell table:style-name="ce22" office:value-type="float" office:value="0.345954815848242" calcext:value-type="float">
            <text:p>0,345954815848242</text:p>
          </table:table-cell>
          <table:table-cell table:style-name="ce48" table:formula="of:=[.L112]-[.K112]" office:value-type="float" office:value="1.99840144432528E-015" calcext:value-type="float">
            <text:p>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3</text:p>
          </table:table-cell>
          <table:table-cell table:style-name="ce14" office:value-type="float" office:value="0.24512233375331" calcext:value-type="float">
            <text:p>0,24512233375331</text:p>
          </table:table-cell>
          <table:table-cell table:style-name="ce22" office:value-type="float" office:value="0.245122333753308" calcext:value-type="float">
            <text:p>0,245122333753308</text:p>
          </table:table-cell>
          <table:table-cell table:style-name="ce32" table:formula="of:=[.C113]-[.B113]" office:value-type="float" office:value="-1.99840144432528E-015" calcext:value-type="float">
            <text:p>-1,99840144432528E-15</text:p>
          </table:table-cell>
          <table:table-cell table:style-name="ce22" office:value-type="float" office:value="0.24512233375331" calcext:value-type="float">
            <text:p>0,24512233375331</text:p>
          </table:table-cell>
          <table:table-cell table:style-name="ce22" office:value-type="float" office:value="0.245122333753307" calcext:value-type="float">
            <text:p>0,245122333753307</text:p>
          </table:table-cell>
          <table:table-cell table:style-name="ce37" table:formula="of:=[.F113]-[.E113]" office:value-type="float" office:value="-2.99760216648792E-015" calcext:value-type="float">
            <text:p>-2,99760216648792E-15</text:p>
          </table:table-cell>
          <table:table-cell table:style-name="ce14" office:value-type="float" office:value="0.24512233375331" calcext:value-type="float">
            <text:p>0,24512233375331</text:p>
          </table:table-cell>
          <table:table-cell table:style-name="ce22" office:value-type="float" office:value="0.245122333753301" calcext:value-type="float">
            <text:p>0,245122333753301</text:p>
          </table:table-cell>
          <table:table-cell table:style-name="ce43" table:formula="of:=[.I113]-[.H113]" office:value-type="float" office:value="-8.99280649946377E-015" calcext:value-type="float">
            <text:p>-8,99280649946377E-15</text:p>
          </table:table-cell>
          <table:table-cell table:style-name="ce22" office:value-type="float" office:value="0.24512233375331" calcext:value-type="float">
            <text:p>0,24512233375331</text:p>
          </table:table-cell>
          <table:table-cell table:style-name="ce22" office:value-type="float" office:value="0.245122333753307" calcext:value-type="float">
            <text:p>0,245122333753307</text:p>
          </table:table-cell>
          <table:table-cell table:style-name="ce48" table:formula="of:=[.L113]-[.K113]" office:value-type="float" office:value="-2.99760216648792E-015" calcext:value-type="float">
            <text:p>-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4</text:p>
          </table:table-cell>
          <table:table-cell table:style-name="ce14" office:value-type="float" office:value="0.16492095727644" calcext:value-type="float">
            <text:p>0,16492095727644</text:p>
          </table:table-cell>
          <table:table-cell table:style-name="ce22" office:value-type="float" office:value="0.164920957276443" calcext:value-type="float">
            <text:p>0,164920957276443</text:p>
          </table:table-cell>
          <table:table-cell table:style-name="ce32" table:formula="of:=[.C114]-[.B114]" office:value-type="float" office:value="2.99760216648792E-015" calcext:value-type="float">
            <text:p>2,99760216648792E-15</text:p>
          </table:table-cell>
          <table:table-cell table:style-name="ce22" office:value-type="float" office:value="0.16492095727644" calcext:value-type="float">
            <text:p>0,16492095727644</text:p>
          </table:table-cell>
          <table:table-cell table:style-name="ce22" office:value-type="float" office:value="0.164920957276441" calcext:value-type="float">
            <text:p>0,164920957276441</text:p>
          </table:table-cell>
          <table:table-cell table:style-name="ce37" table:formula="of:=[.F114]-[.E114]" office:value-type="float" office:value="9.99200722162641E-016" calcext:value-type="float">
            <text:p>9,99200722162641E-16</text:p>
          </table:table-cell>
          <table:table-cell table:style-name="ce14" office:value-type="float" office:value="0.16492095727644" calcext:value-type="float">
            <text:p>0,16492095727644</text:p>
          </table:table-cell>
          <table:table-cell table:style-name="ce22" office:value-type="float" office:value="0.164920957276435" calcext:value-type="float">
            <text:p>0,164920957276435</text:p>
          </table:table-cell>
          <table:table-cell table:style-name="ce43" table:formula="of:=[.I114]-[.H114]" office:value-type="float" office:value="-4.9960036108132E-015" calcext:value-type="float">
            <text:p>-4,9960036108132E-15</text:p>
          </table:table-cell>
          <table:table-cell table:style-name="ce22" office:value-type="float" office:value="0.16492095727644" calcext:value-type="float">
            <text:p>0,16492095727644</text:p>
          </table:table-cell>
          <table:table-cell table:style-name="ce22" office:value-type="float" office:value="0.164920957276441" calcext:value-type="float">
            <text:p>0,164920957276441</text:p>
          </table:table-cell>
          <table:table-cell table:style-name="ce48" table:formula="of:=[.L114]-[.K114]" office:value-type="float" office:value="9.99200722162641E-016" calcext:value-type="float">
            <text:p>9,99200722162641E-1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5</text:p>
          </table:table-cell>
          <table:table-cell table:style-name="ce14" office:value-type="float" office:value="0.0036171081789" calcext:value-type="float">
            <text:p>0,0036171081789</text:p>
          </table:table-cell>
          <table:table-cell table:style-name="ce22" office:value-type="float" office:value="0.00361710817890781" calcext:value-type="float">
            <text:p>0,00361710817890781</text:p>
          </table:table-cell>
          <table:table-cell table:style-name="ce32" table:formula="of:=[.C115]-[.B115]" office:value-type="float" office:value="7.81015876971658E-015" calcext:value-type="float">
            <text:p>7,81015876971658E-15</text:p>
          </table:table-cell>
          <table:table-cell table:style-name="ce22" office:value-type="float" office:value="0.0036171081789" calcext:value-type="float">
            <text:p>0,0036171081789</text:p>
          </table:table-cell>
          <table:table-cell table:style-name="ce22" office:value-type="float" office:value="0.00361710817890406" calcext:value-type="float">
            <text:p>0,00361710817890406</text:p>
          </table:table-cell>
          <table:table-cell table:style-name="ce37" table:formula="of:=[.F115]-[.E115]" office:value-type="float" office:value="4.06012029552372E-015" calcext:value-type="float">
            <text:p>4,06012029552372E-15</text:p>
          </table:table-cell>
          <table:table-cell table:style-name="ce14" office:value-type="float" office:value="0.0036171081789" calcext:value-type="float">
            <text:p>0,0036171081789</text:p>
          </table:table-cell>
          <table:table-cell table:style-name="ce22" office:value-type="float" office:value="0.00361710817889905" calcext:value-type="float">
            <text:p>0,00361710817889905</text:p>
          </table:table-cell>
          <table:table-cell table:style-name="ce43" table:formula="of:=[.I115]-[.H115]" office:value-type="float" office:value="-9.49761103097302E-016" calcext:value-type="float">
            <text:p>-9,49761103097302E-16</text:p>
          </table:table-cell>
          <table:table-cell table:style-name="ce22" office:value-type="float" office:value="0.0036171081789" calcext:value-type="float">
            <text:p>0,0036171081789</text:p>
          </table:table-cell>
          <table:table-cell table:style-name="ce22" office:value-type="float" office:value="0.00361710817890406" calcext:value-type="float">
            <text:p>0,00361710817890406</text:p>
          </table:table-cell>
          <table:table-cell table:style-name="ce48" table:formula="of:=[.L115]-[.K115]" office:value-type="float" office:value="4.06012029552372E-015" calcext:value-type="float">
            <text:p>4,0601202955237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6</text:p>
          </table:table-cell>
          <table:table-cell table:style-name="ce14" office:value-type="float" office:value="0.00015147133478" calcext:value-type="float">
            <text:p>0,00015147133478</text:p>
          </table:table-cell>
          <table:table-cell table:style-name="ce22" office:value-type="float" office:value="0.000151471334781661" calcext:value-type="float">
            <text:p>0,000151471334781661</text:p>
          </table:table-cell>
          <table:table-cell table:style-name="ce32" table:formula="of:=[.C116]-[.B116]" office:value-type="float" office:value="1.66099772824779E-015" calcext:value-type="float">
            <text:p>1,66099772824779E-15</text:p>
          </table:table-cell>
          <table:table-cell table:style-name="ce22" office:value-type="float" office:value="0.00015147133478" calcext:value-type="float">
            <text:p>0,00015147133478</text:p>
          </table:table-cell>
          <table:table-cell table:style-name="ce22" office:value-type="float" office:value="0.000151471334783892" calcext:value-type="float">
            <text:p>0,000151471334783892</text:p>
          </table:table-cell>
          <table:table-cell table:style-name="ce37" table:formula="of:=[.F116]-[.E116]" office:value-type="float" office:value="3.89198764362553E-015" calcext:value-type="float">
            <text:p>3,89198764362553E-15</text:p>
          </table:table-cell>
          <table:table-cell table:style-name="ce14" office:value-type="float" office:value="0.00015147133478" calcext:value-type="float">
            <text:p>0,00015147133478</text:p>
          </table:table-cell>
          <table:table-cell table:style-name="ce22" office:value-type="float" office:value="0.000151471334788892" calcext:value-type="float">
            <text:p>0,000151471334788892</text:p>
          </table:table-cell>
          <table:table-cell table:style-name="ce43" table:formula="of:=[.I116]-[.H116]" office:value-type="float" office:value="8.89200280247693E-015" calcext:value-type="float">
            <text:p>8,89200280247693E-15</text:p>
          </table:table-cell>
          <table:table-cell table:style-name="ce22" office:value-type="float" office:value="0.00015147133478" calcext:value-type="float">
            <text:p>0,00015147133478</text:p>
          </table:table-cell>
          <table:table-cell table:style-name="ce22" office:value-type="float" office:value="0.000151471334783891" calcext:value-type="float">
            <text:p>0,000151471334783891</text:p>
          </table:table-cell>
          <table:table-cell table:style-name="ce48" table:formula="of:=[.L116]-[.K116]" office:value-type="float" office:value="3.89101186167029E-015" calcext:value-type="float">
            <text:p>3,89101186167029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7</text:p>
          </table:table-cell>
          <table:table-cell table:style-name="ce14" office:value-type="float" office:value="0.00000766859512" calcext:value-type="float">
            <text:p>0,00000766859512</text:p>
          </table:table-cell>
          <table:table-cell table:style-name="ce24" office:value-type="float" office:value="0.00000766859512424389" calcext:value-type="float">
            <text:p>7,67E-06</text:p>
          </table:table-cell>
          <table:table-cell table:style-name="ce32" table:formula="of:=[.C117]-[.B117]" office:value-type="float" office:value="4.24388917562822E-015" calcext:value-type="float">
            <text:p>4,24388917562822E-15</text:p>
          </table:table-cell>
          <table:table-cell table:style-name="ce22" office:value-type="float" office:value="0.00000766859512" calcext:value-type="float">
            <text:p>0,00000766859512</text:p>
          </table:table-cell>
          <table:table-cell table:style-name="ce24" office:value-type="float" office:value="0.00000766859512218534" calcext:value-type="float">
            <text:p>7,67E-06</text:p>
          </table:table-cell>
          <table:table-cell table:style-name="ce37" table:formula="of:=[.F117]-[.E117]" office:value-type="float" office:value="2.18533992171841E-015" calcext:value-type="float">
            <text:p>2,18533992171841E-15</text:p>
          </table:table-cell>
          <table:table-cell table:style-name="ce14" office:value-type="float" office:value="0.00000766859512" calcext:value-type="float">
            <text:p>0,00000766859512</text:p>
          </table:table-cell>
          <table:table-cell table:style-name="ce24" office:value-type="float" office:value="0.00000766859512718537" calcext:value-type="float">
            <text:p>7,67E-06</text:p>
          </table:table-cell>
          <table:table-cell table:style-name="ce43" table:formula="of:=[.I117]-[.H117]" office:value-type="float" office:value="7.18536863309697E-015" calcext:value-type="float">
            <text:p>7,18536863309697E-15</text:p>
          </table:table-cell>
          <table:table-cell table:style-name="ce22" office:value-type="float" office:value="0.00000766859512" calcext:value-type="float">
            <text:p>0,00000766859512</text:p>
          </table:table-cell>
          <table:table-cell table:style-name="ce24" office:value-type="float" office:value="0.00000766859512218534" calcext:value-type="float">
            <text:p>7,67E-06</text:p>
          </table:table-cell>
          <table:table-cell table:style-name="ce48" table:formula="of:=[.L117]-[.K117]" office:value-type="float" office:value="2.18533992171841E-015" calcext:value-type="float">
            <text:p>2,18533992171841E-15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18</text:p>
          </table:table-cell>
          <table:table-cell table:style-name="ce14" office:value-type="float" office:value="0.51615351875793" calcext:value-type="float">
            <text:p>0,51615351875793</text:p>
          </table:table-cell>
          <table:table-cell table:style-name="ce22" office:value-type="float" office:value="0.516153518757946" calcext:value-type="float">
            <text:p>0,516153518757946</text:p>
          </table:table-cell>
          <table:table-cell table:style-name="ce32" table:formula="of:=[.C118]-[.B118]" office:value-type="float" office:value="0.00000000000001598721" calcext:value-type="float">
            <text:p>1,59872115546023E-14</text:p>
          </table:table-cell>
          <table:table-cell table:style-name="ce22" office:value-type="float" office:value="0.51615351875793" calcext:value-type="float">
            <text:p>0,51615351875793</text:p>
          </table:table-cell>
          <table:table-cell table:style-name="ce22" office:value-type="float" office:value="0.516153518757934" calcext:value-type="float">
            <text:p>0,516153518757934</text:p>
          </table:table-cell>
          <table:table-cell table:style-name="ce37" table:formula="of:=[.F118]-[.E118]" office:value-type="float" office:value="3.99680288865056E-015" calcext:value-type="float">
            <text:p>3,99680288865056E-15</text:p>
          </table:table-cell>
          <table:table-cell table:style-name="ce14" office:value-type="float" office:value="0.51615351875793" calcext:value-type="float">
            <text:p>0,51615351875793</text:p>
          </table:table-cell>
          <table:table-cell table:style-name="ce22" office:value-type="float" office:value="0.516153518757941" calcext:value-type="float">
            <text:p>0,516153518757941</text:p>
          </table:table-cell>
          <table:table-cell table:style-name="ce43" table:formula="of:=[.I118]-[.H118]" office:value-type="float" office:value="0.00000000000001099121" calcext:value-type="float">
            <text:p>1,09912079437891E-14</text:p>
          </table:table-cell>
          <table:table-cell table:style-name="ce22" office:value-type="float" office:value="0.51615351875793" calcext:value-type="float">
            <text:p>0,51615351875793</text:p>
          </table:table-cell>
          <table:table-cell table:style-name="ce22" office:value-type="float" office:value="0.516153518757934" calcext:value-type="float">
            <text:p>0,516153518757934</text:p>
          </table:table-cell>
          <table:table-cell table:style-name="ce48" table:formula="of:=[.L118]-[.K118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19</text:p>
          </table:table-cell>
          <table:table-cell table:style-name="ce14" office:value-type="float" office:value="0.53952222690842" calcext:value-type="float">
            <text:p>0,53952222690842</text:p>
          </table:table-cell>
          <table:table-cell table:style-name="ce22" office:value-type="float" office:value="0.539522226908403" calcext:value-type="float">
            <text:p>0,539522226908403</text:p>
          </table:table-cell>
          <table:table-cell table:style-name="ce32" table:formula="of:=[.C119]-[.B119]" office:value-type="float" office:value="-0.00000000000001698641" calcext:value-type="float">
            <text:p>-1,69864122767649E-14</text:p>
          </table:table-cell>
          <table:table-cell table:style-name="ce22" office:value-type="float" office:value="0.53952222690841" calcext:value-type="float">
            <text:p>0,53952222690841</text:p>
          </table:table-cell>
          <table:table-cell table:style-name="ce22" office:value-type="float" office:value="0.539522226908413" calcext:value-type="float">
            <text:p>0,539522226908413</text:p>
          </table:table-cell>
          <table:table-cell table:style-name="ce37" table:formula="of:=[.F119]-[.E119]" office:value-type="float" office:value="2.99760216648792E-015" calcext:value-type="float">
            <text:p>2,99760216648792E-15</text:p>
          </table:table-cell>
          <table:table-cell table:style-name="ce14" office:value-type="float" office:value="0.53952222690842" calcext:value-type="float">
            <text:p>0,53952222690842</text:p>
          </table:table-cell>
          <table:table-cell table:style-name="ce22" office:value-type="float" office:value="0.539522226908408" calcext:value-type="float">
            <text:p>0,539522226908408</text:p>
          </table:table-cell>
          <table:table-cell table:style-name="ce43" table:formula="of:=[.I119]-[.H119]" office:value-type="float" office:value="-0.00000000000001199041" calcext:value-type="float">
            <text:p>-1,19904086659517E-14</text:p>
          </table:table-cell>
          <table:table-cell table:style-name="ce22" office:value-type="float" office:value="0.53952222690842" calcext:value-type="float">
            <text:p>0,53952222690842</text:p>
          </table:table-cell>
          <table:table-cell table:style-name="ce22" office:value-type="float" office:value="0.539522226908416" calcext:value-type="float">
            <text:p>0,539522226908416</text:p>
          </table:table-cell>
          <table:table-cell table:style-name="ce48" table:formula="of:=[.L119]-[.K119]" office:value-type="float" office:value="-3.99680288865056E-015" calcext:value-type="float">
            <text:p>-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0</text:p>
          </table:table-cell>
          <table:table-cell table:style-name="ce14" office:value-type="float" office:value="0.55270466667849" calcext:value-type="float">
            <text:p>0,55270466667849</text:p>
          </table:table-cell>
          <table:table-cell table:style-name="ce22" office:value-type="float" office:value="0.55270466667848" calcext:value-type="float">
            <text:p>0,55270466667848</text:p>
          </table:table-cell>
          <table:table-cell table:style-name="ce32" table:formula="of:=[.C120]-[.B120]" office:value-type="float" office:value="-0.00000000000001010303" calcext:value-type="float">
            <text:p>-1,01030295240889E-14</text:p>
          </table:table-cell>
          <table:table-cell table:style-name="ce22" office:value-type="float" office:value="0.55270466667849" calcext:value-type="float">
            <text:p>0,55270466667849</text:p>
          </table:table-cell>
          <table:table-cell table:style-name="ce22" office:value-type="float" office:value="0.552704666678488" calcext:value-type="float">
            <text:p>0,552704666678488</text:p>
          </table:table-cell>
          <table:table-cell table:style-name="ce37" table:formula="of:=[.F120]-[.E120]" office:value-type="float" office:value="-1.99840144432528E-015" calcext:value-type="float">
            <text:p>-1,99840144432528E-15</text:p>
          </table:table-cell>
          <table:table-cell table:style-name="ce14" office:value-type="float" office:value="0.55270466667849" calcext:value-type="float">
            <text:p>0,55270466667849</text:p>
          </table:table-cell>
          <table:table-cell table:style-name="ce22" office:value-type="float" office:value="0.552704666678494" calcext:value-type="float">
            <text:p>0,552704666678494</text:p>
          </table:table-cell>
          <table:table-cell table:style-name="ce43" table:formula="of:=[.I120]-[.H120]" office:value-type="float" office:value="3.99680288865056E-015" calcext:value-type="float">
            <text:p>3,99680288865056E-15</text:p>
          </table:table-cell>
          <table:table-cell table:style-name="ce22" office:value-type="float" office:value="0.55270466667849" calcext:value-type="float">
            <text:p>0,55270466667849</text:p>
          </table:table-cell>
          <table:table-cell table:style-name="ce22" office:value-type="float" office:value="0.552704666678488" calcext:value-type="float">
            <text:p>0,552704666678488</text:p>
          </table:table-cell>
          <table:table-cell table:style-name="ce48" table:formula="of:=[.L120]-[.K120]" office:value-type="float" office:value="-1.99840144432528E-015" calcext:value-type="float">
            <text:p>-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1</text:p>
          </table:table-cell>
          <table:table-cell table:style-name="ce14" office:value-type="float" office:value="0.40999201798914" calcext:value-type="float">
            <text:p>0,40999201798914</text:p>
          </table:table-cell>
          <table:table-cell table:style-name="ce22" office:value-type="float" office:value="0.409992017989133" calcext:value-type="float">
            <text:p>0,409992017989133</text:p>
          </table:table-cell>
          <table:table-cell table:style-name="ce32" table:formula="of:=[.C121]-[.B121]" office:value-type="float" office:value="-6.99440505513849E-015" calcext:value-type="float">
            <text:p>-6,99440505513849E-15</text:p>
          </table:table-cell>
          <table:table-cell table:style-name="ce22" office:value-type="float" office:value="0.40999201798914" calcext:value-type="float">
            <text:p>0,40999201798914</text:p>
          </table:table-cell>
          <table:table-cell table:style-name="ce22" office:value-type="float" office:value="0.409992017989137" calcext:value-type="float">
            <text:p>0,409992017989137</text:p>
          </table:table-cell>
          <table:table-cell table:style-name="ce37" table:formula="of:=[.F121]-[.E121]" office:value-type="float" office:value="-2.99760216648792E-015" calcext:value-type="float">
            <text:p>-2,99760216648792E-15</text:p>
          </table:table-cell>
          <table:table-cell table:style-name="ce14" office:value-type="float" office:value="0.40999201798914" calcext:value-type="float">
            <text:p>0,40999201798914</text:p>
          </table:table-cell>
          <table:table-cell table:style-name="ce22" office:value-type="float" office:value="0.409992017989137" calcext:value-type="float">
            <text:p>0,409992017989137</text:p>
          </table:table-cell>
          <table:table-cell table:style-name="ce43" table:formula="of:=[.I121]-[.H121]" office:value-type="float" office:value="-2.99760216648792E-015" calcext:value-type="float">
            <text:p>-2,99760216648792E-15</text:p>
          </table:table-cell>
          <table:table-cell table:style-name="ce22" office:value-type="float" office:value="0.40999201798914" calcext:value-type="float">
            <text:p>0,40999201798914</text:p>
          </table:table-cell>
          <table:table-cell table:style-name="ce22" office:value-type="float" office:value="0.409992017989137" calcext:value-type="float">
            <text:p>0,409992017989137</text:p>
          </table:table-cell>
          <table:table-cell table:style-name="ce48" table:formula="of:=[.L121]-[.K121]" office:value-type="float" office:value="-2.99760216648792E-015" calcext:value-type="float">
            <text:p>-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2</text:p>
          </table:table-cell>
          <table:table-cell table:style-name="ce14" office:value-type="float" office:value="0.45250914557764" calcext:value-type="float">
            <text:p>0,45250914557764</text:p>
          </table:table-cell>
          <table:table-cell table:style-name="ce22" office:value-type="float" office:value="0.45250914557765" calcext:value-type="float">
            <text:p>0,45250914557765</text:p>
          </table:table-cell>
          <table:table-cell table:style-name="ce32" table:formula="of:=[.C122]-[.B122]" office:value-type="float" office:value="9.99200722162641E-015" calcext:value-type="float">
            <text:p>9,99200722162641E-15</text:p>
          </table:table-cell>
          <table:table-cell table:style-name="ce22" office:value-type="float" office:value="0.45250914557764" calcext:value-type="float">
            <text:p>0,45250914557764</text:p>
          </table:table-cell>
          <table:table-cell table:style-name="ce22" office:value-type="float" office:value="0.452509145577641" calcext:value-type="float">
            <text:p>0,452509145577641</text:p>
          </table:table-cell>
          <table:table-cell table:style-name="ce37" table:formula="of:=[.F122]-[.E122]" office:value-type="float" office:value="0" calcext:value-type="float">
            <text:p>0</text:p>
          </table:table-cell>
          <table:table-cell table:style-name="ce14" office:value-type="float" office:value="0.45250914557764" calcext:value-type="float">
            <text:p>0,45250914557764</text:p>
          </table:table-cell>
          <table:table-cell table:style-name="ce22" office:value-type="float" office:value="0.452509145577641" calcext:value-type="float">
            <text:p>0,452509145577641</text:p>
          </table:table-cell>
          <table:table-cell table:style-name="ce43" table:formula="of:=[.I122]-[.H122]" office:value-type="float" office:value="0" calcext:value-type="float">
            <text:p>0</text:p>
          </table:table-cell>
          <table:table-cell table:style-name="ce22" office:value-type="float" office:value="0.45250914557764" calcext:value-type="float">
            <text:p>0,45250914557764</text:p>
          </table:table-cell>
          <table:table-cell table:style-name="ce22" office:value-type="float" office:value="0.452509145577641" calcext:value-type="float">
            <text:p>0,452509145577641</text:p>
          </table:table-cell>
          <table:table-cell table:style-name="ce48" table:formula="of:=[.L122]-[.K1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3</text:p>
          </table:table-cell>
          <table:table-cell table:style-name="ce14" office:value-type="float" office:value="0.47562684859606" calcext:value-type="float">
            <text:p>0,47562684859606</text:p>
          </table:table-cell>
          <table:table-cell table:style-name="ce22" office:value-type="float" office:value="0.475626848596065" calcext:value-type="float">
            <text:p>0,475626848596065</text:p>
          </table:table-cell>
          <table:table-cell table:style-name="ce32" table:formula="of:=[.C123]-[.B123]" office:value-type="float" office:value="4.9960036108132E-015" calcext:value-type="float">
            <text:p>4,9960036108132E-15</text:p>
          </table:table-cell>
          <table:table-cell table:style-name="ce22" office:value-type="float" office:value="0.47562684859606" calcext:value-type="float">
            <text:p>0,47562684859606</text:p>
          </table:table-cell>
          <table:table-cell table:style-name="ce22" office:value-type="float" office:value="0.475626848596062" calcext:value-type="float">
            <text:p>0,475626848596062</text:p>
          </table:table-cell>
          <table:table-cell table:style-name="ce37" table:formula="of:=[.F123]-[.E123]" office:value-type="float" office:value="1.99840144432528E-015" calcext:value-type="float">
            <text:p>1,99840144432528E-15</text:p>
          </table:table-cell>
          <table:table-cell table:style-name="ce14" office:value-type="float" office:value="0.47562684859606" calcext:value-type="float">
            <text:p>0,47562684859606</text:p>
          </table:table-cell>
          <table:table-cell table:style-name="ce22" office:value-type="float" office:value="0.47562684859607" calcext:value-type="float">
            <text:p>0,47562684859607</text:p>
          </table:table-cell>
          <table:table-cell table:style-name="ce43" table:formula="of:=[.I123]-[.H123]" office:value-type="float" office:value="9.99200722162641E-015" calcext:value-type="float">
            <text:p>9,99200722162641E-15</text:p>
          </table:table-cell>
          <table:table-cell table:style-name="ce22" office:value-type="float" office:value="0.47562684859606" calcext:value-type="float">
            <text:p>0,47562684859606</text:p>
          </table:table-cell>
          <table:table-cell table:style-name="ce22" office:value-type="float" office:value="0.475626848596062" calcext:value-type="float">
            <text:p>0,475626848596062</text:p>
          </table:table-cell>
          <table:table-cell table:style-name="ce48" table:formula="of:=[.L123]-[.K123]" office:value-type="float" office:value="1.99840144432528E-015" calcext:value-type="float">
            <text:p>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4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float" office:value="3.00000000000001" calcext:value-type="float">
            <text:p>3,00000000000001</text:p>
          </table:table-cell>
          <table:table-cell table:style-name="ce32" table:formula="of:=[.C124]-[.B124]" office:value-type="float" office:value="0" calcext:value-type="float">
            <text:p>0</text:p>
          </table:table-cell>
          <table:table-cell table:style-name="ce22" office:value-type="float" office:value="2.99999999999999" calcext:value-type="float">
            <text:p>2,99999999999999</text:p>
          </table:table-cell>
          <table:table-cell table:style-name="ce22" office:value-type="float" office:value="2.99999999994985" calcext:value-type="float">
            <text:p>2,99999999994985</text:p>
          </table:table-cell>
          <table:table-cell table:style-name="ce37" table:formula="of:=[.F124]-[.E124]" office:value-type="float" office:value="-0.00000000005013989224" calcext:value-type="float">
            <text:p>-5,01398922381213E-11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43" table:formula="of:=[.I124]-[.H124]" office:value-type="float" office:value="0" calcext:value-type="float">
            <text:p>0</text:p>
          </table:table-cell>
          <table:table-cell table:number-columns-repeated="2" table:style-name="ce22" office:value-type="float" office:value="2.99999999999999" calcext:value-type="float">
            <text:p>2,99999999999999</text:p>
          </table:table-cell>
          <table:table-cell table:style-name="ce48" table:formula="of:=[.L124]-[.K1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5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float" office:value="4.00000000000001" calcext:value-type="float">
            <text:p>4,00000000000001</text:p>
          </table:table-cell>
          <table:table-cell table:style-name="ce32" table:formula="of:=[.C125]-[.B125]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.99999999999711" calcext:value-type="float">
            <text:p>3,99999999999711</text:p>
          </table:table-cell>
          <table:table-cell table:style-name="ce37" table:formula="of:=[.F125]-[.E125]" office:value-type="float" office:value="-0.00000000000289013258" calcext:value-type="float">
            <text:p>-2,89013257770421E-12</text:p>
          </table:table-cell>
          <table:table-cell table:style-name="ce14" office:value-type="float" office:value="3.99999999999902" calcext:value-type="float">
            <text:p>3,99999999999902</text:p>
          </table:table-cell>
          <table:table-cell table:style-name="ce22" office:value-type="float" office:value="3.99999999999998" calcext:value-type="float">
            <text:p>3,99999999999998</text:p>
          </table:table-cell>
          <table:table-cell table:style-name="ce43" table:formula="of:=[.I125]-[.H125]" office:value-type="float" office:value="0.00000000000096012087" calcext:value-type="float">
            <text:p>9,60120871695835E-13</text:p>
          </table:table-cell>
          <table:table-cell table:number-columns-repeated="2" table:style-name="ce22" office:value-type="float" office:value="3.99999999999999" calcext:value-type="float">
            <text:p>3,99999999999999</text:p>
          </table:table-cell>
          <table:table-cell table:style-name="ce48" table:formula="of:=[.L125]-[.K1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6</text:p>
          </table:table-cell>
          <table:table-cell table:style-name="ce14" office:value-type="float" office:value="2.47457678736983" calcext:value-type="float">
            <text:p>2,47457678736983</text:p>
          </table:table-cell>
          <table:table-cell table:style-name="ce22" office:value-type="float" office:value="2.47457678736984" calcext:value-type="float">
            <text:p>2,47457678736984</text:p>
          </table:table-cell>
          <table:table-cell table:style-name="ce32" table:formula="of:=[.C126]-[.B126]" office:value-type="float" office:value="9.76996261670138E-015" calcext:value-type="float">
            <text:p>9,76996261670138E-15</text:p>
          </table:table-cell>
          <table:table-cell table:style-name="ce22" office:value-type="float" office:value="2.47457678736982" calcext:value-type="float">
            <text:p>2,47457678736982</text:p>
          </table:table-cell>
          <table:table-cell table:style-name="ce22" office:value-type="float" office:value="2.47457678732526" calcext:value-type="float">
            <text:p>2,47457678732526</text:p>
          </table:table-cell>
          <table:table-cell table:style-name="ce37" table:formula="of:=[.F126]-[.E126]" office:value-type="float" office:value="-0.00000000004455991132" calcext:value-type="float">
            <text:p>-4,45599113163553E-11</text:p>
          </table:table-cell>
          <table:table-cell table:style-name="ce14" office:value-type="float" office:value="2.47457678736982" calcext:value-type="float">
            <text:p>2,47457678736982</text:p>
          </table:table-cell>
          <table:table-cell table:style-name="ce22" office:value-type="float" office:value="2.47457678736982" calcext:value-type="float">
            <text:p>2,47457678736982</text:p>
          </table:table-cell>
          <table:table-cell table:style-name="ce43" table:formula="of:=[.I126]-[.H126]" office:value-type="float" office:value="0" calcext:value-type="float">
            <text:p>0</text:p>
          </table:table-cell>
          <table:table-cell table:style-name="ce22" office:value-type="float" office:value="2.47457678736982" calcext:value-type="float">
            <text:p>2,47457678736982</text:p>
          </table:table-cell>
          <table:table-cell table:style-name="ce22" office:value-type="float" office:value="2.47457678736983" calcext:value-type="float">
            <text:p>2,47457678736983</text:p>
          </table:table-cell>
          <table:table-cell table:style-name="ce48" table:formula="of:=[.L126]-[.K126]" office:value-type="float" office:value="0.00000000000001021405" calcext:value-type="float">
            <text:p>1,02140518265514E-1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7</text:p>
          </table:table-cell>
          <table:table-cell table:style-name="ce14" office:value-type="float" office:value="1.88916015625" calcext:value-type="float">
            <text:p>1,88916015625</text:p>
          </table:table-cell>
          <table:table-cell table:style-name="ce22" office:value-type="float" office:value="1.88916015625" calcext:value-type="float">
            <text:p>1,88916015625</text:p>
          </table:table-cell>
          <table:table-cell table:style-name="ce32" table:formula="of:=[.C127]-[.B127]" office:value-type="float" office:value="0" calcext:value-type="float">
            <text:p>0</text:p>
          </table:table-cell>
          <table:table-cell table:style-name="ce22" office:value-type="float" office:value="1.88914310822898" calcext:value-type="float">
            <text:p>1,88914310822898</text:p>
          </table:table-cell>
          <table:table-cell table:style-name="ce22" office:value-type="float" office:value="1.88901627626639" calcext:value-type="float">
            <text:p>1,88901627626639</text:p>
          </table:table-cell>
          <table:table-cell table:style-name="ce37" table:formula="of:=[.F127]-[.E127]" office:value-type="float" office:value="-0.000126831962590002" calcext:value-type="float">
            <text:p>-0,000126831962590002</text:p>
          </table:table-cell>
          <table:table-cell table:style-name="ce14" office:value-type="float" office:value="1.88905736094801" calcext:value-type="float">
            <text:p>1,88905736094801</text:p>
          </table:table-cell>
          <table:table-cell table:style-name="ce22" office:value-type="float" office:value="1.88905736094801" calcext:value-type="float">
            <text:p>1,88905736094801</text:p>
          </table:table-cell>
          <table:table-cell table:style-name="ce43" table:formula="of:=[.I127]-[.H127]" office:value-type="float" office:value="0" calcext:value-type="float">
            <text:p>0</text:p>
          </table:table-cell>
          <table:table-cell table:number-columns-repeated="2" table:style-name="ce22" office:value-type="float" office:value="1.88916015625" calcext:value-type="float">
            <text:p>1,88916015625</text:p>
          </table:table-cell>
          <table:table-cell table:style-name="ce48" table:formula="of:=[.L127]-[.K1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8</text:p>
          </table:table-cell>
          <table:table-cell table:style-name="ce14" office:value-type="float" office:value="7.14299999999999" calcext:value-type="float">
            <text:p>7,14299999999999</text:p>
          </table:table-cell>
          <table:table-cell table:style-name="ce22" office:value-type="float" office:value="7.14299999999997" calcext:value-type="float">
            <text:p>7,14299999999997</text:p>
          </table:table-cell>
          <table:table-cell table:style-name="ce32" table:formula="of:=[.C128]-[.B128]" office:value-type="float" office:value="0" calcext:value-type="float">
            <text:p>0</text:p>
          </table:table-cell>
          <table:table-cell table:style-name="ce22" office:value-type="float" office:value="7.14299999999999" calcext:value-type="float">
            <text:p>7,14299999999999</text:p>
          </table:table-cell>
          <table:table-cell table:style-name="ce22" office:value-type="float" office:value="7.1429999999767" calcext:value-type="float">
            <text:p>7,1429999999767</text:p>
          </table:table-cell>
          <table:table-cell table:style-name="ce37" table:formula="of:=[.F128]-[.E128]" office:value-type="float" office:value="-0.00000000002328981452" calcext:value-type="float">
            <text:p>-2,32898145213767E-11</text:p>
          </table:table-cell>
          <table:table-cell table:style-name="ce14" office:value-type="float" office:value="7.14299999999989" calcext:value-type="float">
            <text:p>7,14299999999989</text:p>
          </table:table-cell>
          <table:table-cell table:style-name="ce22" office:value-type="float" office:value="7.14300000000004" calcext:value-type="float">
            <text:p>7,14300000000004</text:p>
          </table:table-cell>
          <table:table-cell table:style-name="ce43" table:formula="of:=[.I128]-[.H128]" office:value-type="float" office:value="0.00000000000015010215" calcext:value-type="float">
            <text:p>1,50102152929321E-13</text:p>
          </table:table-cell>
          <table:table-cell table:number-columns-repeated="2" table:style-name="ce22" office:value-type="float" office:value="7.143" calcext:value-type="float">
            <text:p>7,143</text:p>
          </table:table-cell>
          <table:table-cell table:style-name="ce48" table:formula="of:=[.L128]-[.K1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29</text:p>
          </table:table-cell>
          <table:table-cell table:style-name="ce14" office:value-type="float" office:value="3.00039062499999" calcext:value-type="float">
            <text:p>3,00039062499999</text:p>
          </table:table-cell>
          <table:table-cell table:style-name="ce22" office:value-type="float" office:value="3.000390625" calcext:value-type="float">
            <text:p>3,000390625</text:p>
          </table:table-cell>
          <table:table-cell table:style-name="ce32" table:formula="of:=[.C129]-[.B129]" office:value-type="float" office:value="0" calcext:value-type="float">
            <text:p>0</text:p>
          </table:table-cell>
          <table:table-cell table:style-name="ce22" office:value-type="float" office:value="2.99980076330914" calcext:value-type="float">
            <text:p>2,99980076330914</text:p>
          </table:table-cell>
          <table:table-cell table:style-name="ce22" office:value-type="float" office:value="2.99980076364321" calcext:value-type="float">
            <text:p>2,99980076364321</text:p>
          </table:table-cell>
          <table:table-cell table:style-name="ce37" table:formula="of:=[.F129]-[.E129]" office:value-type="float" office:value="0.00000000033407010491" calcext:value-type="float">
            <text:p>3,34070104912598E-10</text:p>
          </table:table-cell>
          <table:table-cell table:style-name="ce14" office:value-type="float" office:value="3.00054459411" calcext:value-type="float">
            <text:p>3,00054459411</text:p>
          </table:table-cell>
          <table:table-cell table:style-name="ce22" office:value-type="float" office:value="3.00054459411" calcext:value-type="float">
            <text:p>3,00054459411</text:p>
          </table:table-cell>
          <table:table-cell table:style-name="ce43" table:formula="of:=[.I129]-[.H129]" office:value-type="float" office:value="0" calcext:value-type="float">
            <text:p>0</text:p>
          </table:table-cell>
          <table:table-cell table:style-name="ce22" office:value-type="float" office:value="3.00039062499999" calcext:value-type="float">
            <text:p>3,00039062499999</text:p>
          </table:table-cell>
          <table:table-cell table:style-name="ce22" office:value-type="float" office:value="3.000390625" calcext:value-type="float">
            <text:p>3,000390625</text:p>
          </table:table-cell>
          <table:table-cell table:style-name="ce48" table:formula="of:=[.L129]-[.K1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0</text:p>
          </table:table-cell>
          <table:table-cell table:style-name="ce14" office:value-type="float" office:value="4.26716830454212" calcext:value-type="float">
            <text:p>4,26716830454212</text:p>
          </table:table-cell>
          <table:table-cell table:style-name="ce22" office:value-type="float" office:value="4.26716830454214" calcext:value-type="float">
            <text:p>4,26716830454214</text:p>
          </table:table-cell>
          <table:table-cell table:style-name="ce32" table:formula="of:=[.C130]-[.B130]" office:value-type="float" office:value="0.00000000000001953993" calcext:value-type="float">
            <text:p>1,95399252334028E-14</text:p>
          </table:table-cell>
          <table:table-cell table:number-columns-repeated="2" table:style-name="ce22" office:value-type="float" office:value="4.26716830454212" calcext:value-type="float">
            <text:p>4,26716830454212</text:p>
          </table:table-cell>
          <table:table-cell table:style-name="ce37" table:formula="of:=[.F130]-[.E130]" office:value-type="float" office:value="0" calcext:value-type="float">
            <text:p>0</text:p>
          </table:table-cell>
          <table:table-cell table:style-name="ce14" office:value-type="float" office:value="4.26716830454212" calcext:value-type="float">
            <text:p>4,26716830454212</text:p>
          </table:table-cell>
          <table:table-cell table:style-name="ce22" office:value-type="float" office:value="4.2671683045421" calcext:value-type="float">
            <text:p>4,2671683045421</text:p>
          </table:table-cell>
          <table:table-cell table:style-name="ce43" table:formula="of:=[.I130]-[.H130]" office:value-type="float" office:value="-0.0000000000000204281" calcext:value-type="float">
            <text:p>-2,04281036531029E-14</text:p>
          </table:table-cell>
          <table:table-cell table:number-columns-repeated="2" table:style-name="ce22" office:value-type="float" office:value="4.26716830454212" calcext:value-type="float">
            <text:p>4,26716830454212</text:p>
          </table:table-cell>
          <table:table-cell table:style-name="ce48" table:formula="of:=[.L130]-[.K1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1</text:p>
          </table:table-cell>
          <table:table-cell table:style-name="ce14" office:value-type="float" office:value="0.31830988618379" calcext:value-type="float">
            <text:p>0,31830988618379</text:p>
          </table:table-cell>
          <table:table-cell table:style-name="ce22" office:value-type="float" office:value="0.318309886183787" calcext:value-type="float">
            <text:p>0,318309886183787</text:p>
          </table:table-cell>
          <table:table-cell table:style-name="ce32" table:formula="of:=[.C131]-[.B131]" office:value-type="float" office:value="-2.99760216648792E-015" calcext:value-type="float">
            <text:p>-2,99760216648792E-15</text:p>
          </table:table-cell>
          <table:table-cell table:style-name="ce22" office:value-type="float" office:value="0.31830988618379" calcext:value-type="float">
            <text:p>0,31830988618379</text:p>
          </table:table-cell>
          <table:table-cell table:style-name="ce22" office:value-type="float" office:value="0.318309886183791" calcext:value-type="float">
            <text:p>0,318309886183791</text:p>
          </table:table-cell>
          <table:table-cell table:style-name="ce37" table:formula="of:=[.F131]-[.E131]" office:value-type="float" office:value="0" calcext:value-type="float">
            <text:p>0</text:p>
          </table:table-cell>
          <table:table-cell table:style-name="ce14" office:value-type="float" office:value="0.31830988618379" calcext:value-type="float">
            <text:p>0,31830988618379</text:p>
          </table:table-cell>
          <table:table-cell table:style-name="ce22" office:value-type="float" office:value="0.318309886183791" calcext:value-type="float">
            <text:p>0,318309886183791</text:p>
          </table:table-cell>
          <table:table-cell table:style-name="ce43" table:formula="of:=[.I131]-[.H131]" office:value-type="float" office:value="0" calcext:value-type="float">
            <text:p>0</text:p>
          </table:table-cell>
          <table:table-cell table:style-name="ce22" office:value-type="float" office:value="0.31830988618379" calcext:value-type="float">
            <text:p>0,31830988618379</text:p>
          </table:table-cell>
          <table:table-cell table:style-name="ce22" office:value-type="float" office:value="0.318309886183791" calcext:value-type="float">
            <text:p>0,318309886183791</text:p>
          </table:table-cell>
          <table:table-cell table:style-name="ce48" table:formula="of:=[.L131]-[.K1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2</text:p>
          </table:table-cell>
          <table:table-cell table:style-name="ce14" office:value-type="float" office:value="1.32581766366803" calcext:value-type="float">
            <text:p>1,32581766366803</text:p>
          </table:table-cell>
          <table:table-cell table:style-name="ce22" office:value-type="float" office:value="1.32581766366803" calcext:value-type="float">
            <text:p>1,32581766366803</text:p>
          </table:table-cell>
          <table:table-cell table:style-name="ce32" table:formula="of:=[.C132]-[.B132]" office:value-type="float" office:value="0" calcext:value-type="float">
            <text:p>0</text:p>
          </table:table-cell>
          <table:table-cell table:number-columns-repeated="2" table:style-name="ce22" office:value-type="float" office:value="1.32581766366803" calcext:value-type="float">
            <text:p>1,32581766366803</text:p>
          </table:table-cell>
          <table:table-cell table:style-name="ce37" table:formula="of:=[.F132]-[.E132]" office:value-type="float" office:value="0" calcext:value-type="float">
            <text:p>0</text:p>
          </table:table-cell>
          <table:table-cell table:style-name="ce14" office:value-type="float" office:value="1.32581766366803" calcext:value-type="float">
            <text:p>1,32581766366803</text:p>
          </table:table-cell>
          <table:table-cell table:style-name="ce22" office:value-type="float" office:value="1.32581766366802" calcext:value-type="float">
            <text:p>1,32581766366802</text:p>
          </table:table-cell>
          <table:table-cell table:style-name="ce43" table:formula="of:=[.I132]-[.H132]" office:value-type="float" office:value="-0.00000000000001021405" calcext:value-type="float">
            <text:p>-1,02140518265514E-14</text:p>
          </table:table-cell>
          <table:table-cell table:number-columns-repeated="2" table:style-name="ce22" office:value-type="float" office:value="1.32581766366803" calcext:value-type="float">
            <text:p>1,32581766366803</text:p>
          </table:table-cell>
          <table:table-cell table:style-name="ce48" table:formula="of:=[.L132]-[.K1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3</text:p>
          </table:table-cell>
          <table:table-cell table:style-name="ce14" office:value-type="float" office:value="0.86547403310161" calcext:value-type="float">
            <text:p>0,86547403310161</text:p>
          </table:table-cell>
          <table:table-cell table:style-name="ce22" office:value-type="float" office:value="0.86547403310162" calcext:value-type="float">
            <text:p>0,86547403310162</text:p>
          </table:table-cell>
          <table:table-cell table:style-name="ce32" table:formula="of:=[.C133]-[.B133]" office:value-type="float" office:value="9.99200722162641E-015" calcext:value-type="float">
            <text:p>9,99200722162641E-15</text:p>
          </table:table-cell>
          <table:table-cell table:style-name="ce22" office:value-type="float" office:value="0.86547403310161" calcext:value-type="float">
            <text:p>0,86547403310161</text:p>
          </table:table-cell>
          <table:table-cell table:style-name="ce22" office:value-type="float" office:value="0.865474033101614" calcext:value-type="float">
            <text:p>0,865474033101614</text:p>
          </table:table-cell>
          <table:table-cell table:style-name="ce37" table:formula="of:=[.F133]-[.E133]" office:value-type="float" office:value="3.99680288865056E-015" calcext:value-type="float">
            <text:p>3,99680288865056E-15</text:p>
          </table:table-cell>
          <table:table-cell table:style-name="ce14" office:value-type="float" office:value="0.86547403310161" calcext:value-type="float">
            <text:p>0,86547403310161</text:p>
          </table:table-cell>
          <table:table-cell table:style-name="ce22" office:value-type="float" office:value="0.865474033101624" calcext:value-type="float">
            <text:p>0,865474033101624</text:p>
          </table:table-cell>
          <table:table-cell table:style-name="ce43" table:formula="of:=[.I133]-[.H133]" office:value-type="float" office:value="0.00000000000001398881" calcext:value-type="float">
            <text:p>1,3988810110277E-14</text:p>
          </table:table-cell>
          <table:table-cell table:style-name="ce22" office:value-type="float" office:value="0.86547403310161" calcext:value-type="float">
            <text:p>0,86547403310161</text:p>
          </table:table-cell>
          <table:table-cell table:style-name="ce22" office:value-type="float" office:value="0.865474033101615" calcext:value-type="float">
            <text:p>0,865474033101615</text:p>
          </table:table-cell>
          <table:table-cell table:style-name="ce48" table:formula="of:=[.L133]-[.K133]" office:value-type="float" office:value="4.9960036108132E-015" calcext:value-type="float">
            <text:p>4,996003610813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4</text:p>
          </table:table-cell>
          <table:table-cell table:style-name="ce14" office:value-type="float" office:value="0.73908513321516" calcext:value-type="float">
            <text:p>0,73908513321516</text:p>
          </table:table-cell>
          <table:table-cell table:style-name="ce22" office:value-type="float" office:value="0.739085133215168" calcext:value-type="float">
            <text:p>0,739085133215168</text:p>
          </table:table-cell>
          <table:table-cell table:style-name="ce32" table:formula="of:=[.C134]-[.B134]" office:value-type="float" office:value="7.99360577730113E-015" calcext:value-type="float">
            <text:p>7,99360577730113E-15</text:p>
          </table:table-cell>
          <table:table-cell table:style-name="ce22" office:value-type="float" office:value="0.73908513321516" calcext:value-type="float">
            <text:p>0,73908513321516</text:p>
          </table:table-cell>
          <table:table-cell table:style-name="ce22" office:value-type="float" office:value="0.739085133215161" calcext:value-type="float">
            <text:p>0,739085133215161</text:p>
          </table:table-cell>
          <table:table-cell table:style-name="ce37" table:formula="of:=[.F134]-[.E134]" office:value-type="float" office:value="0" calcext:value-type="float">
            <text:p>0</text:p>
          </table:table-cell>
          <table:table-cell table:style-name="ce14" office:value-type="float" office:value="0.73908513321516" calcext:value-type="float">
            <text:p>0,73908513321516</text:p>
          </table:table-cell>
          <table:table-cell table:style-name="ce22" office:value-type="float" office:value="0.739085133215152" calcext:value-type="float">
            <text:p>0,739085133215152</text:p>
          </table:table-cell>
          <table:table-cell table:style-name="ce43" table:formula="of:=[.I134]-[.H134]" office:value-type="float" office:value="-7.99360577730113E-015" calcext:value-type="float">
            <text:p>-7,99360577730113E-15</text:p>
          </table:table-cell>
          <table:table-cell table:style-name="ce22" office:value-type="float" office:value="0.73908513321516" calcext:value-type="float">
            <text:p>0,73908513321516</text:p>
          </table:table-cell>
          <table:table-cell table:style-name="ce22" office:value-type="float" office:value="0.739085133215161" calcext:value-type="float">
            <text:p>0,739085133215161</text:p>
          </table:table-cell>
          <table:table-cell table:style-name="ce48" table:formula="of:=[.L134]-[.K1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5</text:p>
          </table:table-cell>
          <table:table-cell table:style-name="ce14" office:value-type="float" office:value="0.65666666666667" calcext:value-type="float">
            <text:p>0,65666666666667</text:p>
          </table:table-cell>
          <table:table-cell table:style-name="ce22" office:value-type="float" office:value="0.656666666666675" calcext:value-type="float">
            <text:p>0,656666666666675</text:p>
          </table:table-cell>
          <table:table-cell table:style-name="ce32" table:formula="of:=[.C135]-[.B135]" office:value-type="float" office:value="4.9960036108132E-015" calcext:value-type="float">
            <text:p>4,9960036108132E-15</text:p>
          </table:table-cell>
          <table:table-cell table:style-name="ce22" office:value-type="float" office:value="0.65666666666667" calcext:value-type="float">
            <text:p>0,65666666666667</text:p>
          </table:table-cell>
          <table:table-cell table:style-name="ce22" office:value-type="float" office:value="0.656666666666667" calcext:value-type="float">
            <text:p>0,656666666666667</text:p>
          </table:table-cell>
          <table:table-cell table:style-name="ce37" table:formula="of:=[.F135]-[.E135]" office:value-type="float" office:value="-2.99760216648792E-015" calcext:value-type="float">
            <text:p>-2,99760216648792E-15</text:p>
          </table:table-cell>
          <table:table-cell table:style-name="ce14" office:value-type="float" office:value="0.65666666666667" calcext:value-type="float">
            <text:p>0,65666666666667</text:p>
          </table:table-cell>
          <table:table-cell table:style-name="ce22" office:value-type="float" office:value="0.656666666666675" calcext:value-type="float">
            <text:p>0,656666666666675</text:p>
          </table:table-cell>
          <table:table-cell table:style-name="ce43" table:formula="of:=[.I135]-[.H135]" office:value-type="float" office:value="4.9960036108132E-015" calcext:value-type="float">
            <text:p>4,9960036108132E-15</text:p>
          </table:table-cell>
          <table:table-cell table:style-name="ce22" office:value-type="float" office:value="0.65666666666667" calcext:value-type="float">
            <text:p>0,65666666666667</text:p>
          </table:table-cell>
          <table:table-cell table:style-name="ce22" office:value-type="float" office:value="0.656666666666667" calcext:value-type="float">
            <text:p>0,656666666666667</text:p>
          </table:table-cell>
          <table:table-cell table:style-name="ce48" table:formula="of:=[.L135]-[.K135]" office:value-type="float" office:value="-2.99760216648792E-015" calcext:value-type="float">
            <text:p>-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6</text:p>
          </table:table-cell>
          <table:table-cell table:style-name="ce14" office:value-type="float" office:value="0.66666666666667" calcext:value-type="float">
            <text:p>0,66666666666667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32" table:formula="of:=[.C136]-[.B136]" office:value-type="float" office:value="0" calcext:value-type="float">
            <text:p>0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22" office:value-type="float" office:value="0.666666666666665" calcext:value-type="float">
            <text:p>0,666666666666665</text:p>
          </table:table-cell>
          <table:table-cell table:style-name="ce37" table:formula="of:=[.F136]-[.E136]" office:value-type="float" office:value="-4.9960036108132E-015" calcext:value-type="float">
            <text:p>-4,9960036108132E-15</text:p>
          </table:table-cell>
          <table:table-cell table:style-name="ce14" office:value-type="float" office:value="0.66666666666667" calcext:value-type="float">
            <text:p>0,66666666666667</text:p>
          </table:table-cell>
          <table:table-cell table:style-name="ce22" office:value-type="float" office:value="0.666666666666662" calcext:value-type="float">
            <text:p>0,666666666666662</text:p>
          </table:table-cell>
          <table:table-cell table:style-name="ce43" table:formula="of:=[.I136]-[.H136]" office:value-type="float" office:value="-7.99360577730113E-015" calcext:value-type="float">
            <text:p>-7,99360577730113E-15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22" office:value-type="float" office:value="0.666666666666665" calcext:value-type="float">
            <text:p>0,666666666666665</text:p>
          </table:table-cell>
          <table:table-cell table:style-name="ce48" table:formula="of:=[.L136]-[.K136]" office:value-type="float" office:value="-4.9960036108132E-015" calcext:value-type="float">
            <text:p>-4,996003610813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7</text:p>
          </table:table-cell>
          <table:table-cell table:style-name="ce14" office:value-type="float" office:value="0.77777777777778" calcext:value-type="float">
            <text:p>0,77777777777778</text:p>
          </table:table-cell>
          <table:table-cell table:style-name="ce22" office:value-type="float" office:value="0.777777777777789" calcext:value-type="float">
            <text:p>0,777777777777789</text:p>
          </table:table-cell>
          <table:table-cell table:style-name="ce32" table:formula="of:=[.C137]-[.B137]" office:value-type="float" office:value="8.99280649946377E-015" calcext:value-type="float">
            <text:p>8,99280649946377E-15</text:p>
          </table:table-cell>
          <table:table-cell table:style-name="ce22" office:value-type="float" office:value="0.77777777777778" calcext:value-type="float">
            <text:p>0,77777777777778</text:p>
          </table:table-cell>
          <table:table-cell table:style-name="ce22" office:value-type="float" office:value="0.777777777777778" calcext:value-type="float">
            <text:p>0,777777777777778</text:p>
          </table:table-cell>
          <table:table-cell table:style-name="ce37" table:formula="of:=[.F137]-[.E137]" office:value-type="float" office:value="0" calcext:value-type="float">
            <text:p>0</text:p>
          </table:table-cell>
          <table:table-cell table:style-name="ce14" office:value-type="float" office:value="0.77777777777778" calcext:value-type="float">
            <text:p>0,77777777777778</text:p>
          </table:table-cell>
          <table:table-cell table:style-name="ce22" office:value-type="float" office:value="0.777777777777778" calcext:value-type="float">
            <text:p>0,777777777777778</text:p>
          </table:table-cell>
          <table:table-cell table:style-name="ce43" table:formula="of:=[.I137]-[.H137]" office:value-type="float" office:value="0" calcext:value-type="float">
            <text:p>0</text:p>
          </table:table-cell>
          <table:table-cell table:style-name="ce22" office:value-type="float" office:value="0.77777777777778" calcext:value-type="float">
            <text:p>0,77777777777778</text:p>
          </table:table-cell>
          <table:table-cell table:style-name="ce22" office:value-type="float" office:value="0.777777777777778" calcext:value-type="float">
            <text:p>0,777777777777778</text:p>
          </table:table-cell>
          <table:table-cell table:style-name="ce48" table:formula="of:=[.L137]-[.K1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8</text:p>
          </table:table-cell>
          <table:table-cell table:style-name="ce14" office:value-type="float" office:value="0.33333333333333" calcext:value-type="float">
            <text:p>0,33333333333333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32" table:formula="of:=[.C138]-[.B138]" office:value-type="float" office:value="6.99440505513849E-015" calcext:value-type="float">
            <text:p>6,99440505513849E-15</text:p>
          </table:table-cell>
          <table:table-cell table:style-name="ce22" office:value-type="float" office:value="0.33333333333334" calcext:value-type="float">
            <text:p>0,33333333333334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37" table:formula="of:=[.F138]-[.E138]" office:value-type="float" office:value="-2.99760216648792E-015" calcext:value-type="float">
            <text:p>-2,99760216648792E-15</text:p>
          </table:table-cell>
          <table:table-cell table:style-name="ce14" office:value-type="float" office:value="0.33333333333333" calcext:value-type="float">
            <text:p>0,33333333333333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43" table:formula="of:=[.I138]-[.H138]" office:value-type="float" office:value="6.99440505513849E-015" calcext:value-type="float">
            <text:p>6,99440505513849E-15</text:p>
          </table:table-cell>
          <table:table-cell table:style-name="ce22" office:value-type="float" office:value="0.33333333333333" calcext:value-type="float">
            <text:p>0,33333333333333</text:p>
          </table:table-cell>
          <table:table-cell table:style-name="ce22" office:value-type="float" office:value="0.333333333333333" calcext:value-type="float">
            <text:p>0,333333333333333</text:p>
          </table:table-cell>
          <table:table-cell table:style-name="ce48" table:formula="of:=[.L138]-[.K138]" office:value-type="float" office:value="2.99760216648792E-015" calcext:value-type="float">
            <text:p>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39</text:p>
          </table:table-cell>
          <table:table-cell table:style-name="ce14" office:value-type="float" office:value="0.33333333333333" calcext:value-type="float">
            <text:p>0,33333333333333</text:p>
          </table:table-cell>
          <table:table-cell table:style-name="ce22" office:value-type="float" office:value="0.333333333333337" calcext:value-type="float">
            <text:p>0,333333333333337</text:p>
          </table:table-cell>
          <table:table-cell table:style-name="ce32" table:formula="of:=[.C139]-[.B139]" office:value-type="float" office:value="6.99440505513849E-015" calcext:value-type="float">
            <text:p>6,99440505513849E-15</text:p>
          </table:table-cell>
          <table:table-cell table:style-name="ce22" office:value-type="float" office:value="0.33333333333333" calcext:value-type="float">
            <text:p>0,33333333333333</text:p>
          </table:table-cell>
          <table:table-cell table:style-name="ce22" office:value-type="float" office:value="0.333333333333333" calcext:value-type="float">
            <text:p>0,333333333333333</text:p>
          </table:table-cell>
          <table:table-cell table:style-name="ce37" table:formula="of:=[.F139]-[.E139]" office:value-type="float" office:value="2.99760216648792E-015" calcext:value-type="float">
            <text:p>2,99760216648792E-15</text:p>
          </table:table-cell>
          <table:table-cell table:style-name="ce14" office:value-type="float" office:value="0.33333333332992" calcext:value-type="float">
            <text:p>0,33333333332992</text:p>
          </table:table-cell>
          <table:table-cell table:style-name="ce22" office:value-type="float" office:value="0.333333333333334" calcext:value-type="float">
            <text:p>0,333333333333334</text:p>
          </table:table-cell>
          <table:table-cell table:style-name="ce43" table:formula="of:=[.I139]-[.H139]" office:value-type="float" office:value="0.00000000000341399131" calcext:value-type="float">
            <text:p>3,41399131187359E-12</text:p>
          </table:table-cell>
          <table:table-cell table:style-name="ce22" office:value-type="float" office:value="0.33333333333333" calcext:value-type="float">
            <text:p>0,33333333333333</text:p>
          </table:table-cell>
          <table:table-cell table:style-name="ce22" office:value-type="float" office:value="0.333333333333333" calcext:value-type="float">
            <text:p>0,333333333333333</text:p>
          </table:table-cell>
          <table:table-cell table:style-name="ce48" table:formula="of:=[.L139]-[.K139]" office:value-type="float" office:value="2.99760216648792E-015" calcext:value-type="float">
            <text:p>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0</text:p>
          </table:table-cell>
          <table:table-cell table:style-name="ce14" office:value-type="float" office:value="0.66666666666666" calcext:value-type="float">
            <text:p>0,66666666666666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32" table:formula="of:=[.C140]-[.B140]" office:value-type="float" office:value="9.99200722162641E-015" calcext:value-type="float">
            <text:p>9,99200722162641E-15</text:p>
          </table:table-cell>
          <table:table-cell table:style-name="ce22" office:value-type="float" office:value="0.66666666666666" calcext:value-type="float">
            <text:p>0,66666666666666</text:p>
          </table:table-cell>
          <table:table-cell table:style-name="ce22" office:value-type="float" office:value="0.666666666666657" calcext:value-type="float">
            <text:p>0,666666666666657</text:p>
          </table:table-cell>
          <table:table-cell table:style-name="ce37" table:formula="of:=[.F140]-[.E140]" office:value-type="float" office:value="-2.99760216648792E-015" calcext:value-type="float">
            <text:p>-2,99760216648792E-15</text:p>
          </table:table-cell>
          <table:table-cell table:style-name="ce14" office:value-type="float" office:value="0.66666666666513" calcext:value-type="float">
            <text:p>0,66666666666513</text:p>
          </table:table-cell>
          <table:table-cell table:style-name="ce22" office:value-type="float" office:value="0.66666666666668" calcext:value-type="float">
            <text:p>0,66666666666668</text:p>
          </table:table-cell>
          <table:table-cell table:style-name="ce43" table:formula="of:=[.I140]-[.H140]" office:value-type="float" office:value="0.00000000000154998236" calcext:value-type="float">
            <text:p>1,54998236467918E-12</text:p>
          </table:table-cell>
          <table:table-cell table:style-name="ce22" office:value-type="float" office:value="0.66666666666667" calcext:value-type="float">
            <text:p>0,66666666666667</text:p>
          </table:table-cell>
          <table:table-cell table:style-name="ce22" office:value-type="float" office:value="0.666666666666665" calcext:value-type="float">
            <text:p>0,666666666666665</text:p>
          </table:table-cell>
          <table:table-cell table:style-name="ce48" table:formula="of:=[.L140]-[.K140]" office:value-type="float" office:value="-4.9960036108132E-015" calcext:value-type="float">
            <text:p>-4,996003610813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1</text:p>
          </table:table-cell>
          <table:table-cell table:style-name="ce14" office:value-type="float" office:value="0.13825715505682" calcext:value-type="float">
            <text:p>0,13825715505682</text:p>
          </table:table-cell>
          <table:table-cell table:style-name="ce22" office:value-type="float" office:value="0.138257155056829" calcext:value-type="float">
            <text:p>0,138257155056829</text:p>
          </table:table-cell>
          <table:table-cell table:style-name="ce32" table:formula="of:=[.C141]-[.B141]" office:value-type="float" office:value="8.99280649946377E-015" calcext:value-type="float">
            <text:p>8,99280649946377E-15</text:p>
          </table:table-cell>
          <table:table-cell table:style-name="ce22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37" table:formula="of:=[.F141]-[.E141]" office:value-type="float" office:value="3.99680288865056E-015" calcext:value-type="float">
            <text:p>3,99680288865056E-15</text:p>
          </table:table-cell>
          <table:table-cell table:style-name="ce14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43" table:formula="of:=[.I141]-[.H141]" office:value-type="float" office:value="3.99680288865056E-015" calcext:value-type="float">
            <text:p>3,99680288865056E-15</text:p>
          </table:table-cell>
          <table:table-cell table:style-name="ce22" office:value-type="float" office:value="0.13825715505682" calcext:value-type="float">
            <text:p>0,13825715505682</text:p>
          </table:table-cell>
          <table:table-cell table:style-name="ce22" office:value-type="float" office:value="0.138257155056824" calcext:value-type="float">
            <text:p>0,138257155056824</text:p>
          </table:table-cell>
          <table:table-cell table:style-name="ce48" table:formula="of:=[.L141]-[.K141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2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.00000000000001" calcext:value-type="float">
            <text:p>1,00000000000001</text:p>
          </table:table-cell>
          <table:table-cell table:style-name="ce32" table:formula="of:=[.C142]-[.B142]" office:value-type="float" office:value="9.99200722162641E-015" calcext:value-type="float">
            <text:p>9,99200722162641E-1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7" table:formula="of:=[.F142]-[.E142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0.999999999999996" calcext:value-type="float">
            <text:p>0,999999999999996</text:p>
          </table:table-cell>
          <table:table-cell table:style-name="ce43" table:formula="of:=[.I142]-[.H142]" office:value-type="float" office:value="-3.99680288865056E-015" calcext:value-type="float">
            <text:p>-3,99680288865056E-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8" table:formula="of:=[.L142]-[.K1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3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32" table:formula="of:=[.C143]-[.B143]" office:value-type="float" office:value="5.32907051820075E-015" calcext:value-type="float">
            <text:p>5,32907051820075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-0.00000000000156195194" calcext:value-type="float">
            <text:p>-1,56E-12</text:p>
          </table:table-cell>
          <table:table-cell table:style-name="ce37" table:formula="of:=[.F143]-[.E143]" office:value-type="float" office:value="-0.00000000000156195194" calcext:value-type="float">
            <text:p>-1,56195193564074E-12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-2.12387949773817E-015" calcext:value-type="float">
            <text:p>-2,12E-15</text:p>
          </table:table-cell>
          <table:table-cell table:style-name="ce43" table:formula="of:=[.I143]-[.H143]" office:value-type="float" office:value="-2.12387949773817E-015" calcext:value-type="float">
            <text:p>-2,12387949773817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8.88178419700125E-016" calcext:value-type="float">
            <text:p>8,88E-16</text:p>
          </table:table-cell>
          <table:table-cell table:style-name="ce48" table:formula="of:=[.L143]-[.K143]" office:value-type="float" office:value="8.88178419700125E-016" calcext:value-type="float">
            <text:p>8,88178419700125E-16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44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32" table:formula="of:=[.C144]-[.B144]" office:value-type="float" office:value="5.32907051820075E-015" calcext:value-type="float">
            <text:p>5,32907051820075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-0.00000000000562655576" calcext:value-type="float">
            <text:p>-5,63E-12</text:p>
          </table:table-cell>
          <table:table-cell table:style-name="ce37" table:formula="of:=[.F144]-[.E144]" office:value-type="float" office:value="-0.00000000000562655576" calcext:value-type="float">
            <text:p>-5,6265557596109E-12</text:p>
          </table:table-cell>
          <table:table-cell table:style-name="ce14" office:value-type="float" office:value="-0.00000000000637" calcext:value-type="float">
            <text:p>-6,37E-12</text:p>
          </table:table-cell>
          <table:table-cell table:style-name="ce24" office:value-type="float" office:value="4.20695920926843E-015" calcext:value-type="float">
            <text:p>4,21E-15</text:p>
          </table:table-cell>
          <table:table-cell table:style-name="ce43" table:formula="of:=[.I144]-[.H144]" office:value-type="float" office:value="0.00000000000637420696" calcext:value-type="float">
            <text:p>6,37420695920927E-1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8.88178419700125E-016" calcext:value-type="float">
            <text:p>8,88E-16</text:p>
          </table:table-cell>
          <table:table-cell table:style-name="ce48" table:formula="of:=[.L144]-[.K144]" office:value-type="float" office:value="8.88178419700125E-016" calcext:value-type="float">
            <text:p>8,88178419700125E-16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45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32" table:formula="of:=[.C145]-[.B145]" office:value-type="float" office:value="5.32907051820075E-015" calcext:value-type="float">
            <text:p>5,32907051820075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.00000000002756144877" calcext:value-type="float">
            <text:p>2,76E-11</text:p>
          </table:table-cell>
          <table:table-cell table:style-name="ce37" table:formula="of:=[.F145]-[.E145]" office:value-type="float" office:value="0.00000000002756144877" calcext:value-type="float">
            <text:p>2,75614487660748E-11</text:p>
          </table:table-cell>
          <table:table-cell table:style-name="ce14" office:value-type="float" office:value="-0.00000000007139" calcext:value-type="float">
            <text:p>-7,139E-11</text:p>
          </table:table-cell>
          <table:table-cell table:style-name="ce24" office:value-type="float" office:value="-4.80793901704554E-015" calcext:value-type="float">
            <text:p>-4,81E-15</text:p>
          </table:table-cell>
          <table:table-cell table:style-name="ce43" table:formula="of:=[.I145]-[.H145]" office:value-type="float" office:value="0.00000000007138519206" calcext:value-type="float">
            <text:p>7,1385192060983E-1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8.88178419700125E-016" calcext:value-type="float">
            <text:p>8,88E-16</text:p>
          </table:table-cell>
          <table:table-cell table:style-name="ce48" table:formula="of:=[.L145]-[.K145]" office:value-type="float" office:value="8.88178419700125E-016" calcext:value-type="float">
            <text:p>8,88178419700125E-16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46</text:p>
          </table:table-cell>
          <table:table-cell table:style-name="ce14" office:value-type="float" office:value="0.10162439229355" calcext:value-type="float">
            <text:p>0,10162439229355</text:p>
          </table:table-cell>
          <table:table-cell table:style-name="ce22" office:value-type="float" office:value="0.101624392293545" calcext:value-type="float">
            <text:p>0,101624392293545</text:p>
          </table:table-cell>
          <table:table-cell table:style-name="ce32" table:formula="of:=[.C146]-[.B146]" office:value-type="float" office:value="-4.9960036108132E-015" calcext:value-type="float">
            <text:p>-4,9960036108132E-15</text:p>
          </table:table-cell>
          <table:table-cell table:number-columns-repeated="2" table:style-name="ce22" office:value-type="float" office:value="0.10162439229355" calcext:value-type="float">
            <text:p>0,10162439229355</text:p>
          </table:table-cell>
          <table:table-cell table:style-name="ce37" table:formula="of:=[.F146]-[.E146]" office:value-type="float" office:value="0" calcext:value-type="float">
            <text:p>0</text:p>
          </table:table-cell>
          <table:table-cell table:style-name="ce14" office:value-type="float" office:value="0.10162439229355" calcext:value-type="float">
            <text:p>0,10162439229355</text:p>
          </table:table-cell>
          <table:table-cell table:style-name="ce22" office:value-type="float" office:value="0.10162439229355" calcext:value-type="float">
            <text:p>0,10162439229355</text:p>
          </table:table-cell>
          <table:table-cell table:style-name="ce43" table:formula="of:=[.I146]-[.H146]" office:value-type="float" office:value="0" calcext:value-type="float">
            <text:p>0</text:p>
          </table:table-cell>
          <table:table-cell table:number-columns-repeated="2" table:style-name="ce22" office:value-type="float" office:value="0.10162439229355" calcext:value-type="float">
            <text:p>0,10162439229355</text:p>
          </table:table-cell>
          <table:table-cell table:style-name="ce48" table:formula="of:=[.L146]-[.K1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7</text:p>
          </table:table-cell>
          <table:table-cell table:style-name="ce14" office:value-type="float" office:value="0.00773252320061" calcext:value-type="float">
            <text:p>0,00773252320061</text:p>
          </table:table-cell>
          <table:table-cell table:style-name="ce22" office:value-type="float" office:value="0.00773252320060808" calcext:value-type="float">
            <text:p>0,00773252320060808</text:p>
          </table:table-cell>
          <table:table-cell table:style-name="ce32" table:formula="of:=[.C147]-[.B147]" office:value-type="float" office:value="-1.91947152616834E-015" calcext:value-type="float">
            <text:p>-1,91947152616834E-15</text:p>
          </table:table-cell>
          <table:table-cell table:style-name="ce22" office:value-type="float" office:value="0.00773252320061" calcext:value-type="float">
            <text:p>0,00773252320061</text:p>
          </table:table-cell>
          <table:table-cell table:style-name="ce22" office:value-type="float" office:value="0.0077325232006128" calcext:value-type="float">
            <text:p>0,0077325232006128</text:p>
          </table:table-cell>
          <table:table-cell table:style-name="ce37" table:formula="of:=[.F147]-[.E147]" office:value-type="float" office:value="2.79984369022657E-015" calcext:value-type="float">
            <text:p>2,79984369022657E-15</text:p>
          </table:table-cell>
          <table:table-cell table:style-name="ce14" office:value-type="float" office:value="0.00773252320061" calcext:value-type="float">
            <text:p>0,00773252320061</text:p>
          </table:table-cell>
          <table:table-cell table:style-name="ce22" office:value-type="float" office:value="0.00773252320061165" calcext:value-type="float">
            <text:p>0,00773252320061165</text:p>
          </table:table-cell>
          <table:table-cell table:style-name="ce43" table:formula="of:=[.I147]-[.H147]" office:value-type="float" office:value="1.65058938739193E-015" calcext:value-type="float">
            <text:p>1,65058938739193E-15</text:p>
          </table:table-cell>
          <table:table-cell table:style-name="ce22" office:value-type="float" office:value="0.00773252320061" calcext:value-type="float">
            <text:p>0,00773252320061</text:p>
          </table:table-cell>
          <table:table-cell table:style-name="ce22" office:value-type="float" office:value="0.0077325232006128" calcext:value-type="float">
            <text:p>0,0077325232006128</text:p>
          </table:table-cell>
          <table:table-cell table:style-name="ce48" table:formula="of:=[.L147]-[.K147]" office:value-type="float" office:value="2.79984369022657E-015" calcext:value-type="float">
            <text:p>2,79984369022657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8</text:p>
          </table:table-cell>
          <table:table-cell table:style-name="ce14" office:value-type="float" office:value="0.00127630494574" calcext:value-type="float">
            <text:p>0,00127630494574</text:p>
          </table:table-cell>
          <table:table-cell table:style-name="ce22" office:value-type="float" office:value="0.00127630494573219" calcext:value-type="float">
            <text:p>0,00127630494573219</text:p>
          </table:table-cell>
          <table:table-cell table:style-name="ce32" table:formula="of:=[.C148]-[.B148]" office:value-type="float" office:value="-7.80994192928208E-015" calcext:value-type="float">
            <text:p>-7,80994192928208E-15</text:p>
          </table:table-cell>
          <table:table-cell table:style-name="ce22" office:value-type="float" office:value="0.00127630494574" calcext:value-type="float">
            <text:p>0,00127630494574</text:p>
          </table:table-cell>
          <table:table-cell table:style-name="ce22" office:value-type="float" office:value="0.00127630494573559" calcext:value-type="float">
            <text:p>0,00127630494573559</text:p>
          </table:table-cell>
          <table:table-cell table:style-name="ce37" table:formula="of:=[.F148]-[.E148]" office:value-type="float" office:value="-4.41010075680204E-015" calcext:value-type="float">
            <text:p>-4,41010075680204E-15</text:p>
          </table:table-cell>
          <table:table-cell table:style-name="ce14" office:value-type="float" office:value="0.00127630494574" calcext:value-type="float">
            <text:p>0,00127630494574</text:p>
          </table:table-cell>
          <table:table-cell table:style-name="ce22" office:value-type="float" office:value="0.00127630494574057" calcext:value-type="float">
            <text:p>0,00127630494574057</text:p>
          </table:table-cell>
          <table:table-cell table:style-name="ce43" table:formula="of:=[.I148]-[.H148]" office:value-type="float" office:value="5.70073502292878E-016" calcext:value-type="float">
            <text:p>5,70073502292878E-16</text:p>
          </table:table-cell>
          <table:table-cell table:style-name="ce22" office:value-type="float" office:value="0.00127630494574" calcext:value-type="float">
            <text:p>0,00127630494574</text:p>
          </table:table-cell>
          <table:table-cell table:style-name="ce22" office:value-type="float" office:value="0.00127630494573556" calcext:value-type="float">
            <text:p>0,00127630494573556</text:p>
          </table:table-cell>
          <table:table-cell table:style-name="ce48" table:formula="of:=[.L148]-[.K148]" office:value-type="float" office:value="-4.44002473676264E-015" calcext:value-type="float">
            <text:p>-4,44002473676264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49</text:p>
          </table:table-cell>
          <table:table-cell table:style-name="ce14" office:value-type="float" office:value="-0.68232780382802" calcext:value-type="float">
            <text:p>-0,68232780382802</text:p>
          </table:table-cell>
          <table:table-cell table:style-name="ce22" office:value-type="float" office:value="-0.682327803828016" calcext:value-type="float">
            <text:p>-0,682327803828016</text:p>
          </table:table-cell>
          <table:table-cell table:style-name="ce32" table:formula="of:=[.C149]-[.B149]" office:value-type="float" office:value="3.99680288865056E-015" calcext:value-type="float">
            <text:p>3,99680288865056E-15</text:p>
          </table:table-cell>
          <table:table-cell table:style-name="ce22" office:value-type="float" office:value="-0.68232780382802" calcext:value-type="float">
            <text:p>-0,68232780382802</text:p>
          </table:table-cell>
          <table:table-cell table:style-name="ce22" office:value-type="float" office:value="-0.682327803828019" calcext:value-type="float">
            <text:p>-0,682327803828019</text:p>
          </table:table-cell>
          <table:table-cell table:style-name="ce37" table:formula="of:=[.F149]-[.E149]" office:value-type="float" office:value="0" calcext:value-type="float">
            <text:p>0</text:p>
          </table:table-cell>
          <table:table-cell table:style-name="ce14" office:value-type="float" office:value="-0.68232780382802" calcext:value-type="float">
            <text:p>-0,68232780382802</text:p>
          </table:table-cell>
          <table:table-cell table:style-name="ce22" office:value-type="float" office:value="-0.68232780382802" calcext:value-type="float">
            <text:p>-0,68232780382802</text:p>
          </table:table-cell>
          <table:table-cell table:style-name="ce43" table:formula="of:=[.I149]-[.H149]" office:value-type="float" office:value="0" calcext:value-type="float">
            <text:p>0</text:p>
          </table:table-cell>
          <table:table-cell table:style-name="ce22" office:value-type="float" office:value="-0.68232780382802" calcext:value-type="float">
            <text:p>-0,68232780382802</text:p>
          </table:table-cell>
          <table:table-cell table:style-name="ce22" office:value-type="float" office:value="-0.682327803828019" calcext:value-type="float">
            <text:p>-0,682327803828019</text:p>
          </table:table-cell>
          <table:table-cell table:style-name="ce48" table:formula="of:=[.L149]-[.K1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0</text:p>
          </table:table-cell>
          <table:table-cell table:style-name="ce14" office:value-type="float" office:value="-2.10380340273553" calcext:value-type="float">
            <text:p>-2,10380340273553</text:p>
          </table:table-cell>
          <table:table-cell table:style-name="ce22" office:value-type="float" office:value="-2.10380340273553" calcext:value-type="float">
            <text:p>-2,10380340273553</text:p>
          </table:table-cell>
          <table:table-cell table:style-name="ce32" table:formula="of:=[.C150]-[.B150]" office:value-type="float" office:value="0" calcext:value-type="float">
            <text:p>0</text:p>
          </table:table-cell>
          <table:table-cell table:style-name="ce22" office:value-type="float" office:value="-2.10380340273553" calcext:value-type="float">
            <text:p>-2,10380340273553</text:p>
          </table:table-cell>
          <table:table-cell table:style-name="ce22" office:value-type="float" office:value="-2.10380340273554" calcext:value-type="float">
            <text:p>-2,10380340273554</text:p>
          </table:table-cell>
          <table:table-cell table:style-name="ce37" table:formula="of:=[.F150]-[.E150]" office:value-type="float" office:value="-0.00000000000001021405" calcext:value-type="float">
            <text:p>-1,02140518265514E-14</text:p>
          </table:table-cell>
          <table:table-cell table:style-name="ce14" office:value-type="float" office:value="-2.10380340273553" calcext:value-type="float">
            <text:p>-2,10380340273553</text:p>
          </table:table-cell>
          <table:table-cell table:style-name="ce22" office:value-type="float" office:value="-2.10380340273554" calcext:value-type="float">
            <text:p>-2,10380340273554</text:p>
          </table:table-cell>
          <table:table-cell table:style-name="ce43" table:formula="of:=[.I150]-[.H150]" office:value-type="float" office:value="-0.00000000000001021405" calcext:value-type="float">
            <text:p>-1,02140518265514E-14</text:p>
          </table:table-cell>
          <table:table-cell table:style-name="ce22" office:value-type="float" office:value="-2.10380340273553" calcext:value-type="float">
            <text:p>-2,10380340273553</text:p>
          </table:table-cell>
          <table:table-cell table:style-name="ce22" office:value-type="float" office:value="-2.10380340273554" calcext:value-type="float">
            <text:p>-2,10380340273554</text:p>
          </table:table-cell>
          <table:table-cell table:style-name="ce48" table:formula="of:=[.L150]-[.K150]" office:value-type="float" office:value="-0.00000000000001021405" calcext:value-type="float">
            <text:p>-1,02140518265514E-1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0.999999999999998" calcext:value-type="float">
            <text:p>0,999999999999998</text:p>
          </table:table-cell>
          <table:table-cell table:style-name="ce32" table:formula="of:=[.C151]-[.B151]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7" table:formula="of:=[.F151]-[.E151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.00000000000001" calcext:value-type="float">
            <text:p>1,00000000000001</text:p>
          </table:table-cell>
          <table:table-cell table:style-name="ce43" table:formula="of:=[.I151]-[.H151]" office:value-type="float" office:value="9.99200722162641E-015" calcext:value-type="float">
            <text:p>9,99200722162641E-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8" table:formula="of:=[.L151]-[.K1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2</text:p>
          </table:table-cell>
          <table:table-cell table:style-name="ce14" office:value-type="float" office:value="1.00004083556472" calcext:value-type="float">
            <text:p>1,00004083556472</text:p>
          </table:table-cell>
          <table:table-cell table:style-name="ce22" office:value-type="float" office:value="1.00004083556473" calcext:value-type="float">
            <text:p>1,00004083556473</text:p>
          </table:table-cell>
          <table:table-cell table:style-name="ce32" table:formula="of:=[.C152]-[.B152]" office:value-type="float" office:value="9.99200722162641E-015" calcext:value-type="float">
            <text:p>9,99200722162641E-15</text:p>
          </table:table-cell>
          <table:table-cell table:style-name="ce22" office:value-type="float" office:value="1.00004083556472" calcext:value-type="float">
            <text:p>1,00004083556472</text:p>
          </table:table-cell>
          <table:table-cell table:style-name="ce22" office:value-type="float" office:value="1.00004083556473" calcext:value-type="float">
            <text:p>1,00004083556473</text:p>
          </table:table-cell>
          <table:table-cell table:style-name="ce37" table:formula="of:=[.F152]-[.E152]" office:value-type="float" office:value="9.99200722162641E-015" calcext:value-type="float">
            <text:p>9,99200722162641E-15</text:p>
          </table:table-cell>
          <table:table-cell table:style-name="ce14" office:value-type="float" office:value="1.00004083556472" calcext:value-type="float">
            <text:p>1,00004083556472</text:p>
          </table:table-cell>
          <table:table-cell table:style-name="ce22" office:value-type="float" office:value="1.00004083556472" calcext:value-type="float">
            <text:p>1,00004083556472</text:p>
          </table:table-cell>
          <table:table-cell table:style-name="ce43" table:formula="of:=[.I152]-[.H152]" office:value-type="float" office:value="0" calcext:value-type="float">
            <text:p>0</text:p>
          </table:table-cell>
          <table:table-cell table:style-name="ce22" office:value-type="float" office:value="1.00004083556472" calcext:value-type="float">
            <text:p>1,00004083556472</text:p>
          </table:table-cell>
          <table:table-cell table:style-name="ce22" office:value-type="float" office:value="1.00004083556473" calcext:value-type="float">
            <text:p>1,00004083556473</text:p>
          </table:table-cell>
          <table:table-cell table:style-name="ce48" table:formula="of:=[.L152]-[.K152]" office:value-type="float" office:value="9.99200722162641E-015" calcext:value-type="float">
            <text:p>9,99200722162641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3</text:p>
          </table:table-cell>
          <table:table-cell table:style-name="ce14" office:value-type="float" office:value="1.69681238680975" calcext:value-type="float">
            <text:p>1,69681238680975</text:p>
          </table:table-cell>
          <table:table-cell table:style-name="ce22" office:value-type="float" office:value="1.69681238680975" calcext:value-type="float">
            <text:p>1,69681238680975</text:p>
          </table:table-cell>
          <table:table-cell table:style-name="ce32" table:formula="of:=[.C153]-[.B153]" office:value-type="float" office:value="0" calcext:value-type="float">
            <text:p>0</text:p>
          </table:table-cell>
          <table:table-cell table:number-columns-repeated="2" table:style-name="ce22" office:value-type="float" office:value="1.69681238680975" calcext:value-type="float">
            <text:p>1,69681238680975</text:p>
          </table:table-cell>
          <table:table-cell table:style-name="ce37" table:formula="of:=[.F153]-[.E153]" office:value-type="float" office:value="0" calcext:value-type="float">
            <text:p>0</text:p>
          </table:table-cell>
          <table:table-cell table:style-name="ce14" office:value-type="float" office:value="1.69681238680975" calcext:value-type="float">
            <text:p>1,69681238680975</text:p>
          </table:table-cell>
          <table:table-cell table:style-name="ce22" office:value-type="float" office:value="1.69681238680974" calcext:value-type="float">
            <text:p>1,69681238680974</text:p>
          </table:table-cell>
          <table:table-cell table:style-name="ce43" table:formula="of:=[.I153]-[.H153]" office:value-type="float" office:value="-9.99200722162641E-015" calcext:value-type="float">
            <text:p>-9,99200722162641E-15</text:p>
          </table:table-cell>
          <table:table-cell table:number-columns-repeated="2" table:style-name="ce22" office:value-type="float" office:value="1.69681238680975" calcext:value-type="float">
            <text:p>1,69681238680975</text:p>
          </table:table-cell>
          <table:table-cell table:style-name="ce48" table:formula="of:=[.L153]-[.K1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4</text:p>
          </table:table-cell>
          <table:table-cell table:style-name="ce14" office:value-type="float" office:value="0.5235987755983" calcext:value-type="float">
            <text:p>0,5235987755983</text:p>
          </table:table-cell>
          <table:table-cell table:style-name="ce22" office:value-type="float" office:value="0.523598775598306" calcext:value-type="float">
            <text:p>0,523598775598306</text:p>
          </table:table-cell>
          <table:table-cell table:style-name="ce32" table:formula="of:=[.C154]-[.B154]" office:value-type="float" office:value="5.99520433297584E-015" calcext:value-type="float">
            <text:p>5,99520433297584E-15</text:p>
          </table:table-cell>
          <table:table-cell table:style-name="ce22" office:value-type="float" office:value="0.5235987755983" calcext:value-type="float">
            <text:p>0,5235987755983</text:p>
          </table:table-cell>
          <table:table-cell table:style-name="ce22" office:value-type="float" office:value="0.523598775598299" calcext:value-type="float">
            <text:p>0,523598775598299</text:p>
          </table:table-cell>
          <table:table-cell table:style-name="ce37" table:formula="of:=[.F154]-[.E154]" office:value-type="float" office:value="0" calcext:value-type="float">
            <text:p>0</text:p>
          </table:table-cell>
          <table:table-cell table:style-name="ce14" office:value-type="float" office:value="0.5235987755983" calcext:value-type="float">
            <text:p>0,5235987755983</text:p>
          </table:table-cell>
          <table:table-cell table:style-name="ce22" office:value-type="float" office:value="0.523598775598306" calcext:value-type="float">
            <text:p>0,523598775598306</text:p>
          </table:table-cell>
          <table:table-cell table:style-name="ce43" table:formula="of:=[.I154]-[.H154]" office:value-type="float" office:value="5.99520433297584E-015" calcext:value-type="float">
            <text:p>5,99520433297584E-15</text:p>
          </table:table-cell>
          <table:table-cell table:style-name="ce22" office:value-type="float" office:value="0.5235987755983" calcext:value-type="float">
            <text:p>0,5235987755983</text:p>
          </table:table-cell>
          <table:table-cell table:style-name="ce22" office:value-type="float" office:value="0.523598775598299" calcext:value-type="float">
            <text:p>0,523598775598299</text:p>
          </table:table-cell>
          <table:table-cell table:style-name="ce48" table:formula="of:=[.L154]-[.K1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5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0.999999999999996" calcext:value-type="float">
            <text:p>0,999999999999996</text:p>
          </table:table-cell>
          <table:table-cell table:style-name="ce32" table:formula="of:=[.C155]-[.B155]" office:value-type="float" office:value="-3.99680288865056E-015" calcext:value-type="float">
            <text:p>-3,99680288865056E-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999999999999997" calcext:value-type="float">
            <text:p>0,999999999999997</text:p>
          </table:table-cell>
          <table:table-cell table:style-name="ce37" table:formula="of:=[.F155]-[.E155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43" table:formula="of:=[.I155]-[.H155]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8" table:formula="of:=[.L155]-[.K1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6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.99999999999999" calcext:value-type="float">
            <text:p>1,99999999999999</text:p>
          </table:table-cell>
          <table:table-cell table:style-name="ce32" table:formula="of:=[.C156]-[.B156]" office:value-type="float" office:value="-9.99200722162641E-015" calcext:value-type="float">
            <text:p>-9,99200722162641E-1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7" table:formula="of:=[.F156]-[.E156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2.00000000000001" calcext:value-type="float">
            <text:p>2,00000000000001</text:p>
          </table:table-cell>
          <table:table-cell table:style-name="ce43" table:formula="of:=[.I156]-[.H156]" office:value-type="float" office:value="0.00000000000001021405" calcext:value-type="float">
            <text:p>1,02140518265514E-1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48" table:formula="of:=[.L156]-[.K1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7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float" office:value="2.99999999999999" calcext:value-type="float">
            <text:p>2,99999999999999</text:p>
          </table:table-cell>
          <table:table-cell table:style-name="ce32" table:formula="of:=[.C157]-[.B157]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7" table:formula="of:=[.F157]-[.E157]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float" office:value="2.99999999999998" calcext:value-type="float">
            <text:p>2,99999999999998</text:p>
          </table:table-cell>
          <table:table-cell table:style-name="ce43" table:formula="of:=[.I157]-[.H157]" office:value-type="float" office:value="-0.00000000000001998401" calcext:value-type="float">
            <text:p>-1,99840144432528E-1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48" table:formula="of:=[.L157]-[.K1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8</text:p>
          </table:table-cell>
          <table:table-cell table:style-name="ce14" office:value-type="float" office:value="1.5574077246549" calcext:value-type="float">
            <text:p>1,5574077246549</text:p>
          </table:table-cell>
          <table:table-cell table:style-name="ce22" office:value-type="float" office:value="1.55740772465489" calcext:value-type="float">
            <text:p>1,55740772465489</text:p>
          </table:table-cell>
          <table:table-cell table:style-name="ce32" table:formula="of:=[.C158]-[.B158]" office:value-type="float" office:value="-9.99200722162641E-015" calcext:value-type="float">
            <text:p>-9,99200722162641E-15</text:p>
          </table:table-cell>
          <table:table-cell table:number-columns-repeated="2" table:style-name="ce22" office:value-type="float" office:value="1.5574077246549" calcext:value-type="float">
            <text:p>1,5574077246549</text:p>
          </table:table-cell>
          <table:table-cell table:style-name="ce37" table:formula="of:=[.F158]-[.E158]" office:value-type="float" office:value="0" calcext:value-type="float">
            <text:p>0</text:p>
          </table:table-cell>
          <table:table-cell table:style-name="ce14" office:value-type="float" office:value="1.5574077246549" calcext:value-type="float">
            <text:p>1,5574077246549</text:p>
          </table:table-cell>
          <table:table-cell table:style-name="ce22" office:value-type="float" office:value="1.5574077246549" calcext:value-type="float">
            <text:p>1,5574077246549</text:p>
          </table:table-cell>
          <table:table-cell table:style-name="ce43" table:formula="of:=[.I158]-[.H158]" office:value-type="float" office:value="0" calcext:value-type="float">
            <text:p>0</text:p>
          </table:table-cell>
          <table:table-cell table:number-columns-repeated="2" table:style-name="ce22" office:value-type="float" office:value="1.5574077246549" calcext:value-type="float">
            <text:p>1,5574077246549</text:p>
          </table:table-cell>
          <table:table-cell table:style-name="ce48" table:formula="of:=[.L158]-[.K1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59</text:p>
          </table:table-cell>
          <table:table-cell table:style-name="ce14" office:value-type="float" office:value="1.25643120862616" calcext:value-type="float">
            <text:p>1,25643120862616</text:p>
          </table:table-cell>
          <table:table-cell table:style-name="ce22" office:value-type="float" office:value="1.25643120862617" calcext:value-type="float">
            <text:p>1,25643120862617</text:p>
          </table:table-cell>
          <table:table-cell table:style-name="ce32" table:formula="of:=[.C159]-[.B159]" office:value-type="float" office:value="9.99200722162641E-015" calcext:value-type="float">
            <text:p>9,99200722162641E-15</text:p>
          </table:table-cell>
          <table:table-cell table:style-name="ce22" office:value-type="float" office:value="1.25643120862616" calcext:value-type="float">
            <text:p>1,25643120862616</text:p>
          </table:table-cell>
          <table:table-cell table:style-name="ce22" office:value-type="float" office:value="1.25643120862617" calcext:value-type="float">
            <text:p>1,25643120862617</text:p>
          </table:table-cell>
          <table:table-cell table:style-name="ce37" table:formula="of:=[.F159]-[.E159]" office:value-type="float" office:value="9.99200722162641E-015" calcext:value-type="float">
            <text:p>9,99200722162641E-15</text:p>
          </table:table-cell>
          <table:table-cell table:style-name="ce14" office:value-type="float" office:value="1.25643120862616" calcext:value-type="float">
            <text:p>1,25643120862616</text:p>
          </table:table-cell>
          <table:table-cell table:style-name="ce22" office:value-type="float" office:value="1.25643120862617" calcext:value-type="float">
            <text:p>1,25643120862617</text:p>
          </table:table-cell>
          <table:table-cell table:style-name="ce43" table:formula="of:=[.I159]-[.H159]" office:value-type="float" office:value="9.99200722162641E-015" calcext:value-type="float">
            <text:p>9,99200722162641E-15</text:p>
          </table:table-cell>
          <table:table-cell table:style-name="ce22" office:value-type="float" office:value="1.25643120862616" calcext:value-type="float">
            <text:p>1,25643120862616</text:p>
          </table:table-cell>
          <table:table-cell table:style-name="ce22" office:value-type="float" office:value="1.25643120862617" calcext:value-type="float">
            <text:p>1,25643120862617</text:p>
          </table:table-cell>
          <table:table-cell table:style-name="ce48" table:formula="of:=[.L159]-[.K159]" office:value-type="float" office:value="9.99200722162641E-015" calcext:value-type="float">
            <text:p>9,99200722162641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0</text:p>
          </table:table-cell>
          <table:table-cell table:style-name="ce14" office:value-type="float" office:value="0.35446310437503" calcext:value-type="float">
            <text:p>0,35446310437503</text:p>
          </table:table-cell>
          <table:table-cell table:style-name="ce22" office:value-type="float" office:value="0.354463104375021" calcext:value-type="float">
            <text:p>0,354463104375021</text:p>
          </table:table-cell>
          <table:table-cell table:style-name="ce32" table:formula="of:=[.C160]-[.B160]" office:value-type="float" office:value="-8.99280649946377E-015" calcext:value-type="float">
            <text:p>-8,99280649946377E-15</text:p>
          </table:table-cell>
          <table:table-cell table:style-name="ce22" office:value-type="float" office:value="0.35446310437503" calcext:value-type="float">
            <text:p>0,35446310437503</text:p>
          </table:table-cell>
          <table:table-cell table:style-name="ce22" office:value-type="float" office:value="0.354463104375025" calcext:value-type="float">
            <text:p>0,354463104375025</text:p>
          </table:table-cell>
          <table:table-cell table:style-name="ce37" table:formula="of:=[.F160]-[.E160]" office:value-type="float" office:value="-4.9960036108132E-015" calcext:value-type="float">
            <text:p>-4,9960036108132E-15</text:p>
          </table:table-cell>
          <table:table-cell table:style-name="ce14" office:value-type="float" office:value="0.35446310437503" calcext:value-type="float">
            <text:p>0,35446310437503</text:p>
          </table:table-cell>
          <table:table-cell table:style-name="ce22" office:value-type="float" office:value="0.354463104375025" calcext:value-type="float">
            <text:p>0,354463104375025</text:p>
          </table:table-cell>
          <table:table-cell table:style-name="ce43" table:formula="of:=[.I160]-[.H160]" office:value-type="float" office:value="-4.9960036108132E-015" calcext:value-type="float">
            <text:p>-4,9960036108132E-15</text:p>
          </table:table-cell>
          <table:table-cell table:style-name="ce22" office:value-type="float" office:value="0.35446310437503" calcext:value-type="float">
            <text:p>0,35446310437503</text:p>
          </table:table-cell>
          <table:table-cell table:style-name="ce22" office:value-type="float" office:value="0.354463104375025" calcext:value-type="float">
            <text:p>0,354463104375025</text:p>
          </table:table-cell>
          <table:table-cell table:style-name="ce48" table:formula="of:=[.L160]-[.K160]" office:value-type="float" office:value="-4.9960036108132E-015" calcext:value-type="float">
            <text:p>-4,996003610813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1</text:p>
          </table:table-cell>
          <table:table-cell table:style-name="ce14" office:value-type="float" office:value="1.40449164821534" calcext:value-type="float">
            <text:p>1,40449164821534</text:p>
          </table:table-cell>
          <table:table-cell table:style-name="ce22" office:value-type="float" office:value="1.40449164821536" calcext:value-type="float">
            <text:p>1,40449164821536</text:p>
          </table:table-cell>
          <table:table-cell table:style-name="ce32" table:formula="of:=[.C161]-[.B161]" office:value-type="float" office:value="0.00000000000001998401" calcext:value-type="float">
            <text:p>1,99840144432528E-14</text:p>
          </table:table-cell>
          <table:table-cell table:number-columns-repeated="2" table:style-name="ce22" office:value-type="float" office:value="1.40449164821534" calcext:value-type="float">
            <text:p>1,40449164821534</text:p>
          </table:table-cell>
          <table:table-cell table:style-name="ce37" table:formula="of:=[.F161]-[.E161]" office:value-type="float" office:value="0" calcext:value-type="float">
            <text:p>0</text:p>
          </table:table-cell>
          <table:table-cell table:style-name="ce14" office:value-type="float" office:value="1.40449164821534" calcext:value-type="float">
            <text:p>1,40449164821534</text:p>
          </table:table-cell>
          <table:table-cell table:style-name="ce22" office:value-type="float" office:value="1.40449164821533" calcext:value-type="float">
            <text:p>1,40449164821533</text:p>
          </table:table-cell>
          <table:table-cell table:style-name="ce43" table:formula="of:=[.I161]-[.H161]" office:value-type="float" office:value="-9.99200722162641E-015" calcext:value-type="float">
            <text:p>-9,99200722162641E-15</text:p>
          </table:table-cell>
          <table:table-cell table:number-columns-repeated="2" table:style-name="ce22" office:value-type="float" office:value="1.40449164821534" calcext:value-type="float">
            <text:p>1,40449164821534</text:p>
          </table:table-cell>
          <table:table-cell table:style-name="ce48" table:formula="of:=[.L161]-[.K1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2</text:p>
          </table:table-cell>
          <table:table-cell table:style-name="ce14" office:value-type="float" office:value="1.89549426703398" calcext:value-type="float">
            <text:p>1,89549426703398</text:p>
          </table:table-cell>
          <table:table-cell table:style-name="ce22" office:value-type="float" office:value="1.895494267034" calcext:value-type="float">
            <text:p>1,895494267034</text:p>
          </table:table-cell>
          <table:table-cell table:style-name="ce32" table:formula="of:=[.C162]-[.B162]" office:value-type="float" office:value="0.00000000000001998401" calcext:value-type="float">
            <text:p>1,99840144432528E-14</text:p>
          </table:table-cell>
          <table:table-cell table:number-columns-repeated="2" table:style-name="ce22" office:value-type="float" office:value="1.89549426703398" calcext:value-type="float">
            <text:p>1,89549426703398</text:p>
          </table:table-cell>
          <table:table-cell table:style-name="ce37" table:formula="of:=[.F162]-[.E162]" office:value-type="float" office:value="0" calcext:value-type="float">
            <text:p>0</text:p>
          </table:table-cell>
          <table:table-cell table:style-name="ce14" office:value-type="float" office:value="1.89549426703398" calcext:value-type="float">
            <text:p>1,89549426703398</text:p>
          </table:table-cell>
          <table:table-cell table:style-name="ce22" office:value-type="float" office:value="1.89549426703398" calcext:value-type="float">
            <text:p>1,89549426703398</text:p>
          </table:table-cell>
          <table:table-cell table:style-name="ce43" table:formula="of:=[.I162]-[.H162]" office:value-type="float" office:value="0" calcext:value-type="float">
            <text:p>0</text:p>
          </table:table-cell>
          <table:table-cell table:number-columns-repeated="2" table:style-name="ce22" office:value-type="float" office:value="1.89549426703398" calcext:value-type="float">
            <text:p>1,89549426703398</text:p>
          </table:table-cell>
          <table:table-cell table:style-name="ce48" table:formula="of:=[.L162]-[.K1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3</text:p>
          </table:table-cell>
          <table:table-cell table:style-name="ce14" office:value-type="float" office:value="0.56714329040978" calcext:value-type="float">
            <text:p>0,56714329040978</text:p>
          </table:table-cell>
          <table:table-cell table:style-name="ce22" office:value-type="float" office:value="0.567143290409788" calcext:value-type="float">
            <text:p>0,567143290409788</text:p>
          </table:table-cell>
          <table:table-cell table:style-name="ce32" table:formula="of:=[.C163]-[.B163]" office:value-type="float" office:value="7.99360577730113E-015" calcext:value-type="float">
            <text:p>7,99360577730113E-15</text:p>
          </table:table-cell>
          <table:table-cell table:style-name="ce22" office:value-type="float" office:value="0.56714329040978" calcext:value-type="float">
            <text:p>0,56714329040978</text:p>
          </table:table-cell>
          <table:table-cell table:style-name="ce22" office:value-type="float" office:value="0.567143290409784" calcext:value-type="float">
            <text:p>0,567143290409784</text:p>
          </table:table-cell>
          <table:table-cell table:style-name="ce37" table:formula="of:=[.F163]-[.E163]" office:value-type="float" office:value="3.99680288865056E-015" calcext:value-type="float">
            <text:p>3,99680288865056E-15</text:p>
          </table:table-cell>
          <table:table-cell table:style-name="ce14" office:value-type="float" office:value="0.56714329040978" calcext:value-type="float">
            <text:p>0,56714329040978</text:p>
          </table:table-cell>
          <table:table-cell table:style-name="ce22" office:value-type="float" office:value="0.567143290409784" calcext:value-type="float">
            <text:p>0,567143290409784</text:p>
          </table:table-cell>
          <table:table-cell table:style-name="ce43" table:formula="of:=[.I163]-[.H163]" office:value-type="float" office:value="3.99680288865056E-015" calcext:value-type="float">
            <text:p>3,99680288865056E-15</text:p>
          </table:table-cell>
          <table:table-cell table:style-name="ce22" office:value-type="float" office:value="0.56714329040978" calcext:value-type="float">
            <text:p>0,56714329040978</text:p>
          </table:table-cell>
          <table:table-cell table:style-name="ce22" office:value-type="float" office:value="0.567143290409784" calcext:value-type="float">
            <text:p>0,567143290409784</text:p>
          </table:table-cell>
          <table:table-cell table:style-name="ce48" table:formula="of:=[.L163]-[.K163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4</text:p>
          </table:table-cell>
          <table:table-cell table:style-name="ce14" office:value-type="float" office:value="0.1" calcext:value-type="float">
            <text:p>0,1</text:p>
          </table:table-cell>
          <table:table-cell table:style-name="ce22" office:value-type="float" office:value="0.100000000000001" calcext:value-type="float">
            <text:p>0,100000000000001</text:p>
          </table:table-cell>
          <table:table-cell table:style-name="ce32" table:formula="of:=[.C164]-[.B164]" office:value-type="float" office:value="9.99200722162641E-016" calcext:value-type="float">
            <text:p>9,99200722162641E-16</text:p>
          </table:table-cell>
          <table:table-cell table:number-columns-repeated="2" table:style-name="ce22" office:value-type="float" office:value="0.1" calcext:value-type="float">
            <text:p>0,1</text:p>
          </table:table-cell>
          <table:table-cell table:style-name="ce37" table:formula="of:=[.F164]-[.E164]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22" office:value-type="float" office:value="0.1" calcext:value-type="float">
            <text:p>0,1</text:p>
          </table:table-cell>
          <table:table-cell table:style-name="ce43" table:formula="of:=[.I164]-[.H164]" office:value-type="float" office:value="0" calcext:value-type="float">
            <text:p>0</text:p>
          </table:table-cell>
          <table:table-cell table:number-columns-repeated="2" table:style-name="ce22" office:value-type="float" office:value="0.1" calcext:value-type="float">
            <text:p>0,1</text:p>
          </table:table-cell>
          <table:table-cell table:style-name="ce48" table:formula="of:=[.L164]-[.K1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5</text:p>
          </table:table-cell>
          <table:table-cell table:style-name="ce14" office:value-type="float" office:value="-0.5235987755983" calcext:value-type="float">
            <text:p>-0,5235987755983</text:p>
          </table:table-cell>
          <table:table-cell table:style-name="ce22" office:value-type="float" office:value="-0.523598775598302" calcext:value-type="float">
            <text:p>-0,523598775598302</text:p>
          </table:table-cell>
          <table:table-cell table:style-name="ce32" table:formula="of:=[.C165]-[.B165]" office:value-type="float" office:value="-1.99840144432528E-015" calcext:value-type="float">
            <text:p>-1,99840144432528E-15</text:p>
          </table:table-cell>
          <table:table-cell table:style-name="ce22" office:value-type="float" office:value="-0.5235987755983" calcext:value-type="float">
            <text:p>-0,5235987755983</text:p>
          </table:table-cell>
          <table:table-cell table:style-name="ce22" office:value-type="float" office:value="-0.523598775598299" calcext:value-type="float">
            <text:p>-0,523598775598299</text:p>
          </table:table-cell>
          <table:table-cell table:style-name="ce37" table:formula="of:=[.F165]-[.E165]" office:value-type="float" office:value="0" calcext:value-type="float">
            <text:p>0</text:p>
          </table:table-cell>
          <table:table-cell table:style-name="ce14" office:value-type="float" office:value="-0.5235987755983" calcext:value-type="float">
            <text:p>-0,5235987755983</text:p>
          </table:table-cell>
          <table:table-cell table:style-name="ce22" office:value-type="float" office:value="-0.523598775598297" calcext:value-type="float">
            <text:p>-0,523598775598297</text:p>
          </table:table-cell>
          <table:table-cell table:style-name="ce43" table:formula="of:=[.I165]-[.H165]" office:value-type="float" office:value="2.99760216648792E-015" calcext:value-type="float">
            <text:p>2,99760216648792E-15</text:p>
          </table:table-cell>
          <table:table-cell table:style-name="ce22" office:value-type="float" office:value="-0.5235987755983" calcext:value-type="float">
            <text:p>-0,5235987755983</text:p>
          </table:table-cell>
          <table:table-cell table:style-name="ce22" office:value-type="float" office:value="-0.523598775598299" calcext:value-type="float">
            <text:p>-0,523598775598299</text:p>
          </table:table-cell>
          <table:table-cell table:style-name="ce48" table:formula="of:=[.L165]-[.K1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6</text:p>
          </table:table-cell>
          <table:table-cell table:style-name="ce14" office:value-type="float" office:value="-0.84391456864927" calcext:value-type="float">
            <text:p>-0,84391456864927</text:p>
          </table:table-cell>
          <table:table-cell table:style-name="ce22" office:value-type="float" office:value="-0.843914568649254" calcext:value-type="float">
            <text:p>-0,843914568649254</text:p>
          </table:table-cell>
          <table:table-cell table:style-name="ce32" table:formula="of:=[.C166]-[.B166]" office:value-type="float" office:value="0.00000000000001598721" calcext:value-type="float">
            <text:p>1,59872115546023E-14</text:p>
          </table:table-cell>
          <table:table-cell table:style-name="ce22" office:value-type="float" office:value="-0.84391456864926" calcext:value-type="float">
            <text:p>-0,84391456864926</text:p>
          </table:table-cell>
          <table:table-cell table:style-name="ce22" office:value-type="float" office:value="-0.843914568649264" calcext:value-type="float">
            <text:p>-0,843914568649264</text:p>
          </table:table-cell>
          <table:table-cell table:style-name="ce37" table:formula="of:=[.F166]-[.E166]" office:value-type="float" office:value="-3.99680288865056E-015" calcext:value-type="float">
            <text:p>-3,99680288865056E-15</text:p>
          </table:table-cell>
          <table:table-cell table:style-name="ce14" office:value-type="float" office:value="-0.84391456864927" calcext:value-type="float">
            <text:p>-0,84391456864927</text:p>
          </table:table-cell>
          <table:table-cell table:style-name="ce22" office:value-type="float" office:value="-0.843914568649267" calcext:value-type="float">
            <text:p>-0,843914568649267</text:p>
          </table:table-cell>
          <table:table-cell table:style-name="ce43" table:formula="of:=[.I166]-[.H166]" office:value-type="float" office:value="0" calcext:value-type="float">
            <text:p>0</text:p>
          </table:table-cell>
          <table:table-cell table:style-name="ce22" office:value-type="float" office:value="-0.84391456864927" calcext:value-type="float">
            <text:p>-0,84391456864927</text:p>
          </table:table-cell>
          <table:table-cell table:style-name="ce22" office:value-type="float" office:value="-0.843914568649266" calcext:value-type="float">
            <text:p>-0,843914568649266</text:p>
          </table:table-cell>
          <table:table-cell table:style-name="ce48" table:formula="of:=[.L166]-[.K166]" office:value-type="float" office:value="3.99680288865056E-015" calcext:value-type="float">
            <text:p>3,99680288865056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7</text:p>
          </table:table-cell>
          <table:table-cell table:style-name="ce14" office:value-type="float" office:value="0.83507904272356" calcext:value-type="float">
            <text:p>0,83507904272356</text:p>
          </table:table-cell>
          <table:table-cell table:style-name="ce22" office:value-type="float" office:value="0.835079042723564" calcext:value-type="float">
            <text:p>0,835079042723564</text:p>
          </table:table-cell>
          <table:table-cell table:style-name="ce32" table:formula="of:=[.C167]-[.B167]" office:value-type="float" office:value="3.99680288865056E-015" calcext:value-type="float">
            <text:p>3,99680288865056E-15</text:p>
          </table:table-cell>
          <table:table-cell table:style-name="ce22" office:value-type="float" office:value="0.83507904272356" calcext:value-type="float">
            <text:p>0,83507904272356</text:p>
          </table:table-cell>
          <table:table-cell table:style-name="ce22" office:value-type="float" office:value="0.835079042723559" calcext:value-type="float">
            <text:p>0,835079042723559</text:p>
          </table:table-cell>
          <table:table-cell table:style-name="ce37" table:formula="of:=[.F167]-[.E167]" office:value-type="float" office:value="0" calcext:value-type="float">
            <text:p>0</text:p>
          </table:table-cell>
          <table:table-cell table:style-name="ce14" office:value-type="float" office:value="0.83507904272356" calcext:value-type="float">
            <text:p>0,83507904272356</text:p>
          </table:table-cell>
          <table:table-cell table:style-name="ce22" office:value-type="float" office:value="0.835079042723559" calcext:value-type="float">
            <text:p>0,835079042723559</text:p>
          </table:table-cell>
          <table:table-cell table:style-name="ce43" table:formula="of:=[.I167]-[.H167]" office:value-type="float" office:value="0" calcext:value-type="float">
            <text:p>0</text:p>
          </table:table-cell>
          <table:table-cell table:style-name="ce22" office:value-type="float" office:value="0.83507904272356" calcext:value-type="float">
            <text:p>0,83507904272356</text:p>
          </table:table-cell>
          <table:table-cell table:style-name="ce22" office:value-type="float" office:value="0.835079042723559" calcext:value-type="float">
            <text:p>0,835079042723559</text:p>
          </table:table-cell>
          <table:table-cell table:style-name="ce48" table:formula="of:=[.L167]-[.K1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8</text:p>
          </table:table-cell>
          <table:table-cell table:style-name="ce14" office:value-type="float" office:value="0.87356852683023" calcext:value-type="float">
            <text:p>0,87356852683023</text:p>
          </table:table-cell>
          <table:table-cell table:style-name="ce22" office:value-type="float" office:value="0.873568526830226" calcext:value-type="float">
            <text:p>0,873568526830226</text:p>
          </table:table-cell>
          <table:table-cell table:style-name="ce32" table:formula="of:=[.C168]-[.B168]" office:value-type="float" office:value="-3.99680288865056E-015" calcext:value-type="float">
            <text:p>-3,99680288865056E-15</text:p>
          </table:table-cell>
          <table:table-cell table:style-name="ce22" office:value-type="float" office:value="0.87356852683023" calcext:value-type="float">
            <text:p>0,87356852683023</text:p>
          </table:table-cell>
          <table:table-cell table:style-name="ce22" office:value-type="float" office:value="0.873568526830232" calcext:value-type="float">
            <text:p>0,873568526830232</text:p>
          </table:table-cell>
          <table:table-cell table:style-name="ce37" table:formula="of:=[.F168]-[.E168]" office:value-type="float" office:value="0" calcext:value-type="float">
            <text:p>0</text:p>
          </table:table-cell>
          <table:table-cell table:style-name="ce14" office:value-type="float" office:value="0.87356852683023" calcext:value-type="float">
            <text:p>0,87356852683023</text:p>
          </table:table-cell>
          <table:table-cell table:style-name="ce22" office:value-type="float" office:value="0.873568526830232" calcext:value-type="float">
            <text:p>0,873568526830232</text:p>
          </table:table-cell>
          <table:table-cell table:style-name="ce43" table:formula="of:=[.I168]-[.H168]" office:value-type="float" office:value="0" calcext:value-type="float">
            <text:p>0</text:p>
          </table:table-cell>
          <table:table-cell table:style-name="ce22" office:value-type="float" office:value="0.87356852683023" calcext:value-type="float">
            <text:p>0,87356852683023</text:p>
          </table:table-cell>
          <table:table-cell table:style-name="ce22" office:value-type="float" office:value="0.873568526830232" calcext:value-type="float">
            <text:p>0,873568526830232</text:p>
          </table:table-cell>
          <table:table-cell table:style-name="ce48" table:formula="of:=[.L168]-[.K1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69</text:p>
          </table:table-cell>
          <table:table-cell table:style-name="ce14" office:value-type="float" office:value="0.11111111111111" calcext:value-type="float">
            <text:p>0,11111111111111</text:p>
          </table:table-cell>
          <table:table-cell table:style-name="ce22" office:value-type="float" office:value="0.111111111111107" calcext:value-type="float">
            <text:p>0,111111111111107</text:p>
          </table:table-cell>
          <table:table-cell table:style-name="ce32" table:formula="of:=[.C169]-[.B169]" office:value-type="float" office:value="-2.99760216648792E-015" calcext:value-type="float">
            <text:p>-2,99760216648792E-15</text:p>
          </table:table-cell>
          <table:table-cell table:style-name="ce22" office:value-type="float" office:value="0.11111111111111" calcext:value-type="float">
            <text:p>0,11111111111111</text:p>
          </table:table-cell>
          <table:table-cell table:style-name="ce22" office:value-type="float" office:value="0.111111111111111" calcext:value-type="float">
            <text:p>0,111111111111111</text:p>
          </table:table-cell>
          <table:table-cell table:style-name="ce37" table:formula="of:=[.F169]-[.E169]" office:value-type="float" office:value="9.99200722162641E-016" calcext:value-type="float">
            <text:p>9,99200722162641E-16</text:p>
          </table:table-cell>
          <table:table-cell table:style-name="ce14" office:value-type="float" office:value="0.11111111111111" calcext:value-type="float">
            <text:p>0,11111111111111</text:p>
          </table:table-cell>
          <table:table-cell table:style-name="ce22" office:value-type="float" office:value="0.111111111111111" calcext:value-type="float">
            <text:p>0,111111111111111</text:p>
          </table:table-cell>
          <table:table-cell table:style-name="ce43" table:formula="of:=[.I169]-[.H169]" office:value-type="float" office:value="9.99200722162641E-016" calcext:value-type="float">
            <text:p>9,99200722162641E-16</text:p>
          </table:table-cell>
          <table:table-cell table:style-name="ce22" office:value-type="float" office:value="0.11111111111111" calcext:value-type="float">
            <text:p>0,11111111111111</text:p>
          </table:table-cell>
          <table:table-cell table:style-name="ce22" office:value-type="float" office:value="0.111111111111111" calcext:value-type="float">
            <text:p>0,111111111111111</text:p>
          </table:table-cell>
          <table:table-cell table:style-name="ce48" table:formula="of:=[.L169]-[.K169]" office:value-type="float" office:value="9.99200722162641E-016" calcext:value-type="float">
            <text:p>9,99200722162641E-1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0</text:p>
          </table:table-cell>
          <table:table-cell table:style-name="ce14" office:value-type="float" office:value="-0.03702012770786" calcext:value-type="float">
            <text:p>-0,03702012770786</text:p>
          </table:table-cell>
          <table:table-cell table:style-name="ce22" office:value-type="float" office:value="-0.037020127707855" calcext:value-type="float">
            <text:p>-0,037020127707855</text:p>
          </table:table-cell>
          <table:table-cell table:style-name="ce32" table:formula="of:=[.C170]-[.B170]" office:value-type="float" office:value="5.00294250471711E-015" calcext:value-type="float">
            <text:p>5,00294250471711E-15</text:p>
          </table:table-cell>
          <table:table-cell table:style-name="ce22" office:value-type="float" office:value="-0.03702012770786" calcext:value-type="float">
            <text:p>-0,03702012770786</text:p>
          </table:table-cell>
          <table:table-cell table:style-name="ce22" office:value-type="float" office:value="-0.0370201277078609" calcext:value-type="float">
            <text:p>-0,0370201277078609</text:p>
          </table:table-cell>
          <table:table-cell table:style-name="ce37" table:formula="of:=[.F170]-[.E170]" office:value-type="float" office:value="-9.0205620750794E-016" calcext:value-type="float">
            <text:p>-9,0205620750794E-16</text:p>
          </table:table-cell>
          <table:table-cell table:style-name="ce14" office:value-type="float" office:value="-0.03702012770786" calcext:value-type="float">
            <text:p>-0,03702012770786</text:p>
          </table:table-cell>
          <table:table-cell table:style-name="ce22" office:value-type="float" office:value="-0.0370201277078564" calcext:value-type="float">
            <text:p>-0,0370201277078564</text:p>
          </table:table-cell>
          <table:table-cell table:style-name="ce43" table:formula="of:=[.I170]-[.H170]" office:value-type="float" office:value="3.60128593612785E-015" calcext:value-type="float">
            <text:p>3,60128593612785E-15</text:p>
          </table:table-cell>
          <table:table-cell table:style-name="ce22" office:value-type="float" office:value="-0.03702012770786" calcext:value-type="float">
            <text:p>-0,03702012770786</text:p>
          </table:table-cell>
          <table:table-cell table:style-name="ce22" office:value-type="float" office:value="-0.0370201277078609" calcext:value-type="float">
            <text:p>-0,0370201277078609</text:p>
          </table:table-cell>
          <table:table-cell table:style-name="ce48" table:formula="of:=[.L170]-[.K170]" office:value-type="float" office:value="-9.0205620750794E-016" calcext:value-type="float">
            <text:p>-9,0205620750794E-1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1</text:p>
          </table:table-cell>
          <table:table-cell table:style-name="ce14" office:value-type="float" office:value="-0.66666666666667" calcext:value-type="float">
            <text:p>-0,66666666666667</text:p>
          </table:table-cell>
          <table:table-cell table:style-name="ce22" office:value-type="float" office:value="-0.666666666666671" calcext:value-type="float">
            <text:p>-0,666666666666671</text:p>
          </table:table-cell>
          <table:table-cell table:style-name="ce32" table:formula="of:=[.C171]-[.B171]" office:value-type="float" office:value="0" calcext:value-type="float">
            <text:p>0</text:p>
          </table:table-cell>
          <table:table-cell table:style-name="ce22" office:value-type="float" office:value="-0.66666666666666" calcext:value-type="float">
            <text:p>-0,66666666666666</text:p>
          </table:table-cell>
          <table:table-cell table:style-name="ce22" office:value-type="float" office:value="-0.666666666666663" calcext:value-type="float">
            <text:p>-0,666666666666663</text:p>
          </table:table-cell>
          <table:table-cell table:style-name="ce37" table:formula="of:=[.F171]-[.E171]" office:value-type="float" office:value="-2.99760216648792E-015" calcext:value-type="float">
            <text:p>-2,99760216648792E-15</text:p>
          </table:table-cell>
          <table:table-cell table:style-name="ce14" office:value-type="float" office:value="-0.66666666666667" calcext:value-type="float">
            <text:p>-0,66666666666667</text:p>
          </table:table-cell>
          <table:table-cell table:style-name="ce22" office:value-type="float" office:value="-0.666666666666667" calcext:value-type="float">
            <text:p>-0,666666666666667</text:p>
          </table:table-cell>
          <table:table-cell table:style-name="ce43" table:formula="of:=[.I171]-[.H171]" office:value-type="float" office:value="2.99760216648792E-015" calcext:value-type="float">
            <text:p>2,99760216648792E-15</text:p>
          </table:table-cell>
          <table:table-cell table:style-name="ce22" office:value-type="float" office:value="-0.66666666666667" calcext:value-type="float">
            <text:p>-0,66666666666667</text:p>
          </table:table-cell>
          <table:table-cell table:style-name="ce22" office:value-type="float" office:value="-0.666666666666667" calcext:value-type="float">
            <text:p>-0,666666666666667</text:p>
          </table:table-cell>
          <table:table-cell table:style-name="ce48" table:formula="of:=[.L171]-[.K171]" office:value-type="float" office:value="2.99760216648792E-015" calcext:value-type="float">
            <text:p>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2</text:p>
          </table:table-cell>
          <table:table-cell table:style-name="ce14" office:value-type="float" office:value="0.000001" calcext:value-type="float">
            <text:p>0,000001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32" table:formula="of:=[.C172]-[.B172]" office:value-type="float" office:value="4.58067011073124E-015" calcext:value-type="float">
            <text:p>4,58067011073124E-15</text:p>
          </table:table-cell>
          <table:table-cell table:style-name="ce22" office:value-type="float" office:value="0.000001" calcext:value-type="float">
            <text:p>0,000001</text:p>
          </table:table-cell>
          <table:table-cell table:style-name="ce24" office:value-type="float" office:value="0.00000099988975996473" calcext:value-type="float">
            <text:p>1,00E-06</text:p>
          </table:table-cell>
          <table:table-cell table:style-name="ce37" table:formula="of:=[.F172]-[.E172]" office:value-type="float" office:value="-0.00000000011024003527" calcext:value-type="float">
            <text:p>-1,10240035274994E-1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.00000100000000110414" calcext:value-type="float">
            <text:p>1,00E-06</text:p>
          </table:table-cell>
          <table:table-cell table:style-name="ce43" table:formula="of:=[.I172]-[.H172]" office:value-type="float" office:value="0.00000100000000110414" calcext:value-type="float">
            <text:p>1,00000000110414E-06</text:p>
          </table:table-cell>
          <table:table-cell table:style-name="ce22" office:value-type="float" office:value="0.000001" calcext:value-type="float">
            <text:p>0,000001</text:p>
          </table:table-cell>
          <table:table-cell table:style-name="ce24" office:value-type="float" office:value="0.00000100000000102796" calcext:value-type="float">
            <text:p>1,00E-06</text:p>
          </table:table-cell>
          <table:table-cell table:style-name="ce48" table:formula="of:=[.L172]-[.K172]" office:value-type="float" office:value="1.02796003182077E-015" calcext:value-type="float">
            <text:p>1,02796003182077E-15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73</text:p>
          </table:table-cell>
          <table:table-cell table:style-name="ce14" office:value-type="float" office:value="0.000001" calcext:value-type="float">
            <text:p>0,000001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32" table:formula="of:=[.C173]-[.B173]" office:value-type="float" office:value="4.58067011073124E-015" calcext:value-type="float">
            <text:p>4,58067011073124E-15</text:p>
          </table:table-cell>
          <table:table-cell table:style-name="ce22" office:value-type="float" office:value="0.000001" calcext:value-type="float">
            <text:p>0,000001</text:p>
          </table:table-cell>
          <table:table-cell table:style-name="ce24" office:value-type="float" office:value="0.00000100003412788822" calcext:value-type="float">
            <text:p>1,00E-06</text:p>
          </table:table-cell>
          <table:table-cell table:style-name="ce37" table:formula="of:=[.F173]-[.E173]" office:value-type="float" office:value="0.00000000003412788822" calcext:value-type="float">
            <text:p>3,41278882199471E-11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.00000100000000110414" calcext:value-type="float">
            <text:p>1,00E-06</text:p>
          </table:table-cell>
          <table:table-cell table:style-name="ce43" table:formula="of:=[.I173]-[.H173]" office:value-type="float" office:value="0.00000100000000110414" calcext:value-type="float">
            <text:p>1,00000000110414E-06</text:p>
          </table:table-cell>
          <table:table-cell table:style-name="ce22" office:value-type="float" office:value="0.000001" calcext:value-type="float">
            <text:p>0,000001</text:p>
          </table:table-cell>
          <table:table-cell table:style-name="ce24" office:value-type="float" office:value="0.00000100000000102796" calcext:value-type="float">
            <text:p>1,00E-06</text:p>
          </table:table-cell>
          <table:table-cell table:style-name="ce48" table:formula="of:=[.L173]-[.K173]" office:value-type="float" office:value="1.02796003182077E-015" calcext:value-type="float">
            <text:p>1,02796003182077E-15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4" office:value-type="string" calcext:value-type="string">
            <text:p>f74</text:p>
          </table:table-cell>
          <table:table-cell table:style-name="ce14" office:value-type="float" office:value="0.33333333333333" calcext:value-type="float">
            <text:p>0,33333333333333</text:p>
          </table:table-cell>
          <table:table-cell table:style-name="ce22" office:value-type="float" office:value="0.333333333333336" calcext:value-type="float">
            <text:p>0,333333333333336</text:p>
          </table:table-cell>
          <table:table-cell table:style-name="ce32" table:formula="of:=[.C174]-[.B174]" office:value-type="float" office:value="5.99520433297584E-015" calcext:value-type="float">
            <text:p>5,99520433297584E-15</text:p>
          </table:table-cell>
          <table:table-cell table:style-name="ce22" office:value-type="float" office:value="0.33333333333333" calcext:value-type="float">
            <text:p>0,33333333333333</text:p>
          </table:table-cell>
          <table:table-cell table:style-name="ce22" office:value-type="float" office:value="0.333333333387534" calcext:value-type="float">
            <text:p>0,333333333387534</text:p>
          </table:table-cell>
          <table:table-cell table:style-name="ce37" table:formula="of:=[.F174]-[.E174]" office:value-type="float" office:value="0.00000000005420403015" calcext:value-type="float">
            <text:p>5,42040301532154E-11</text:p>
          </table:table-cell>
          <table:table-cell table:style-name="ce14" office:value-type="float" office:value="0.33333333333333" calcext:value-type="float">
            <text:p>0,33333333333333</text:p>
          </table:table-cell>
          <table:table-cell table:style-name="ce22" office:value-type="float" office:value="0.333333333333331" calcext:value-type="float">
            <text:p>0,333333333333331</text:p>
          </table:table-cell>
          <table:table-cell table:style-name="ce43" table:formula="of:=[.I174]-[.H174]" office:value-type="float" office:value="0" calcext:value-type="float">
            <text:p>0</text:p>
          </table:table-cell>
          <table:table-cell table:style-name="ce22" office:value-type="float" office:value="0.33333333333333" calcext:value-type="float">
            <text:p>0,33333333333333</text:p>
          </table:table-cell>
          <table:table-cell table:style-name="ce22" office:value-type="float" office:value="0.333333333333332" calcext:value-type="float">
            <text:p>0,333333333333332</text:p>
          </table:table-cell>
          <table:table-cell table:style-name="ce48" table:formula="of:=[.L174]-[.K174]" office:value-type="float" office:value="1.99840144432528E-015" calcext:value-type="float">
            <text:p>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5</text:p>
          </table:table-cell>
          <table:table-cell table:style-name="ce14" office:value-type="float" office:value="0.33333331346512" calcext:value-type="float">
            <text:p>0,33333331346512</text:p>
          </table:table-cell>
          <table:table-cell table:style-name="ce22" office:value-type="float" office:value="0.333333313465118" calcext:value-type="float">
            <text:p>0,333333313465118</text:p>
          </table:table-cell>
          <table:table-cell table:style-name="ce32" table:formula="of:=[.C175]-[.B175]" office:value-type="float" office:value="-1.99840144432528E-015" calcext:value-type="float">
            <text:p>-1,99840144432528E-15</text:p>
          </table:table-cell>
          <table:table-cell table:style-name="ce22" office:value-type="float" office:value="0.33333334986151" calcext:value-type="float">
            <text:p>0,33333334986151</text:p>
          </table:table-cell>
          <table:table-cell table:style-name="ce22" office:value-type="float" office:value="0.333333349861514" calcext:value-type="float">
            <text:p>0,333333349861514</text:p>
          </table:table-cell>
          <table:table-cell table:style-name="ce37" table:formula="of:=[.F175]-[.E175]" office:value-type="float" office:value="3.99680288865056E-015" calcext:value-type="float">
            <text:p>3,99680288865056E-15</text:p>
          </table:table-cell>
          <table:table-cell table:style-name="ce14" office:value-type="float" office:value="0.33333335371348" calcext:value-type="float">
            <text:p>0,33333335371348</text:p>
          </table:table-cell>
          <table:table-cell table:style-name="ce22" office:value-type="float" office:value="0.333333353713477" calcext:value-type="float">
            <text:p>0,333333353713477</text:p>
          </table:table-cell>
          <table:table-cell table:style-name="ce43" table:formula="of:=[.I175]-[.H175]" office:value-type="float" office:value="-2.99760216648792E-015" calcext:value-type="float">
            <text:p>-2,99760216648792E-15</text:p>
          </table:table-cell>
          <table:table-cell table:style-name="ce22" office:value-type="float" office:value="0.33333331346512" calcext:value-type="float">
            <text:p>0,33333331346512</text:p>
          </table:table-cell>
          <table:table-cell table:style-name="ce22" office:value-type="float" office:value="0.333333313465118" calcext:value-type="float">
            <text:p>0,333333313465118</text:p>
          </table:table-cell>
          <table:table-cell table:style-name="ce48" table:formula="of:=[.L175]-[.K175]" office:value-type="float" office:value="-1.99840144432528E-015" calcext:value-type="float">
            <text:p>-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6</text:p>
          </table:table-cell>
          <table:table-cell table:style-name="ce14" office:value-type="float" office:value="-0.999999" calcext:value-type="float">
            <text:p>-0,999999</text:p>
          </table:table-cell>
          <table:table-cell table:style-name="ce22" office:value-type="float" office:value="-0.999998999999988" calcext:value-type="float">
            <text:p>-0,999998999999988</text:p>
          </table:table-cell>
          <table:table-cell table:style-name="ce32" table:formula="of:=[.C176]-[.B176]" office:value-type="float" office:value="0.00000000000001199041" calcext:value-type="float">
            <text:p>1,19904086659517E-14</text:p>
          </table:table-cell>
          <table:table-cell table:style-name="ce22" office:value-type="float" office:value="-0.999999" calcext:value-type="float">
            <text:p>-0,999999</text:p>
          </table:table-cell>
          <table:table-cell table:style-name="ce22" office:value-type="float" office:value="-0.999999000000004" calcext:value-type="float">
            <text:p>-0,999999000000004</text:p>
          </table:table-cell>
          <table:table-cell table:style-name="ce37" table:formula="of:=[.F176]-[.E176]" office:value-type="float" office:value="-3.99680288865056E-015" calcext:value-type="float">
            <text:p>-3,99680288865056E-15</text:p>
          </table:table-cell>
          <table:table-cell table:style-name="ce14" office:value-type="float" office:value="-0.999999" calcext:value-type="float">
            <text:p>-0,999999</text:p>
          </table:table-cell>
          <table:table-cell table:style-name="ce22" office:value-type="float" office:value="-0.999999" calcext:value-type="float">
            <text:p>-0,999999</text:p>
          </table:table-cell>
          <table:table-cell table:style-name="ce43" table:formula="of:=[.I176]-[.H176]" office:value-type="float" office:value="0" calcext:value-type="float">
            <text:p>0</text:p>
          </table:table-cell>
          <table:table-cell table:style-name="ce22" office:value-type="float" office:value="-0.999999" calcext:value-type="float">
            <text:p>-0,999999</text:p>
          </table:table-cell>
          <table:table-cell table:style-name="ce22" office:value-type="float" office:value="-0.999999000000003" calcext:value-type="float">
            <text:p>-0,999999000000003</text:p>
          </table:table-cell>
          <table:table-cell table:style-name="ce48" table:formula="of:=[.L176]-[.K1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7</text:p>
          </table:table-cell>
          <table:table-cell table:style-name="ce14" office:value-type="float" office:value="0.04761904761905" calcext:value-type="float">
            <text:p>0,04761904761905</text:p>
          </table:table-cell>
          <table:table-cell table:style-name="ce22" office:value-type="float" office:value="0.0476190476190439" calcext:value-type="float">
            <text:p>0,0476190476190439</text:p>
          </table:table-cell>
          <table:table-cell table:style-name="ce32" table:formula="of:=[.C177]-[.B177]" office:value-type="float" office:value="-6.10622663543836E-015" calcext:value-type="float">
            <text:p>-6,10622663543836E-15</text:p>
          </table:table-cell>
          <table:table-cell table:style-name="ce22" office:value-type="float" office:value="0.04761904761905" calcext:value-type="float">
            <text:p>0,04761904761905</text:p>
          </table:table-cell>
          <table:table-cell table:style-name="ce22" office:value-type="float" office:value="0.047619047619053" calcext:value-type="float">
            <text:p>0,047619047619053</text:p>
          </table:table-cell>
          <table:table-cell table:style-name="ce37" table:formula="of:=[.F177]-[.E177]" office:value-type="float" office:value="2.99760216648792E-015" calcext:value-type="float">
            <text:p>2,99760216648792E-15</text:p>
          </table:table-cell>
          <table:table-cell table:style-name="ce14" office:value-type="float" office:value="0.04761904761899" calcext:value-type="float">
            <text:p>0,04761904761899</text:p>
          </table:table-cell>
          <table:table-cell table:style-name="ce22" office:value-type="float" office:value="0.0476190476190439" calcext:value-type="float">
            <text:p>0,0476190476190439</text:p>
          </table:table-cell>
          <table:table-cell table:style-name="ce43" table:formula="of:=[.I177]-[.H177]" office:value-type="float" office:value="0.00000000000005389439" calcext:value-type="float">
            <text:p>5,38943889516474E-14</text:p>
          </table:table-cell>
          <table:table-cell table:style-name="ce22" office:value-type="float" office:value="0.04761904761905" calcext:value-type="float">
            <text:p>0,04761904761905</text:p>
          </table:table-cell>
          <table:table-cell table:style-name="ce22" office:value-type="float" office:value="0.0476190476190474" calcext:value-type="float">
            <text:p>0,0476190476190474</text:p>
          </table:table-cell>
          <table:table-cell table:style-name="ce48" table:formula="of:=[.L177]-[.K177]" office:value-type="float" office:value="-2.60208521396521E-015" calcext:value-type="float">
            <text:p>-2,60208521396521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78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style-name="ce32" table:formula="of:=[.C178]-[.B178]" office:value-type="float" office:value="7.105427357601E-015" calcext:value-type="float">
            <text:p>7,105427357601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-9.83304752501076E-016" calcext:value-type="float">
            <text:p>-9,83E-16</text:p>
          </table:table-cell>
          <table:table-cell table:style-name="ce37" table:formula="of:=[.F178]-[.E178]" office:value-type="float" office:value="-9.83304752501076E-016" calcext:value-type="float">
            <text:p>-9,83304752501076E-16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5.3097037701018E-015" calcext:value-type="float">
            <text:p>5,31E-15</text:p>
          </table:table-cell>
          <table:table-cell table:style-name="ce43" table:formula="of:=[.I178]-[.H178]" office:value-type="float" office:value="5.3097037701018E-015" calcext:value-type="float">
            <text:p>5,3097037701018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.65733148895921E-043" calcext:value-type="float">
            <text:p>9,66E-43</text:p>
          </table:table-cell>
          <table:table-cell table:style-name="ce48" table:formula="of:=[.L178]-[.K178]" office:value-type="float" office:value="9.65733148895921E-043" calcext:value-type="float">
            <text:p>9,65733148895921E-43</text:p>
          </table:table-cell>
          <table:table-cell table:number-columns-repeated="2"/>
          <table:table-cell table:style-name="ce52"/>
          <table:table-cell table:number-columns-repeated="1008"/>
        </table:table-row>
        <table:table-row table:style-name="ro1">
          <table:table-cell table:style-name="ce4" office:value-type="string" calcext:value-type="string">
            <text:p>f79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style-name="ce32" table:formula="of:=[.C179]-[.B179]" office:value-type="float" office:value="7.105427357601E-015" calcext:value-type="float">
            <text:p>7,105427357601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2.68322869303061E-016" calcext:value-type="float">
            <text:p>2,68E-16</text:p>
          </table:table-cell>
          <table:table-cell table:style-name="ce37" table:formula="of:=[.F179]-[.E179]" office:value-type="float" office:value="2.68322869303061E-016" calcext:value-type="float">
            <text:p>2,68322869303061E-16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5.00000000000008E-015" calcext:value-type="float">
            <text:p>5,00E-15</text:p>
          </table:table-cell>
          <table:table-cell table:style-name="ce43" table:formula="of:=[.I179]-[.H179]" office:value-type="float" office:value="5.00000000000008E-015" calcext:value-type="float">
            <text:p>5,00000000000008E-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2.91317086684748E-019" calcext:value-type="float">
            <text:p>2,91E-19</text:p>
          </table:table-cell>
          <table:table-cell table:style-name="ce48" table:formula="of:=[.L179]-[.K179]" office:value-type="float" office:value="2.91317086684748E-019" calcext:value-type="float">
            <text:p>2,91317086684748E-19</text:p>
          </table:table-cell>
          <table:table-cell table:number-columns-repeated="2"/>
          <table:table-cell table:style-name="ce52"/>
          <table:table-cell table:number-columns-repeated="1008"/>
        </table:table-row>
        <table:table-row table:style-name="ro1">
          <table:table-cell table:style-name="ce4" office:value-type="string" calcext:value-type="string">
            <text:p>f80</text:p>
          </table:table-cell>
          <table:table-cell table:style-name="ce14" office:value-type="float" office:value="-0.03125853949917" calcext:value-type="float">
            <text:p>-0,03125853949917</text:p>
          </table:table-cell>
          <table:table-cell table:style-name="ce22" office:value-type="float" office:value="-0.03125853949917" calcext:value-type="float">
            <text:p>-0,03125853949917</text:p>
          </table:table-cell>
          <table:table-cell table:style-name="ce32" table:formula="of:=[.C180]-[.B180]" office:value-type="float" office:value="0" calcext:value-type="float">
            <text:p>0</text:p>
          </table:table-cell>
          <table:table-cell table:style-name="ce22" office:value-type="float" office:value="-0.02823635892183" calcext:value-type="float">
            <text:p>-0,02823635892183</text:p>
          </table:table-cell>
          <table:table-cell table:style-name="ce22" office:value-type="float" office:value="-0.0283620213217312" calcext:value-type="float">
            <text:p>-0,0283620213217312</text:p>
          </table:table-cell>
          <table:table-cell table:style-name="ce37" table:formula="of:=[.F180]-[.E180]" office:value-type="float" office:value="-0.000125662399901198" calcext:value-type="float">
            <text:p>-0,000125662399901198</text:p>
          </table:table-cell>
          <table:table-cell table:style-name="ce14" office:value-type="float" office:value="-0.04472954361269" calcext:value-type="float">
            <text:p>-0,04472954361269</text:p>
          </table:table-cell>
          <table:table-cell table:style-name="ce22" office:value-type="float" office:value="-0.0447295436126997" calcext:value-type="float">
            <text:p>-0,0447295436126997</text:p>
          </table:table-cell>
          <table:table-cell table:style-name="ce43" table:formula="of:=[.I180]-[.H180]" office:value-type="float" office:value="-9.70057367766231E-015" calcext:value-type="float">
            <text:p>-9,70057367766231E-15</text:p>
          </table:table-cell>
          <table:table-cell table:style-name="ce22" office:value-type="float" office:value="-0.04145604015868" calcext:value-type="float">
            <text:p>-0,04145604015868</text:p>
          </table:table-cell>
          <table:table-cell table:style-name="ce22" office:value-type="float" office:value="-0.0414560401586836" calcext:value-type="float">
            <text:p>-0,0414560401586836</text:p>
          </table:table-cell>
          <table:table-cell table:style-name="ce48" table:formula="of:=[.L180]-[.K180]" office:value-type="float" office:value="-3.60128593612785E-015" calcext:value-type="float">
            <text:p>-3,60128593612785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1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-0.999999999999986" calcext:value-type="float">
            <text:p>-0,999999999999986</text:p>
          </table:table-cell>
          <table:table-cell table:style-name="ce32" table:formula="of:=[.C181]-[.B181]" office:value-type="float" office:value="0.00000000000001398881" calcext:value-type="float">
            <text:p>1,3988810110277E-14</text:p>
          </table:table-cell>
          <table:table-cell table:number-columns-repeated="2" table:style-name="ce22" office:value-type="float" office:value="-0.99999999999999" calcext:value-type="float">
            <text:p>-0,99999999999999</text:p>
          </table:table-cell>
          <table:table-cell table:style-name="ce37" table:formula="of:=[.F181]-[.E181]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43" table:formula="of:=[.I181]-[.H181]" office:value-type="float" office:value="0" calcext:value-type="float">
            <text:p>0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48" table:formula="of:=[.L181]-[.K1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2</text:p>
          </table:table-cell>
          <table:table-cell table:style-name="ce14" office:value-type="float" office:value="0.19851485148515" calcext:value-type="float">
            <text:p>0,19851485148515</text:p>
          </table:table-cell>
          <table:table-cell table:style-name="ce22" office:value-type="float" office:value="0.19851485148515" calcext:value-type="float">
            <text:p>0,19851485148515</text:p>
          </table:table-cell>
          <table:table-cell table:style-name="ce32" table:formula="of:=[.C182]-[.B182]" office:value-type="float" office:value="0" calcext:value-type="float">
            <text:p>0</text:p>
          </table:table-cell>
          <table:table-cell table:number-columns-repeated="2" table:style-name="ce22" office:value-type="float" office:value="0.05" calcext:value-type="float">
            <text:p>0,05</text:p>
          </table:table-cell>
          <table:table-cell table:style-name="ce37" table:formula="of:=[.F182]-[.E182]" office:value-type="float" office:value="0" calcext:value-type="float">
            <text:p>0</text:p>
          </table:table-cell>
          <table:table-cell table:style-name="ce14" office:value-type="float" office:value="0.05" calcext:value-type="float">
            <text:p>0,05</text:p>
          </table:table-cell>
          <table:table-cell table:style-name="ce22" office:value-type="float" office:value="0.0499999999999948" calcext:value-type="float">
            <text:p>0,0499999999999948</text:p>
          </table:table-cell>
          <table:table-cell table:style-name="ce43" table:formula="of:=[.I182]-[.H182]" office:value-type="float" office:value="-5.20417042793042E-015" calcext:value-type="float">
            <text:p>-5,20417042793042E-15</text:p>
          </table:table-cell>
          <table:table-cell table:number-columns-repeated="2" table:style-name="ce22" office:value-type="float" office:value="0.05" calcext:value-type="float">
            <text:p>0,05</text:p>
          </table:table-cell>
          <table:table-cell table:style-name="ce48" table:formula="of:=[.L182]-[.K1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3</text:p>
          </table:table-cell>
          <table:table-cell table:style-name="ce14" office:value-type="float" office:value="0.19851485148515" calcext:value-type="float">
            <text:p>0,19851485148515</text:p>
          </table:table-cell>
          <table:table-cell table:style-name="ce22" office:value-type="float" office:value="0.19851485148515" calcext:value-type="float">
            <text:p>0,19851485148515</text:p>
          </table:table-cell>
          <table:table-cell table:style-name="ce32" table:formula="of:=[.C183]-[.B183]" office:value-type="float" office:value="0" calcext:value-type="float">
            <text:p>0</text:p>
          </table:table-cell>
          <table:table-cell table:style-name="ce22" office:value-type="float" office:value="0.25792079207921" calcext:value-type="float">
            <text:p>0,25792079207921</text:p>
          </table:table-cell>
          <table:table-cell table:style-name="ce22" office:value-type="float" office:value="0.257920792080402" calcext:value-type="float">
            <text:p>0,257920792080402</text:p>
          </table:table-cell>
          <table:table-cell table:style-name="ce37" table:formula="of:=[.F183]-[.E183]" office:value-type="float" office:value="0.00000000000119199095" calcext:value-type="float">
            <text:p>1,1919909503888E-12</text:p>
          </table:table-cell>
          <table:table-cell table:style-name="ce14" office:value-type="float" office:value="0.00049504950495" calcext:value-type="float">
            <text:p>0,00049504950495</text:p>
          </table:table-cell>
          <table:table-cell table:style-name="ce22" office:value-type="float" office:value="0.000495049504952557" calcext:value-type="float">
            <text:p>0,000495049504952557</text:p>
          </table:table-cell>
          <table:table-cell table:style-name="ce43" table:formula="of:=[.I183]-[.H183]" office:value-type="float" office:value="2.55698240358981E-015" calcext:value-type="float">
            <text:p>2,55698240358981E-15</text:p>
          </table:table-cell>
          <table:table-cell table:style-name="ce22" office:value-type="float" office:value="0.19851485148515" calcext:value-type="float">
            <text:p>0,19851485148515</text:p>
          </table:table-cell>
          <table:table-cell table:style-name="ce22" office:value-type="float" office:value="0.198514851485147" calcext:value-type="float">
            <text:p>0,198514851485147</text:p>
          </table:table-cell>
          <table:table-cell table:style-name="ce48" table:formula="of:=[.L183]-[.K183]" office:value-type="float" office:value="-2.99760216648792E-015" calcext:value-type="float">
            <text:p>-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4</text:p>
          </table:table-cell>
          <table:table-cell table:style-name="ce14" office:value-type="float" office:value="5.00207435582522" calcext:value-type="float">
            <text:p>5,00207435582522</text:p>
          </table:table-cell>
          <table:table-cell table:style-name="ce22" office:value-type="float" office:value="5.00207435582524" calcext:value-type="float">
            <text:p>5,00207435582524</text:p>
          </table:table-cell>
          <table:table-cell table:style-name="ce32" table:formula="of:=[.C184]-[.B184]" office:value-type="float" office:value="0.00000000000001953993" calcext:value-type="float">
            <text:p>1,95399252334028E-14</text:p>
          </table:table-cell>
          <table:table-cell table:number-columns-repeated="2" table:style-name="ce22" office:value-type="float" office:value="3.01250244276146" calcext:value-type="float">
            <text:p>3,01250244276146</text:p>
          </table:table-cell>
          <table:table-cell table:style-name="ce37" table:formula="of:=[.F184]-[.E184]" office:value-type="float" office:value="0" calcext:value-type="float">
            <text:p>0</text:p>
          </table:table-cell>
          <table:table-cell table:style-name="ce14" office:value-type="float" office:value="5.00207435582522" calcext:value-type="float">
            <text:p>5,00207435582522</text:p>
          </table:table-cell>
          <table:table-cell table:style-name="ce22" office:value-type="float" office:value="5.00207435582523" calcext:value-type="float">
            <text:p>5,00207435582523</text:p>
          </table:table-cell>
          <table:table-cell table:style-name="ce43" table:formula="of:=[.I184]-[.H184]" office:value-type="float" office:value="0" calcext:value-type="float">
            <text:p>0</text:p>
          </table:table-cell>
          <table:table-cell table:style-name="ce22" office:value-type="float" office:value="3.01250244276146" calcext:value-type="float">
            <text:p>3,01250244276146</text:p>
          </table:table-cell>
          <table:table-cell table:style-name="ce22" office:value-type="float" office:value="3.01250244276147" calcext:value-type="float">
            <text:p>3,01250244276147</text:p>
          </table:table-cell>
          <table:table-cell table:style-name="ce48" table:formula="of:=[.L184]-[.K1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5</text:p>
          </table:table-cell>
          <table:table-cell table:style-name="ce14" office:value-type="float" office:value="-2.20778314488693" calcext:value-type="float">
            <text:p>-2,20778314488693</text:p>
          </table:table-cell>
          <table:table-cell table:style-name="ce22" office:value-type="float" office:value="-2.20778314488692" calcext:value-type="float">
            <text:p>-2,20778314488692</text:p>
          </table:table-cell>
          <table:table-cell table:style-name="ce32" table:formula="of:=[.C185]-[.B185]" office:value-type="float" office:value="0.00000000000001021405" calcext:value-type="float">
            <text:p>1,02140518265514E-14</text:p>
          </table:table-cell>
          <table:table-cell table:number-columns-repeated="2" table:style-name="ce22" office:value-type="float" office:value="-2.20778314488693" calcext:value-type="float">
            <text:p>-2,20778314488693</text:p>
          </table:table-cell>
          <table:table-cell table:style-name="ce37" table:formula="of:=[.F185]-[.E185]" office:value-type="float" office:value="0" calcext:value-type="float">
            <text:p>0</text:p>
          </table:table-cell>
          <table:table-cell table:style-name="ce14" office:value-type="float" office:value="-2.20778314488693" calcext:value-type="float">
            <text:p>-2,20778314488693</text:p>
          </table:table-cell>
          <table:table-cell table:style-name="ce22" office:value-type="float" office:value="-2.20778314488693" calcext:value-type="float">
            <text:p>-2,20778314488693</text:p>
          </table:table-cell>
          <table:table-cell table:style-name="ce43" table:formula="of:=[.I185]-[.H185]" office:value-type="float" office:value="0" calcext:value-type="float">
            <text:p>0</text:p>
          </table:table-cell>
          <table:table-cell table:number-columns-repeated="2" table:style-name="ce22" office:value-type="float" office:value="-2.20778314488693" calcext:value-type="float">
            <text:p>-2,20778314488693</text:p>
          </table:table-cell>
          <table:table-cell table:style-name="ce48" table:formula="of:=[.L185]-[.K1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6</text:p>
          </table:table-cell>
          <table:table-cell table:style-name="ce14" office:value-type="float" office:value="0.3028041572707" calcext:value-type="float">
            <text:p>0,3028041572707</text:p>
          </table:table-cell>
          <table:table-cell table:style-name="ce22" office:value-type="float" office:value="0.302804157270693" calcext:value-type="float">
            <text:p>0,302804157270693</text:p>
          </table:table-cell>
          <table:table-cell table:style-name="ce32" table:formula="of:=[.C186]-[.B186]" office:value-type="float" office:value="-6.99440505513849E-015" calcext:value-type="float">
            <text:p>-6,99440505513849E-15</text:p>
          </table:table-cell>
          <table:table-cell table:style-name="ce22" office:value-type="float" office:value="0.30280415727069" calcext:value-type="float">
            <text:p>0,30280415727069</text:p>
          </table:table-cell>
          <table:table-cell table:style-name="ce22" office:value-type="float" office:value="0.302804157270696" calcext:value-type="float">
            <text:p>0,302804157270696</text:p>
          </table:table-cell>
          <table:table-cell table:style-name="ce37" table:formula="of:=[.F186]-[.E186]" office:value-type="float" office:value="5.99520433297584E-015" calcext:value-type="float">
            <text:p>5,99520433297584E-15</text:p>
          </table:table-cell>
          <table:table-cell table:style-name="ce14" office:value-type="float" office:value="0.3028041572707" calcext:value-type="float">
            <text:p>0,3028041572707</text:p>
          </table:table-cell>
          <table:table-cell table:style-name="ce22" office:value-type="float" office:value="0.302804157270699" calcext:value-type="float">
            <text:p>0,302804157270699</text:p>
          </table:table-cell>
          <table:table-cell table:style-name="ce43" table:formula="of:=[.I186]-[.H186]" office:value-type="float" office:value="0" calcext:value-type="float">
            <text:p>0</text:p>
          </table:table-cell>
          <table:table-cell table:style-name="ce22" office:value-type="float" office:value="0.3028041572707" calcext:value-type="float">
            <text:p>0,3028041572707</text:p>
          </table:table-cell>
          <table:table-cell table:style-name="ce22" office:value-type="float" office:value="0.302804157270698" calcext:value-type="float">
            <text:p>0,302804157270698</text:p>
          </table:table-cell>
          <table:table-cell table:style-name="ce48" table:formula="of:=[.L186]-[.K186]" office:value-type="float" office:value="-1.99840144432528E-015" calcext:value-type="float">
            <text:p>-1,99840144432528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7</text:p>
          </table:table-cell>
          <table:table-cell table:style-name="ce14" office:value-type="float" office:value="0.98780487804878" calcext:value-type="float">
            <text:p>0,98780487804878</text:p>
          </table:table-cell>
          <table:table-cell table:style-name="ce22" office:value-type="float" office:value="0.987804878048773" calcext:value-type="float">
            <text:p>0,987804878048773</text:p>
          </table:table-cell>
          <table:table-cell table:style-name="ce32" table:formula="of:=[.C187]-[.B187]" office:value-type="float" office:value="-6.99440505513849E-015" calcext:value-type="float">
            <text:p>-6,99440505513849E-15</text:p>
          </table:table-cell>
          <table:table-cell table:number-columns-repeated="2" table:style-name="ce22" office:value-type="float" office:value="0.98780487804878" calcext:value-type="float">
            <text:p>0,98780487804878</text:p>
          </table:table-cell>
          <table:table-cell table:style-name="ce37" table:formula="of:=[.F187]-[.E187]" office:value-type="float" office:value="0" calcext:value-type="float">
            <text:p>0</text:p>
          </table:table-cell>
          <table:table-cell table:style-name="ce14" office:value-type="float" office:value="0.98780487804878" calcext:value-type="float">
            <text:p>0,98780487804878</text:p>
          </table:table-cell>
          <table:table-cell table:style-name="ce22" office:value-type="float" office:value="0.987804878048771" calcext:value-type="float">
            <text:p>0,987804878048771</text:p>
          </table:table-cell>
          <table:table-cell table:style-name="ce43" table:formula="of:=[.I187]-[.H187]" office:value-type="float" office:value="-8.99280649946377E-015" calcext:value-type="float">
            <text:p>-8,99280649946377E-15</text:p>
          </table:table-cell>
          <table:table-cell table:number-columns-repeated="2" table:style-name="ce22" office:value-type="float" office:value="0.98780487804878" calcext:value-type="float">
            <text:p>0,98780487804878</text:p>
          </table:table-cell>
          <table:table-cell table:style-name="ce48" table:formula="of:=[.L187]-[.K1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8</text:p>
          </table:table-cell>
          <table:table-cell table:style-name="ce14" office:value-type="float" office:value="0.16836217326254" calcext:value-type="float">
            <text:p>0,16836217326254</text:p>
          </table:table-cell>
          <table:table-cell table:style-name="ce22" office:value-type="float" office:value="0.168362173262532" calcext:value-type="float">
            <text:p>0,168362173262532</text:p>
          </table:table-cell>
          <table:table-cell table:style-name="ce32" table:formula="of:=[.C188]-[.B188]" office:value-type="float" office:value="-7.99360577730113E-015" calcext:value-type="float">
            <text:p>-7,99360577730113E-15</text:p>
          </table:table-cell>
          <table:table-cell table:style-name="ce22" office:value-type="float" office:value="0.16836217326254" calcext:value-type="float">
            <text:p>0,16836217326254</text:p>
          </table:table-cell>
          <table:table-cell table:style-name="ce22" office:value-type="float" office:value="0.168362173262537" calcext:value-type="float">
            <text:p>0,168362173262537</text:p>
          </table:table-cell>
          <table:table-cell table:style-name="ce37" table:formula="of:=[.F188]-[.E188]" office:value-type="float" office:value="-2.99760216648792E-015" calcext:value-type="float">
            <text:p>-2,99760216648792E-15</text:p>
          </table:table-cell>
          <table:table-cell table:style-name="ce14" office:value-type="float" office:value="0.16836217326254" calcext:value-type="float">
            <text:p>0,16836217326254</text:p>
          </table:table-cell>
          <table:table-cell table:style-name="ce22" office:value-type="float" office:value="0.168362173262537" calcext:value-type="float">
            <text:p>0,168362173262537</text:p>
          </table:table-cell>
          <table:table-cell table:style-name="ce43" table:formula="of:=[.I188]-[.H188]" office:value-type="float" office:value="-2.99760216648792E-015" calcext:value-type="float">
            <text:p>-2,99760216648792E-15</text:p>
          </table:table-cell>
          <table:table-cell table:style-name="ce22" office:value-type="float" office:value="0.16836217326254" calcext:value-type="float">
            <text:p>0,16836217326254</text:p>
          </table:table-cell>
          <table:table-cell table:style-name="ce22" office:value-type="float" office:value="0.168362173262537" calcext:value-type="float">
            <text:p>0,168362173262537</text:p>
          </table:table-cell>
          <table:table-cell table:style-name="ce48" table:formula="of:=[.L188]-[.K188]" office:value-type="float" office:value="-2.99760216648792E-015" calcext:value-type="float">
            <text:p>-2,99760216648792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89</text:p>
          </table:table-cell>
          <table:table-cell table:style-name="ce14" office:value-type="float" office:value="-0.7944191196877" calcext:value-type="float">
            <text:p>-0,7944191196877</text:p>
          </table:table-cell>
          <table:table-cell table:style-name="ce22" office:value-type="float" office:value="-0.794419119687712" calcext:value-type="float">
            <text:p>-0,794419119687712</text:p>
          </table:table-cell>
          <table:table-cell table:style-name="ce32" table:formula="of:=[.C189]-[.B189]" office:value-type="float" office:value="-0.00000000000001199041" calcext:value-type="float">
            <text:p>-1,19904086659517E-14</text:p>
          </table:table-cell>
          <table:table-cell table:number-columns-repeated="2" table:style-name="ce22" office:value-type="float" office:value="-3.63693954875174" calcext:value-type="float">
            <text:p>-3,63693954875174</text:p>
          </table:table-cell>
          <table:table-cell table:style-name="ce37" table:formula="of:=[.F189]-[.E189]" office:value-type="float" office:value="0" calcext:value-type="float">
            <text:p>0</text:p>
          </table:table-cell>
          <table:table-cell table:style-name="ce14" office:value-type="float" office:value="-3.63693954875174" calcext:value-type="float">
            <text:p>-3,63693954875174</text:p>
          </table:table-cell>
          <table:table-cell table:style-name="ce22" office:value-type="float" office:value="-3.63693954875174" calcext:value-type="float">
            <text:p>-3,63693954875174</text:p>
          </table:table-cell>
          <table:table-cell table:style-name="ce43" table:formula="of:=[.I189]-[.H189]" office:value-type="float" office:value="0" calcext:value-type="float">
            <text:p>0</text:p>
          </table:table-cell>
          <table:table-cell table:style-name="ce22" office:value-type="float" office:value="-1.74176261121641" calcext:value-type="float">
            <text:p>-1,74176261121641</text:p>
          </table:table-cell>
          <table:table-cell table:style-name="ce22" office:value-type="float" office:value="-1.74176261121642" calcext:value-type="float">
            <text:p>-1,74176261121642</text:p>
          </table:table-cell>
          <table:table-cell table:style-name="ce48" table:formula="of:=[.L189]-[.K189]" office:value-type="float" office:value="-9.99200722162641E-015" calcext:value-type="float">
            <text:p>-9,99200722162641E-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90</text:p>
          </table:table-cell>
          <table:table-cell table:style-name="ce14" office:value-type="float" office:value="0.02637269541443" calcext:value-type="float">
            <text:p>0,02637269541443</text:p>
          </table:table-cell>
          <table:table-cell table:style-name="ce22" office:value-type="float" office:value="0.026372695414425" calcext:value-type="float">
            <text:p>0,026372695414425</text:p>
          </table:table-cell>
          <table:table-cell table:style-name="ce32" table:formula="of:=[.C190]-[.B190]" office:value-type="float" office:value="-4.99947305776516E-015" calcext:value-type="float">
            <text:p>-4,99947305776516E-15</text:p>
          </table:table-cell>
          <table:table-cell table:style-name="ce22" office:value-type="float" office:value="1.14759628853458" calcext:value-type="float">
            <text:p>1,14759628853458</text:p>
          </table:table-cell>
          <table:table-cell table:style-name="ce22" office:value-type="float" office:value="1.14759628853459" calcext:value-type="float">
            <text:p>1,14759628853459</text:p>
          </table:table-cell>
          <table:table-cell table:style-name="ce37" table:formula="of:=[.F190]-[.E190]" office:value-type="float" office:value="9.99200722162641E-015" calcext:value-type="float">
            <text:p>9,99200722162641E-15</text:p>
          </table:table-cell>
          <table:table-cell table:style-name="ce14" office:value-type="float" office:value="0.02637269541443" calcext:value-type="float">
            <text:p>0,02637269541443</text:p>
          </table:table-cell>
          <table:table-cell table:style-name="ce22" office:value-type="float" office:value="0.0263726954144253" calcext:value-type="float">
            <text:p>0,0263726954144253</text:p>
          </table:table-cell>
          <table:table-cell table:style-name="ce43" table:formula="of:=[.I190]-[.H190]" office:value-type="float" office:value="-4.69763117294519E-015" calcext:value-type="float">
            <text:p>-4,69763117294519E-15</text:p>
          </table:table-cell>
          <table:table-cell table:number-columns-repeated="2" table:style-name="ce22" office:value-type="float" office:value="0.02637269541443" calcext:value-type="float">
            <text:p>0,02637269541443</text:p>
          </table:table-cell>
          <table:table-cell table:style-name="ce48" table:formula="of:=[.L190]-[.K1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91</text:p>
          </table:table-cell>
          <table:table-cell table:style-name="ce14" office:value-type="float" office:value="0.35391373355092" calcext:value-type="float">
            <text:p>0,35391373355092</text:p>
          </table:table-cell>
          <table:table-cell table:style-name="ce22" office:value-type="float" office:value="0.353913733550918" calcext:value-type="float">
            <text:p>0,353913733550918</text:p>
          </table:table-cell>
          <table:table-cell table:style-name="ce32" table:formula="of:=[.C191]-[.B191]" office:value-type="float" office:value="-1.99840144432528E-015" calcext:value-type="float">
            <text:p>-1,99840144432528E-15</text:p>
          </table:table-cell>
          <table:table-cell table:style-name="ce22" office:value-type="float" office:value="0.35391373355092" calcext:value-type="float">
            <text:p>0,35391373355092</text:p>
          </table:table-cell>
          <table:table-cell table:style-name="ce22" office:value-type="float" office:value="0.353913733550918" calcext:value-type="float">
            <text:p>0,353913733550918</text:p>
          </table:table-cell>
          <table:table-cell table:style-name="ce37" table:formula="of:=[.F191]-[.E191]" office:value-type="float" office:value="-1.99840144432528E-015" calcext:value-type="float">
            <text:p>-1,99840144432528E-15</text:p>
          </table:table-cell>
          <table:table-cell table:style-name="ce14" office:value-type="float" office:value="0.12077801181193" calcext:value-type="float">
            <text:p>0,12077801181193</text:p>
          </table:table-cell>
          <table:table-cell table:style-name="ce22" office:value-type="float" office:value="0.120778011811921" calcext:value-type="float">
            <text:p>0,120778011811921</text:p>
          </table:table-cell>
          <table:table-cell table:style-name="ce43" table:formula="of:=[.I191]-[.H191]" office:value-type="float" office:value="-9.00668428727158E-015" calcext:value-type="float">
            <text:p>-9,00668428727158E-15</text:p>
          </table:table-cell>
          <table:table-cell table:style-name="ce22" office:value-type="float" office:value="0.12077801181193" calcext:value-type="float">
            <text:p>0,12077801181193</text:p>
          </table:table-cell>
          <table:table-cell table:style-name="ce22" office:value-type="float" office:value="0.120778011811926" calcext:value-type="float">
            <text:p>0,120778011811926</text:p>
          </table:table-cell>
          <table:table-cell table:style-name="ce48" table:formula="of:=[.L191]-[.K191]" office:value-type="float" office:value="-3.99680288865056E-015" calcext:value-type="float">
            <text:p>-3,99680288865056E-15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f92</text:p>
          </table:table-cell>
          <table:table-cell table:style-name="ce16" office:value-type="float" office:value="0.1" calcext:value-type="float">
            <text:p>0,1</text:p>
          </table:table-cell>
          <table:table-cell table:style-name="ce25" office:value-type="float" office:value="0.100000000000007" calcext:value-type="float">
            <text:p>0,100000000000007</text:p>
          </table:table-cell>
          <table:table-cell table:style-name="ce33" table:formula="of:=[.C192]-[.B192]" office:value-type="float" office:value="6.99440505513849E-015" calcext:value-type="float">
            <text:p>6,99440505513849E-15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38" table:formula="of:=[.F192]-[.E192]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,1</text:p>
          </table:table-cell>
          <table:table-cell table:style-name="ce25" office:value-type="float" office:value="0.100000000000004" calcext:value-type="float">
            <text:p>0,100000000000004</text:p>
          </table:table-cell>
          <table:table-cell table:style-name="ce44" table:formula="of:=[.I192]-[.H192]" office:value-type="float" office:value="3.99680288865056E-015" calcext:value-type="float">
            <text:p>3,99680288865056E-15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49" table:formula="of:=[.L192]-[.K1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Function <text:s/>values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8" office:value-type="string" calcext:value-type="string">
            <text:p>Func</text:p>
          </table:table-cell>
          <table:table-cell table:style-name="ce8" office:value-type="string" calcext:value-type="string" table:number-columns-spanned="3" table:number-rows-spanned="1">
            <text:p>bisect</text:p>
          </table:table-cell>
          <table:covered-table-cell table:style-name="ce20"/>
          <table:covered-table-cell table:style-name="ce28"/>
          <table:table-cell table:style-name="ce8" office:value-type="string" calcext:value-type="string" table:number-columns-spanned="3" table:number-rows-spanned="1">
            <text:p>brentq</text:p>
          </table:table-cell>
          <table:covered-table-cell table:style-name="ce20"/>
          <table:covered-table-cell table:style-name="ce28"/>
          <table:table-cell table:style-name="ce8" office:value-type="string" calcext:value-type="string" table:number-columns-spanned="3" table:number-rows-spanned="1">
            <text:p>ridder</text:p>
          </table:table-cell>
          <table:covered-table-cell table:style-name="ce20"/>
          <table:covered-table-cell table:style-name="ce28"/>
          <table:table-cell table:style-name="ce8" office:value-type="string" calcext:value-type="string" table:number-columns-spanned="3" table:number-rows-spanned="1">
            <text:p>modAB</text:p>
          </table:table-cell>
          <table:covered-table-cell table:style-name="ce20"/>
          <table:covered-table-cell table:style-name="ce28"/>
          <table:table-cell table:number-columns-repeated="1011"/>
        </table:table-row>
        <table:table-row table:style-name="ro1">
          <table:table-cell table:style-name="ce9" office:value-type="string" calcext:value-type="string">
            <text:p>--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style-name="ce3" office:value-type="string" calcext:value-type="string">
            <text:p>C#</text:p>
          </table:table-cell>
          <table:table-cell table:style-name="ce21" office:value-type="string" calcext:value-type="string">
            <text:p>SciPy</text:p>
          </table:table-cell>
          <table:table-cell table:style-name="ce29" office:value-type="string" calcext:value-type="string">
            <text:p>Diff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0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4" table:formula="of:=[.C197]-[.B19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197]-[.E19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197]-[.H19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197]-[.K197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02</text:p>
          </table:table-cell>
          <table:table-cell table:style-name="ce17" office:value-type="float" office:value="2.78E-017" calcext:value-type="float">
            <text:p>2,780E-17</text:p>
          </table:table-cell>
          <table:table-cell table:style-name="ce26" office:value-type="float" office:value="-9.36750677027476E-015" calcext:value-type="float">
            <text:p>-9,368E-15</text:p>
          </table:table-cell>
          <table:table-cell table:style-name="ce34" table:formula="of:=[.C198]-[.B198]" office:value-type="float" office:value="-9.39530677027476E-015" calcext:value-type="float">
            <text:p>-9,395E-15</text:p>
          </table:table-cell>
          <table:table-cell table:style-name="ce17" office:value-type="float" office:value="-9.71E-017" calcext:value-type="float">
            <text:p>-9,710E-17</text:p>
          </table:table-cell>
          <table:table-cell table:style-name="ce26" office:value-type="float" office:value="-9.71445146547012E-017" calcext:value-type="float">
            <text:p>-9,714E-17</text:p>
          </table:table-cell>
          <table:table-cell table:style-name="ce39" table:formula="of:=[.F198]-[.E198]" office:value-type="float" office:value="-4.45146547011947E-020" calcext:value-type="float">
            <text:p>-4,451E-20</text:p>
          </table:table-cell>
          <table:table-cell table:style-name="ce17" office:value-type="float" office:value="-1.39E-017" calcext:value-type="float">
            <text:p>-1,390E-17</text:p>
          </table:table-cell>
          <table:table-cell table:style-name="ce26" office:value-type="float" office:value="5.14865927669916E-015" calcext:value-type="float">
            <text:p>5,149E-15</text:p>
          </table:table-cell>
          <table:table-cell table:style-name="ce45" table:formula="of:=[.I198]-[.H198]" office:value-type="float" office:value="5.16255927669916E-015" calcext:value-type="float">
            <text:p>5,163E-15</text:p>
          </table:table-cell>
          <table:table-cell table:style-name="ce17" office:value-type="float" office:value="2.78E-017" calcext:value-type="float">
            <text:p>2,780E-17</text:p>
          </table:table-cell>
          <table:table-cell table:style-name="ce26" office:value-type="float" office:value="2.77555756156289E-017" calcext:value-type="float">
            <text:p>2,776E-17</text:p>
          </table:table-cell>
          <table:table-cell table:style-name="ce50" table:formula="of:=[.L198]-[.K198]" office:value-type="float" office:value="-4.44243843711019E-020" calcext:value-type="float">
            <text:p>-4,442E-2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03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0.0000000000001523226" calcext:value-type="float">
            <text:p>1,523E-13</text:p>
          </table:table-cell>
          <table:table-cell table:style-name="ce34" table:formula="of:=[.C199]-[.B199]" office:value-type="float" office:value="0.0000000000001518786" calcext:value-type="float">
            <text:p>1,519E-13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4.44089209850063E-016" calcext:value-type="float">
            <text:p>4,441E-16</text:p>
          </table:table-cell>
          <table:table-cell table:style-name="ce39" table:formula="of:=[.F199]-[.E199]" office:value-type="float" office:value="8.92098500629943E-020" calcext:value-type="float">
            <text:p>8,921E-20</text:p>
          </table:table-cell>
          <table:table-cell table:style-name="ce17" office:value-type="float" office:value="1.78E-015" calcext:value-type="float">
            <text:p>1,780E-15</text:p>
          </table:table-cell>
          <table:table-cell table:style-name="ce26" office:value-type="float" office:value="0.00000000000012190249" calcext:value-type="float">
            <text:p>1,219E-13</text:p>
          </table:table-cell>
          <table:table-cell table:style-name="ce45" table:formula="of:=[.I199]-[.H199]" office:value-type="float" office:value="0.00000000000012012249" calcext:value-type="float">
            <text:p>1,201E-13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4.44089209850063E-016" calcext:value-type="float">
            <text:p>4,441E-16</text:p>
          </table:table-cell>
          <table:table-cell table:style-name="ce50" table:formula="of:=[.L199]-[.K199]" office:value-type="float" office:value="8.92098500629943E-020" calcext:value-type="float">
            <text:p>8,921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0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2964295" calcext:value-type="float">
            <text:p>2,964E-14</text:p>
          </table:table-cell>
          <table:table-cell table:style-name="ce34" table:formula="of:=[.C200]-[.B200]" office:value-type="float" office:value="0.00000000000002964295" calcext:value-type="float">
            <text:p>2,964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00]-[.E200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0]-[.H200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0]-[.K200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05</text:p>
          </table:table-cell>
          <table:table-cell table:style-name="ce17" office:value-type="float" office:value="-8.88E-016" calcext:value-type="float">
            <text:p>-8,880E-16</text:p>
          </table:table-cell>
          <table:table-cell table:style-name="ce26" office:value-type="float" office:value="-0.00000000000017408297" calcext:value-type="float">
            <text:p>-1,741E-13</text:p>
          </table:table-cell>
          <table:table-cell table:style-name="ce34" table:formula="of:=[.C201]-[.B201]" office:value-type="float" office:value="-0.00000000000017319497" calcext:value-type="float">
            <text:p>-1,732E-13</text:p>
          </table:table-cell>
          <table:table-cell table:style-name="ce17" office:value-type="float" office:value="3.55E-015" calcext:value-type="float">
            <text:p>3,550E-15</text:p>
          </table:table-cell>
          <table:table-cell table:style-name="ce26" office:value-type="float" office:value="3.5527136788005E-015" calcext:value-type="float">
            <text:p>3,553E-15</text:p>
          </table:table-cell>
          <table:table-cell table:style-name="ce39" table:formula="of:=[.F201]-[.E201]" office:value-type="float" office:value="2.71367880050004E-018" calcext:value-type="float">
            <text:p>2,714E-18</text:p>
          </table:table-cell>
          <table:table-cell table:style-name="ce17" office:value-type="float" office:value="-8.88E-016" calcext:value-type="float">
            <text:p>-8,880E-16</text:p>
          </table:table-cell>
          <table:table-cell table:style-name="ce26" office:value-type="float" office:value="0.00000000000016786572" calcext:value-type="float">
            <text:p>1,679E-13</text:p>
          </table:table-cell>
          <table:table-cell table:style-name="ce45" table:formula="of:=[.I201]-[.H201]" office:value-type="float" office:value="0.00000000000016875372" calcext:value-type="float">
            <text:p>1,688E-13</text:p>
          </table:table-cell>
          <table:table-cell table:style-name="ce17" office:value-type="float" office:value="-8.88E-016" calcext:value-type="float">
            <text:p>-8,880E-16</text:p>
          </table:table-cell>
          <table:table-cell table:style-name="ce26" office:value-type="float" office:value="-8.88178419700125E-016" calcext:value-type="float">
            <text:p>-8,882E-16</text:p>
          </table:table-cell>
          <table:table-cell table:style-name="ce50" table:formula="of:=[.L201]-[.K201]" office:value-type="float" office:value="-1.78419700125002E-019" calcext:value-type="float">
            <text:p>-1,784E-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06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576517" calcext:value-type="float">
            <text:p>1,577E-14</text:p>
          </table:table-cell>
          <table:table-cell table:style-name="ce34" table:formula="of:=[.C202]-[.B202]" office:value-type="float" office:value="0.00000000000001576517" calcext:value-type="float">
            <text:p>1,577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02]-[.E202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2]-[.H202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2]-[.K202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0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6128431" calcext:value-type="float">
            <text:p>6,128E-14</text:p>
          </table:table-cell>
          <table:table-cell table:style-name="ce34" table:formula="of:=[.C203]-[.B203]" office:value-type="float" office:value="0.00000000000006128431" calcext:value-type="float">
            <text:p>6,128E-14</text:p>
          </table:table-cell>
          <table:table-cell table:style-name="ce17" office:value-type="float" office:value="2.22E-016" calcext:value-type="float">
            <text:p>2,220E-16</text:p>
          </table:table-cell>
          <table:table-cell table:style-name="ce26" office:value-type="float" office:value="2.22044604925031E-016" calcext:value-type="float">
            <text:p>2,220E-16</text:p>
          </table:table-cell>
          <table:table-cell table:style-name="ce39" table:formula="of:=[.F203]-[.E203]" office:value-type="float" office:value="4.46049250310041E-020" calcext:value-type="float">
            <text:p>4,460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3]-[.H20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3]-[.K203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0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11946" calcext:value-type="float">
            <text:p>-1,195E-13</text:p>
          </table:table-cell>
          <table:table-cell table:style-name="ce34" table:formula="of:=[.C204]-[.B204]" office:value-type="float" office:value="-0.00000000000011946" calcext:value-type="float">
            <text:p>-1,195E-13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04]-[.E20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4]-[.H20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4]-[.K204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09</text:p>
          </table:table-cell>
          <table:table-cell table:style-name="ce17" office:value-type="float" office:value="8.33E-017" calcext:value-type="float">
            <text:p>8,330E-17</text:p>
          </table:table-cell>
          <table:table-cell table:style-name="ce26" office:value-type="float" office:value="-0.00000000000005223599" calcext:value-type="float">
            <text:p>-5,224E-14</text:p>
          </table:table-cell>
          <table:table-cell table:style-name="ce34" table:formula="of:=[.C205]-[.B205]" office:value-type="float" office:value="-0.00000000000005231929" calcext:value-type="float">
            <text:p>-5,232E-14</text:p>
          </table:table-cell>
          <table:table-cell table:style-name="ce17" office:value-type="float" office:value="8.33E-017" calcext:value-type="float">
            <text:p>8,330E-17</text:p>
          </table:table-cell>
          <table:table-cell table:style-name="ce26" office:value-type="float" office:value="8.32667268468867E-017" calcext:value-type="float">
            <text:p>8,327E-17</text:p>
          </table:table-cell>
          <table:table-cell table:style-name="ce39" table:formula="of:=[.F205]-[.E205]" office:value-type="float" office:value="-3.32731531133016E-020" calcext:value-type="float">
            <text:p>-3,327E-20</text:p>
          </table:table-cell>
          <table:table-cell table:style-name="ce17" office:value-type="float" office:value="8.33E-017" calcext:value-type="float">
            <text:p>8,330E-17</text:p>
          </table:table-cell>
          <table:table-cell table:style-name="ce26" office:value-type="float" office:value="0.00000000000003441691" calcext:value-type="float">
            <text:p>3,442E-14</text:p>
          </table:table-cell>
          <table:table-cell table:style-name="ce45" table:formula="of:=[.I205]-[.H205]" office:value-type="float" office:value="0.00000000000003433361" calcext:value-type="float">
            <text:p>3,433E-14</text:p>
          </table:table-cell>
          <table:table-cell table:style-name="ce17" office:value-type="float" office:value="-2.78E-017" calcext:value-type="float">
            <text:p>-2,780E-17</text:p>
          </table:table-cell>
          <table:table-cell table:style-name="ce26" office:value-type="float" office:value="-2.77555756156289E-017" calcext:value-type="float">
            <text:p>-2,776E-17</text:p>
          </table:table-cell>
          <table:table-cell table:style-name="ce50" table:formula="of:=[.L205]-[.K205]" office:value-type="float" office:value="4.44243843711019E-020" calcext:value-type="float">
            <text:p>4,442E-2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0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-0.00000000000012223556" calcext:value-type="float">
            <text:p>-1,222E-13</text:p>
          </table:table-cell>
          <table:table-cell table:style-name="ce34" table:formula="of:=[.C206]-[.B206]" office:value-type="float" office:value="-0.00000000000012229106" calcext:value-type="float">
            <text:p>-1,223E-13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5.55111512312578E-017" calcext:value-type="float">
            <text:p>5,551E-17</text:p>
          </table:table-cell>
          <table:table-cell table:style-name="ce39" table:formula="of:=[.F206]-[.E206]" office:value-type="float" office:value="1.11512312578003E-020" calcext:value-type="float">
            <text:p>1,115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6]-[.H206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6]-[.K206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25796032" calcext:value-type="float">
            <text:p>-2,580E-13</text:p>
          </table:table-cell>
          <table:table-cell table:style-name="ce34" table:formula="of:=[.C207]-[.B207]" office:value-type="float" office:value="-0.00000000000025796032" calcext:value-type="float">
            <text:p>-2,580E-13</text:p>
          </table:table-cell>
          <table:table-cell table:style-name="ce17" office:value-type="float" office:value="8.35E-015" calcext:value-type="float">
            <text:p>8,350E-15</text:p>
          </table:table-cell>
          <table:table-cell table:style-name="ce26" office:value-type="float" office:value="8.3544282603043E-015" calcext:value-type="float">
            <text:p>8,354E-15</text:p>
          </table:table-cell>
          <table:table-cell table:style-name="ce39" table:formula="of:=[.F207]-[.E207]" office:value-type="float" office:value="4.42826030429942E-018" calcext:value-type="float">
            <text:p>4,428E-1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07]-[.H20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07]-[.K207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2</text:p>
          </table:table-cell>
          <table:table-cell table:style-name="ce17" office:value-type="float" office:value="-6.94E-017" calcext:value-type="float">
            <text:p>-6,940E-17</text:p>
          </table:table-cell>
          <table:table-cell table:style-name="ce26" office:value-type="float" office:value="-6.88338275267597E-015" calcext:value-type="float">
            <text:p>-6,883E-15</text:p>
          </table:table-cell>
          <table:table-cell table:style-name="ce34" table:formula="of:=[.C208]-[.B208]" office:value-type="float" office:value="-6.81398275267597E-015" calcext:value-type="float">
            <text:p>-6,814E-15</text:p>
          </table:table-cell>
          <table:table-cell table:style-name="ce17" office:value-type="float" office:value="2.08E-016" calcext:value-type="float">
            <text:p>2,080E-16</text:p>
          </table:table-cell>
          <table:table-cell table:style-name="ce26" office:value-type="float" office:value="2.08166817117217E-016" calcext:value-type="float">
            <text:p>2,082E-16</text:p>
          </table:table-cell>
          <table:table-cell table:style-name="ce39" table:formula="of:=[.F208]-[.E208]" office:value-type="float" office:value="1.66817117216997E-019" calcext:value-type="float">
            <text:p>1,668E-19</text:p>
          </table:table-cell>
          <table:table-cell table:style-name="ce17" office:value-type="float" office:value="6.94E-017" calcext:value-type="float">
            <text:p>6,940E-17</text:p>
          </table:table-cell>
          <table:table-cell table:style-name="ce26" office:value-type="float" office:value="0.00000000000001076916" calcext:value-type="float">
            <text:p>1,077E-14</text:p>
          </table:table-cell>
          <table:table-cell table:style-name="ce45" table:formula="of:=[.I208]-[.H208]" office:value-type="float" office:value="0.00000000000001069976" calcext:value-type="float">
            <text:p>1,070E-14</text:p>
          </table:table-cell>
          <table:table-cell table:style-name="ce17" office:value-type="float" office:value="6.94E-017" calcext:value-type="float">
            <text:p>6,940E-17</text:p>
          </table:table-cell>
          <table:table-cell table:style-name="ce26" office:value-type="float" office:value="6.93889390390723E-017" calcext:value-type="float">
            <text:p>6,939E-17</text:p>
          </table:table-cell>
          <table:table-cell table:style-name="ce50" table:formula="of:=[.L208]-[.K208]" office:value-type="float" office:value="-1.10609609277075E-020" calcext:value-type="float">
            <text:p>-1,106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3</text:p>
          </table:table-cell>
          <table:table-cell table:style-name="ce17" office:value-type="float" office:value="3.47E-017" calcext:value-type="float">
            <text:p>3,470E-17</text:p>
          </table:table-cell>
          <table:table-cell table:style-name="ce26" office:value-type="float" office:value="9.0205620750794E-016" calcext:value-type="float">
            <text:p>9,021E-16</text:p>
          </table:table-cell>
          <table:table-cell table:style-name="ce34" table:formula="of:=[.C209]-[.B209]" office:value-type="float" office:value="8.6735620750794E-016" calcext:value-type="float">
            <text:p>8,674E-16</text:p>
          </table:table-cell>
          <table:table-cell table:style-name="ce17" office:value-type="float" office:value="3.47E-017" calcext:value-type="float">
            <text:p>3,470E-17</text:p>
          </table:table-cell>
          <table:table-cell table:style-name="ce26" office:value-type="float" office:value="3.46944695195361E-017" calcext:value-type="float">
            <text:p>3,469E-17</text:p>
          </table:table-cell>
          <table:table-cell table:style-name="ce39" table:formula="of:=[.F209]-[.E209]" office:value-type="float" office:value="-5.53048046390304E-021" calcext:value-type="float">
            <text:p>-5,530E-21</text:p>
          </table:table-cell>
          <table:table-cell table:style-name="ce17" office:value-type="float" office:value="3.47E-017" calcext:value-type="float">
            <text:p>3,470E-17</text:p>
          </table:table-cell>
          <table:table-cell table:style-name="ce26" office:value-type="float" office:value="-7.9658502016855E-015" calcext:value-type="float">
            <text:p>-7,966E-15</text:p>
          </table:table-cell>
          <table:table-cell table:style-name="ce45" table:formula="of:=[.I209]-[.H209]" office:value-type="float" office:value="-8.0005502016855E-015" calcext:value-type="float">
            <text:p>-8,001E-15</text:p>
          </table:table-cell>
          <table:table-cell table:style-name="ce17" office:value-type="float" office:value="-8.33E-017" calcext:value-type="float">
            <text:p>-8,330E-17</text:p>
          </table:table-cell>
          <table:table-cell table:style-name="ce26" office:value-type="float" office:value="-8.32667268468867E-017" calcext:value-type="float">
            <text:p>-8,327E-17</text:p>
          </table:table-cell>
          <table:table-cell table:style-name="ce50" table:formula="of:=[.L209]-[.K209]" office:value-type="float" office:value="3.32731531133016E-020" calcext:value-type="float">
            <text:p>3,327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4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2.40432673770385E-015" calcext:value-type="float">
            <text:p>2,404E-15</text:p>
          </table:table-cell>
          <table:table-cell table:style-name="ce34" table:formula="of:=[.C210]-[.B210]" office:value-type="float" office:value="2.39738673770385E-015" calcext:value-type="float">
            <text:p>2,397E-15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6.93889390390723E-018" calcext:value-type="float">
            <text:p>6,939E-18</text:p>
          </table:table-cell>
          <table:table-cell table:style-name="ce39" table:formula="of:=[.F210]-[.E210]" office:value-type="float" office:value="-1.10609609277013E-021" calcext:value-type="float">
            <text:p>-1,106E-21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-5.67601521339611E-015" calcext:value-type="float">
            <text:p>-5,676E-15</text:p>
          </table:table-cell>
          <table:table-cell table:style-name="ce45" table:formula="of:=[.I210]-[.H210]" office:value-type="float" office:value="-5.68295521339611E-015" calcext:value-type="float">
            <text:p>-5,683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0]-[.K210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5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0.00000000000103461684" calcext:value-type="float">
            <text:p>1,035E-12</text:p>
          </table:table-cell>
          <table:table-cell table:style-name="ce34" table:formula="of:=[.C211]-[.B211]" office:value-type="float" office:value="0.00000000000103472784" calcext:value-type="float">
            <text:p>1,035E-12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-1.11022302462516E-016" calcext:value-type="float">
            <text:p>-1,110E-16</text:p>
          </table:table-cell>
          <table:table-cell table:style-name="ce39" table:formula="of:=[.F211]-[.E211]" office:value-type="float" office:value="-2.23024625159951E-020" calcext:value-type="float">
            <text:p>-2,230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138455913" calcext:value-type="float">
            <text:p>-1,385E-12</text:p>
          </table:table-cell>
          <table:table-cell table:style-name="ce45" table:formula="of:=[.I211]-[.H211]" office:value-type="float" office:value="-0.00000000000138455913" calcext:value-type="float">
            <text:p>-1,385E-12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1]-[.K211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6</text:p>
          </table:table-cell>
          <table:table-cell table:style-name="ce17" office:value-type="float" office:value="1.11E-016" calcext:value-type="float">
            <text:p>1,110E-16</text:p>
          </table:table-cell>
          <table:table-cell table:style-name="ce26" office:value-type="float" office:value="-0.00000000001472488798" calcext:value-type="float">
            <text:p>-1,472E-11</text:p>
          </table:table-cell>
          <table:table-cell table:style-name="ce34" table:formula="of:=[.C212]-[.B212]" office:value-type="float" office:value="-0.00000000001472499898" calcext:value-type="float">
            <text:p>-1,472E-11</text:p>
          </table:table-cell>
          <table:table-cell table:style-name="ce17" office:value-type="float" office:value="1.67E-015" calcext:value-type="float">
            <text:p>1,670E-15</text:p>
          </table:table-cell>
          <table:table-cell table:style-name="ce26" office:value-type="float" office:value="1.66533453693773E-015" calcext:value-type="float">
            <text:p>1,665E-15</text:p>
          </table:table-cell>
          <table:table-cell table:style-name="ce39" table:formula="of:=[.F212]-[.E212]" office:value-type="float" office:value="-4.66546306226984E-018" calcext:value-type="float">
            <text:p>-4,665E-18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0.00000000003301126039" calcext:value-type="float">
            <text:p>3,301E-11</text:p>
          </table:table-cell>
          <table:table-cell table:style-name="ce45" table:formula="of:=[.I212]-[.H212]" office:value-type="float" office:value="0.00000000003301137139" calcext:value-type="float">
            <text:p>3,301E-11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-1.11022302462516E-016" calcext:value-type="float">
            <text:p>-1,110E-16</text:p>
          </table:table-cell>
          <table:table-cell table:style-name="ce50" table:formula="of:=[.L212]-[.K212]" office:value-type="float" office:value="-2.23024625159951E-020" calcext:value-type="float">
            <text:p>-2,230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26843982592" calcext:value-type="float">
            <text:p>2,684E-10</text:p>
          </table:table-cell>
          <table:table-cell table:style-name="ce34" table:formula="of:=[.C213]-[.B213]" office:value-type="float" office:value="0.00000000026843982592" calcext:value-type="float">
            <text:p>2,684E-10</text:p>
          </table:table-cell>
          <table:table-cell table:style-name="ce17" office:value-type="float" office:value="-2.22E-016" calcext:value-type="float">
            <text:p>-2,220E-16</text:p>
          </table:table-cell>
          <table:table-cell table:style-name="ce26" office:value-type="float" office:value="-2.22044604925031E-016" calcext:value-type="float">
            <text:p>-2,220E-16</text:p>
          </table:table-cell>
          <table:table-cell table:style-name="ce39" table:formula="of:=[.F213]-[.E213]" office:value-type="float" office:value="-4.46049250310041E-020" calcext:value-type="float">
            <text:p>-4,460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6520147755" calcext:value-type="float">
            <text:p>6,520E-10</text:p>
          </table:table-cell>
          <table:table-cell table:style-name="ce45" table:formula="of:=[.I213]-[.H213]" office:value-type="float" office:value="0.0000000006520147755" calcext:value-type="float">
            <text:p>6,520E-1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3]-[.K213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8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7.63972218820186E-015" calcext:value-type="float">
            <text:p>7,640E-15</text:p>
          </table:table-cell>
          <table:table-cell table:style-name="ce34" table:formula="of:=[.C214]-[.B214]" office:value-type="float" office:value="7.63278218820186E-015" calcext:value-type="float">
            <text:p>7,633E-15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6.93889390390723E-018" calcext:value-type="float">
            <text:p>6,939E-18</text:p>
          </table:table-cell>
          <table:table-cell table:style-name="ce39" table:formula="of:=[.F214]-[.E214]" office:value-type="float" office:value="-1.10609609277013E-021" calcext:value-type="float">
            <text:p>-1,106E-21</text:p>
          </table:table-cell>
          <table:table-cell table:style-name="ce17" office:value-type="float" office:value="-5.55E-017" calcext:value-type="float">
            <text:p>-5,550E-17</text:p>
          </table:table-cell>
          <table:table-cell table:style-name="ce26" office:value-type="float" office:value="4.64212002171394E-015" calcext:value-type="float">
            <text:p>4,642E-15</text:p>
          </table:table-cell>
          <table:table-cell table:style-name="ce45" table:formula="of:=[.I214]-[.H214]" office:value-type="float" office:value="4.69762002171394E-015" calcext:value-type="float">
            <text:p>4,698E-15</text:p>
          </table:table-cell>
          <table:table-cell table:style-name="ce17" office:value-type="float" office:value="6.94E-018" calcext:value-type="float">
            <text:p>6,940E-18</text:p>
          </table:table-cell>
          <table:table-cell table:style-name="ce26" office:value-type="float" office:value="6.93889390390723E-018" calcext:value-type="float">
            <text:p>6,939E-18</text:p>
          </table:table-cell>
          <table:table-cell table:style-name="ce50" table:formula="of:=[.L214]-[.K214]" office:value-type="float" office:value="-1.10609609277013E-021" calcext:value-type="float">
            <text:p>-1,106E-21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19</text:p>
          </table:table-cell>
          <table:table-cell table:style-name="ce17" office:value-type="float" office:value="3.47E-018" calcext:value-type="float">
            <text:p>3,470E-18</text:p>
          </table:table-cell>
          <table:table-cell table:style-name="ce26" office:value-type="float" office:value="-8.23126289350995E-016" calcext:value-type="float">
            <text:p>-8,231E-16</text:p>
          </table:table-cell>
          <table:table-cell table:style-name="ce34" table:formula="of:=[.C215]-[.B215]" office:value-type="float" office:value="-8.26596289350995E-016" calcext:value-type="float">
            <text:p>-8,266E-16</text:p>
          </table:table-cell>
          <table:table-cell table:style-name="ce17" office:value-type="float" office:value="-1.53E-016" calcext:value-type="float">
            <text:p>-1,530E-16</text:p>
          </table:table-cell>
          <table:table-cell table:style-name="ce26" office:value-type="float" office:value="-1.52655665885959E-016" calcext:value-type="float">
            <text:p>-1,527E-16</text:p>
          </table:table-cell>
          <table:table-cell table:style-name="ce39" table:formula="of:=[.F215]-[.E215]" office:value-type="float" office:value="3.44334114040997E-019" calcext:value-type="float">
            <text:p>3,443E-19</text:p>
          </table:table-cell>
          <table:table-cell table:style-name="ce17" office:value-type="float" office:value="3.47E-018" calcext:value-type="float">
            <text:p>3,470E-18</text:p>
          </table:table-cell>
          <table:table-cell table:style-name="ce26" office:value-type="float" office:value="-4.87890977618477E-016" calcext:value-type="float">
            <text:p>-4,879E-16</text:p>
          </table:table-cell>
          <table:table-cell table:style-name="ce45" table:formula="of:=[.I215]-[.H215]" office:value-type="float" office:value="-4.91360977618477E-016" calcext:value-type="float">
            <text:p>-4,914E-16</text:p>
          </table:table-cell>
          <table:table-cell table:style-name="ce17" office:value-type="float" office:value="3.47E-018" calcext:value-type="float">
            <text:p>3,470E-18</text:p>
          </table:table-cell>
          <table:table-cell table:style-name="ce26" office:value-type="float" office:value="3.46944695195361E-018" calcext:value-type="float">
            <text:p>3,469E-18</text:p>
          </table:table-cell>
          <table:table-cell table:style-name="ce50" table:formula="of:=[.L215]-[.K215]" office:value-type="float" office:value="-5.53048046390073E-022" calcext:value-type="float">
            <text:p>-5,530E-22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0</text:p>
          </table:table-cell>
          <table:table-cell table:style-name="ce17" office:value-type="float" office:value="1.95E-020" calcext:value-type="float">
            <text:p>1,950E-20</text:p>
          </table:table-cell>
          <table:table-cell table:style-name="ce26" office:value-type="float" office:value="-3.28648783534669E-018" calcext:value-type="float">
            <text:p>-3,286E-18</text:p>
          </table:table-cell>
          <table:table-cell table:style-name="ce34" table:formula="of:=[.C216]-[.B216]" office:value-type="float" office:value="-3.30598783534669E-018" calcext:value-type="float">
            <text:p>-3,306E-18</text:p>
          </table:table-cell>
          <table:table-cell table:style-name="ce17" office:value-type="float" office:value="1.95E-020" calcext:value-type="float">
            <text:p>1,950E-20</text:p>
          </table:table-cell>
          <table:table-cell table:style-name="ce26" office:value-type="float" office:value="1.94817577868489E-020" calcext:value-type="float">
            <text:p>1,948E-20</text:p>
          </table:table-cell>
          <table:table-cell table:style-name="ce39" table:formula="of:=[.F216]-[.E216]" office:value-type="float" office:value="-1.82422131511016E-023" calcext:value-type="float">
            <text:p>-1,824E-23</text:p>
          </table:table-cell>
          <table:table-cell table:style-name="ce17" office:value-type="float" office:value="1.95E-020" calcext:value-type="float">
            <text:p>1,950E-20</text:p>
          </table:table-cell>
          <table:table-cell table:style-name="ce26" office:value-type="float" office:value="2.67493004742908E-018" calcext:value-type="float">
            <text:p>2,675E-18</text:p>
          </table:table-cell>
          <table:table-cell table:style-name="ce45" table:formula="of:=[.I216]-[.H216]" office:value-type="float" office:value="2.65543004742908E-018" calcext:value-type="float">
            <text:p>2,655E-18</text:p>
          </table:table-cell>
          <table:table-cell table:style-name="ce17" office:value-type="float" office:value="-2.46E-020" calcext:value-type="float">
            <text:p>-2,460E-20</text:p>
          </table:table-cell>
          <table:table-cell table:style-name="ce26" office:value-type="float" office:value="-2.45639554703747E-020" calcext:value-type="float">
            <text:p>-2,456E-20</text:p>
          </table:table-cell>
          <table:table-cell table:style-name="ce50" table:formula="of:=[.L216]-[.K216]" office:value-type="float" office:value="3.60445296253003E-023" calcext:value-type="float">
            <text:p>3,604E-23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4.44089209850063E-015" calcext:value-type="float">
            <text:p>-4,441E-15</text:p>
          </table:table-cell>
          <table:table-cell table:style-name="ce34" table:formula="of:=[.C217]-[.B217]" office:value-type="float" office:value="-4.44089209850063E-015" calcext:value-type="float">
            <text:p>-4,441E-15</text:p>
          </table:table-cell>
          <table:table-cell table:style-name="ce17" office:value-type="float" office:value="-2.78E-017" calcext:value-type="float">
            <text:p>-2,780E-17</text:p>
          </table:table-cell>
          <table:table-cell table:style-name="ce26" office:value-type="float" office:value="-2.77555756156289E-017" calcext:value-type="float">
            <text:p>-2,776E-17</text:p>
          </table:table-cell>
          <table:table-cell table:style-name="ce39" table:formula="of:=[.F217]-[.E217]" office:value-type="float" office:value="4.44243843711019E-020" calcext:value-type="float">
            <text:p>4,442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17]-[.H21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7]-[.K217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2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9.2148511043888E-015" calcext:value-type="float">
            <text:p>9,215E-15</text:p>
          </table:table-cell>
          <table:table-cell table:style-name="ce34" table:formula="of:=[.C218]-[.B218]" office:value-type="float" office:value="9.1593511043888E-015" calcext:value-type="float">
            <text:p>9,159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18]-[.E218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18]-[.H218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8]-[.K218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 table:number-columns-repeated="1008"/>
        </table:table-row>
        <table:table-row table:style-name="ro1">
          <table:table-cell table:style-name="ce10" office:value-type="string" calcext:value-type="string">
            <text:p>f23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2.22044604925031E-015" calcext:value-type="float">
            <text:p>2,220E-15</text:p>
          </table:table-cell>
          <table:table-cell table:style-name="ce34" table:formula="of:=[.C219]-[.B219]" office:value-type="float" office:value="2.22044604925031E-015" calcext:value-type="float">
            <text:p>2,220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19]-[.E219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7.27196081129478E-015" calcext:value-type="float">
            <text:p>7,272E-15</text:p>
          </table:table-cell>
          <table:table-cell table:style-name="ce45" table:formula="of:=[.I219]-[.H219]" office:value-type="float" office:value="7.27196081129478E-015" calcext:value-type="float">
            <text:p>7,272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19]-[.K219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4</text:p>
          </table:table-cell>
          <table:table-cell table:style-name="ce17" office:value-type="float" office:value="3.85E-042" calcext:value-type="float">
            <text:p>3,850E-42</text:p>
          </table:table-cell>
          <table:table-cell table:style-name="ce26" office:value-type="float" office:value="3.84831590765204E-042" calcext:value-type="float">
            <text:p>3,848E-42</text:p>
          </table:table-cell>
          <table:table-cell table:style-name="ce34" table:formula="of:=[.C220]-[.B220]" office:value-type="float" office:value="-1.68409234796014E-045" calcext:value-type="float">
            <text:p>-1,684E-45</text:p>
          </table:table-cell>
          <table:table-cell table:style-name="ce17" office:value-type="float" office:value="-3.78E-043" calcext:value-type="float">
            <text:p>-3,780E-43</text:p>
          </table:table-cell>
          <table:table-cell table:style-name="ce26" office:value-type="float" office:value="-2.52271763703809E-030" calcext:value-type="float">
            <text:p>-2,523E-30</text:p>
          </table:table-cell>
          <table:table-cell table:style-name="ce39" table:formula="of:=[.F220]-[.E220]" office:value-type="float" office:value="-2.52271763703771E-030" calcext:value-type="float">
            <text:p>-2,523E-30</text:p>
          </table:table-cell>
          <table:table-cell table:style-name="ce17" office:value-type="float" office:value="6.01E-043" calcext:value-type="float">
            <text:p>6,010E-43</text:p>
          </table:table-cell>
          <table:table-cell table:style-name="ce26" office:value-type="float" office:value="-2.33141032002041E-042" calcext:value-type="float">
            <text:p>-2,331E-42</text:p>
          </table:table-cell>
          <table:table-cell table:style-name="ce45" table:formula="of:=[.I220]-[.H220]" office:value-type="float" office:value="-2.93241032002041E-042" calcext:value-type="float">
            <text:p>-2,932E-42</text:p>
          </table:table-cell>
          <table:table-cell table:style-name="ce17" office:value-type="float" office:value="-1.4E-041" calcext:value-type="float">
            <text:p>-1,400E-41</text:p>
          </table:table-cell>
          <table:table-cell table:style-name="ce26" office:value-type="float" office:value="-1.40129846432481E-041" calcext:value-type="float">
            <text:p>-1,401E-41</text:p>
          </table:table-cell>
          <table:table-cell table:style-name="ce50" table:formula="of:=[.L220]-[.K220]" office:value-type="float" office:value="-1.29846432480985E-044" calcext:value-type="float">
            <text:p>-1,298E-44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5</text:p>
          </table:table-cell>
          <table:table-cell table:style-name="ce17" office:value-type="float" office:value="5.96E-072" calcext:value-type="float">
            <text:p>5,960E-72</text:p>
          </table:table-cell>
          <table:table-cell table:style-name="ce26" office:value-type="float" office:value="5.95816865795037E-072" calcext:value-type="float">
            <text:p>5,958E-72</text:p>
          </table:table-cell>
          <table:table-cell table:style-name="ce34" table:formula="of:=[.C221]-[.B221]" office:value-type="float" office:value="-1.83134204963035E-075" calcext:value-type="float">
            <text:p>-1,831E-75</text:p>
          </table:table-cell>
          <table:table-cell table:style-name="ce17" office:value-type="float" office:value="4.52E-071" calcext:value-type="float">
            <text:p>4,520E-71</text:p>
          </table:table-cell>
          <table:table-cell table:style-name="ce26" office:value-type="float" office:value="-2.8040033089628E-058" calcext:value-type="float">
            <text:p>-2,804E-58</text:p>
          </table:table-cell>
          <table:table-cell table:style-name="ce39" table:formula="of:=[.F221]-[.E221]" office:value-type="float" office:value="-2.80400330896325E-058" calcext:value-type="float">
            <text:p>-2,804E-58</text:p>
          </table:table-cell>
          <table:table-cell table:style-name="ce17" office:value-type="float" office:value="-1.21E-060" calcext:value-type="float">
            <text:p>-1,210E-60</text:p>
          </table:table-cell>
          <table:table-cell table:style-name="ce26" office:value-type="float" office:value="-6.76374089843155E-069" calcext:value-type="float">
            <text:p>-6,764E-69</text:p>
          </table:table-cell>
          <table:table-cell table:style-name="ce45" table:formula="of:=[.I221]-[.H221]" office:value-type="float" office:value="1.20999999323626E-060" calcext:value-type="float">
            <text:p>1,210E-60</text:p>
          </table:table-cell>
          <table:table-cell table:style-name="ce17" office:value-type="float" office:value="-7.66E-071" calcext:value-type="float">
            <text:p>-7,660E-71</text:p>
          </table:table-cell>
          <table:table-cell table:style-name="ce26" office:value-type="float" office:value="-7.66225393254933E-071" calcext:value-type="float">
            <text:p>-7,662E-71</text:p>
          </table:table-cell>
          <table:table-cell table:style-name="ce50" table:formula="of:=[.L221]-[.K221]" office:value-type="float" office:value="-2.25393254933049E-074" calcext:value-type="float">
            <text:p>-2,254E-74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6</text:p>
          </table:table-cell>
          <table:table-cell table:style-name="ce17" office:value-type="float" office:value="-5.87E-044" calcext:value-type="float">
            <text:p>-5,870E-44</text:p>
          </table:table-cell>
          <table:table-cell table:style-name="ce26" office:value-type="float" office:value="-2.0274270820602E-042" calcext:value-type="float">
            <text:p>-2,027E-42</text:p>
          </table:table-cell>
          <table:table-cell table:style-name="ce34" table:formula="of:=[.C222]-[.B222]" office:value-type="float" office:value="-1.9687270820602E-042" calcext:value-type="float">
            <text:p>-1,969E-42</text:p>
          </table:table-cell>
          <table:table-cell table:style-name="ce17" office:value-type="float" office:value="4.08E-044" calcext:value-type="float">
            <text:p>4,080E-44</text:p>
          </table:table-cell>
          <table:table-cell table:style-name="ce26" office:value-type="float" office:value="9.83535721496565E-032" calcext:value-type="float">
            <text:p>9,835E-32</text:p>
          </table:table-cell>
          <table:table-cell table:style-name="ce39" table:formula="of:=[.F222]-[.E222]" office:value-type="float" office:value="9.83535721496157E-032" calcext:value-type="float">
            <text:p>9,835E-32</text:p>
          </table:table-cell>
          <table:table-cell table:style-name="ce17" office:value-type="float" office:value="1.51E-043" calcext:value-type="float">
            <text:p>1,510E-43</text:p>
          </table:table-cell>
          <table:table-cell table:style-name="ce26" office:value-type="float" office:value="8.40402753323709E-043" calcext:value-type="float">
            <text:p>8,404E-43</text:p>
          </table:table-cell>
          <table:table-cell table:style-name="ce45" table:formula="of:=[.I222]-[.H222]" office:value-type="float" office:value="6.89402753323709E-043" calcext:value-type="float">
            <text:p>6,894E-43</text:p>
          </table:table-cell>
          <table:table-cell table:style-name="ce17" office:value-type="float" office:value="9.39E-045" calcext:value-type="float">
            <text:p>9,390E-45</text:p>
          </table:table-cell>
          <table:table-cell table:style-name="ce26" office:value-type="float" office:value="9.38623649101945E-045" calcext:value-type="float">
            <text:p>9,386E-45</text:p>
          </table:table-cell>
          <table:table-cell table:style-name="ce50" table:formula="of:=[.L222]-[.K222]" office:value-type="float" office:value="-3.7635089805499E-048" calcext:value-type="float">
            <text:p>-3,764E-48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34" table:formula="of:=[.C223]-[.B223]" office:value-type="float" office:value="-0" calcext:value-type="float">
            <text:p>-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39" table:formula="of:=[.F223]-[.E223]" office:value-type="float" office:value="-0" calcext:value-type="float">
            <text:p>-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45" table:formula="of:=[.I223]-[.H223]" office:value-type="float" office:value="-0" calcext:value-type="float">
            <text:p>-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50" table:formula="of:=[.L223]-[.K223]" office:value-type="float" office:value="-0" calcext:value-type="float">
            <text:p>-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28</text:p>
          </table:table-cell>
          <table:table-cell table:style-name="ce17" office:value-type="float" office:value="-1.89E-044" calcext:value-type="float">
            <text:p>-1,890E-44</text:p>
          </table:table-cell>
          <table:table-cell table:style-name="ce26" office:value-type="float" office:value="-2.08730412753503E-041" calcext:value-type="float">
            <text:p>-2,087E-41</text:p>
          </table:table-cell>
          <table:table-cell table:style-name="ce34" table:formula="of:=[.C224]-[.B224]" office:value-type="float" office:value="-2.08541412753503E-041" calcext:value-type="float">
            <text:p>-2,085E-41</text:p>
          </table:table-cell>
          <table:table-cell table:style-name="ce17" office:value-type="float" office:value="-5.61E-045" calcext:value-type="float">
            <text:p>-5,610E-45</text:p>
          </table:table-cell>
          <table:table-cell table:style-name="ce26" office:value-type="float" office:value="-1.26501068267088E-032" calcext:value-type="float">
            <text:p>-1,265E-32</text:p>
          </table:table-cell>
          <table:table-cell table:style-name="ce39" table:formula="of:=[.F224]-[.E224]" office:value-type="float" office:value="-1.26501068267032E-032" calcext:value-type="float">
            <text:p>-1,265E-32</text:p>
          </table:table-cell>
          <table:table-cell table:style-name="ce17" office:value-type="float" office:value="-1.09E-039" calcext:value-type="float">
            <text:p>-1,090E-39</text:p>
          </table:table-cell>
          <table:table-cell table:style-name="ce26" office:value-type="float" office:value="6.38466612807995E-041" calcext:value-type="float">
            <text:p>6,385E-41</text:p>
          </table:table-cell>
          <table:table-cell table:style-name="ce45" table:formula="of:=[.I224]-[.H224]" office:value-type="float" office:value="1.1538466612808E-039" calcext:value-type="float">
            <text:p>1,154E-39</text:p>
          </table:table-cell>
          <table:table-cell table:style-name="ce17" office:value-type="float" office:value="7.01E-046" calcext:value-type="float">
            <text:p>7,010E-46</text:p>
          </table:table-cell>
          <table:table-cell table:style-name="ce26" office:value-type="float" office:value="7.00649232162409E-046" calcext:value-type="float">
            <text:p>7,006E-46</text:p>
          </table:table-cell>
          <table:table-cell table:style-name="ce50" table:formula="of:=[.L224]-[.K224]" office:value-type="float" office:value="-3.50767837591039E-049" calcext:value-type="float">
            <text:p>-3,508E-4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29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4" table:formula="of:=[.C225]-[.B22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25]-[.E22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25]-[.H22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25]-[.K225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0</text:p>
          </table:table-cell>
          <table:table-cell table:style-name="ce17" office:value-type="float" office:value="0.000000000000117" calcext:value-type="float">
            <text:p>1,170E-13</text:p>
          </table:table-cell>
          <table:table-cell table:style-name="ce26" office:value-type="float" office:value="0.00000000000455813165" calcext:value-type="float">
            <text:p>4,558E-12</text:p>
          </table:table-cell>
          <table:table-cell table:style-name="ce34" table:formula="of:=[.C226]-[.B226]" office:value-type="float" office:value="0.00000000000444113165" calcext:value-type="float">
            <text:p>4,441E-12</text:p>
          </table:table-cell>
          <table:table-cell table:style-name="ce17" office:value-type="float" office:value="0.000000000000117" calcext:value-type="float">
            <text:p>1,170E-13</text:p>
          </table:table-cell>
          <table:table-cell table:style-name="ce26" office:value-type="float" office:value="0.00000000000011723955" calcext:value-type="float">
            <text:p>1,172E-13</text:p>
          </table:table-cell>
          <table:table-cell table:style-name="ce39" table:formula="of:=[.F226]-[.E226]" office:value-type="float" office:value="2.39551400417004E-016" calcext:value-type="float">
            <text:p>2,396E-16</text:p>
          </table:table-cell>
          <table:table-cell table:style-name="ce17" office:value-type="float" office:value="0.000000000000394" calcext:value-type="float">
            <text:p>3,940E-13</text:p>
          </table:table-cell>
          <table:table-cell table:style-name="ce26" office:value-type="float" office:value="-0.00000000000791189336" calcext:value-type="float">
            <text:p>-7,912E-12</text:p>
          </table:table-cell>
          <table:table-cell table:style-name="ce45" table:formula="of:=[.I226]-[.H226]" office:value-type="float" office:value="-0.00000000000830589336" calcext:value-type="float">
            <text:p>-8,306E-12</text:p>
          </table:table-cell>
          <table:table-cell table:style-name="ce17" office:value-type="float" office:value="-0.000000000000153" calcext:value-type="float">
            <text:p>-1,530E-13</text:p>
          </table:table-cell>
          <table:table-cell table:style-name="ce26" office:value-type="float" office:value="-0.00000000000015276669" calcext:value-type="float">
            <text:p>-1,528E-13</text:p>
          </table:table-cell>
          <table:table-cell table:style-name="ce50" table:formula="of:=[.L226]-[.K226]" office:value-type="float" office:value="2.3331181157801E-016" calcext:value-type="float">
            <text:p>2,333E-1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3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3863576" calcext:value-type="float">
            <text:p>-3,864E-14</text:p>
          </table:table-cell>
          <table:table-cell table:style-name="ce34" table:formula="of:=[.C227]-[.B227]" office:value-type="float" office:value="-0.00000000000003863576" calcext:value-type="float">
            <text:p>-3,864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27]-[.E22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27]-[.H22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27]-[.K227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2</text:p>
          </table:table-cell>
          <table:table-cell table:style-name="ce17" office:value-type="float" office:value="-1.78E-015" calcext:value-type="float">
            <text:p>-1,780E-15</text:p>
          </table:table-cell>
          <table:table-cell table:style-name="ce26" office:value-type="float" office:value="0.00000000000010791368" calcext:value-type="float">
            <text:p>1,079E-13</text:p>
          </table:table-cell>
          <table:table-cell table:style-name="ce34" table:formula="of:=[.C228]-[.B228]" office:value-type="float" office:value="0.00000000000010969368" calcext:value-type="float">
            <text:p>1,097E-13</text:p>
          </table:table-cell>
          <table:table-cell table:style-name="ce17" office:value-type="float" office:value="-1.78E-015" calcext:value-type="float">
            <text:p>-1,780E-15</text:p>
          </table:table-cell>
          <table:table-cell table:style-name="ce26" office:value-type="float" office:value="-1.77635683940025E-015" calcext:value-type="float">
            <text:p>-1,776E-15</text:p>
          </table:table-cell>
          <table:table-cell table:style-name="ce39" table:formula="of:=[.F228]-[.E228]" office:value-type="float" office:value="3.64316059975006E-018" calcext:value-type="float">
            <text:p>3,643E-18</text:p>
          </table:table-cell>
          <table:table-cell table:style-name="ce17" office:value-type="float" office:value="-1.78E-015" calcext:value-type="float">
            <text:p>-1,780E-15</text:p>
          </table:table-cell>
          <table:table-cell table:style-name="ce26" office:value-type="float" office:value="0.00000000000019495516" calcext:value-type="float">
            <text:p>1,950E-13</text:p>
          </table:table-cell>
          <table:table-cell table:style-name="ce45" table:formula="of:=[.I228]-[.H228]" office:value-type="float" office:value="0.00000000000019673516" calcext:value-type="float">
            <text:p>1,967E-13</text:p>
          </table:table-cell>
          <table:table-cell table:style-name="ce17" office:value-type="float" office:value="2.22E-015" calcext:value-type="float">
            <text:p>2,220E-15</text:p>
          </table:table-cell>
          <table:table-cell table:style-name="ce26" office:value-type="float" office:value="2.22044604925031E-015" calcext:value-type="float">
            <text:p>2,220E-15</text:p>
          </table:table-cell>
          <table:table-cell table:style-name="ce50" table:formula="of:=[.L228]-[.K228]" office:value-type="float" office:value="4.46049250309745E-019" calcext:value-type="float">
            <text:p>4,460E-19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3</text:p>
          </table:table-cell>
          <table:table-cell table:style-name="ce17" office:value-type="float" office:value="1.11E-016" calcext:value-type="float">
            <text:p>1,110E-16</text:p>
          </table:table-cell>
          <table:table-cell table:style-name="ce26" office:value-type="float" office:value="-0.00000000000001665335" calcext:value-type="float">
            <text:p>-1,665E-14</text:p>
          </table:table-cell>
          <table:table-cell table:style-name="ce34" table:formula="of:=[.C229]-[.B229]" office:value-type="float" office:value="-0.00000000000001676435" calcext:value-type="float">
            <text:p>-1,676E-14</text:p>
          </table:table-cell>
          <table:table-cell table:style-name="ce17" office:value-type="float" office:value="1.11E-016" calcext:value-type="float">
            <text:p>1,110E-16</text:p>
          </table:table-cell>
          <table:table-cell table:style-name="ce26" office:value-type="float" office:value="1.11022302462516E-016" calcext:value-type="float">
            <text:p>1,110E-16</text:p>
          </table:table-cell>
          <table:table-cell table:style-name="ce39" table:formula="of:=[.F229]-[.E229]" office:value-type="float" office:value="2.23024625159951E-020" calcext:value-type="float">
            <text:p>2,230E-20</text:p>
          </table:table-cell>
          <table:table-cell table:style-name="ce17" office:value-type="float" office:value="1.11E-016" calcext:value-type="float">
            <text:p>1,110E-16</text:p>
          </table:table-cell>
          <table:table-cell table:style-name="ce26" office:value-type="float" office:value="-0.00000000000002819966" calcext:value-type="float">
            <text:p>-2,820E-14</text:p>
          </table:table-cell>
          <table:table-cell table:style-name="ce45" table:formula="of:=[.I229]-[.H229]" office:value-type="float" office:value="-0.00000000000002831066" calcext:value-type="float">
            <text:p>-2,831E-14</text:p>
          </table:table-cell>
          <table:table-cell table:style-name="ce17" office:value-type="float" office:value="-2.22E-016" calcext:value-type="float">
            <text:p>-2,220E-16</text:p>
          </table:table-cell>
          <table:table-cell table:style-name="ce26" office:value-type="float" office:value="-2.22044604925031E-016" calcext:value-type="float">
            <text:p>-2,220E-16</text:p>
          </table:table-cell>
          <table:table-cell table:style-name="ce50" table:formula="of:=[.L229]-[.K229]" office:value-type="float" office:value="-4.46049250310041E-020" calcext:value-type="float">
            <text:p>-4,460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1232348" calcext:value-type="float">
            <text:p>-1,232E-14</text:p>
          </table:table-cell>
          <table:table-cell table:style-name="ce34" table:formula="of:=[.C230]-[.B230]" office:value-type="float" office:value="-0.00000000000001232348" calcext:value-type="float">
            <text:p>-1,232E-14</text:p>
          </table:table-cell>
          <table:table-cell table:style-name="ce17" office:value-type="float" office:value="1.11E-016" calcext:value-type="float">
            <text:p>1,110E-16</text:p>
          </table:table-cell>
          <table:table-cell table:style-name="ce26" office:value-type="float" office:value="1.11022302462516E-016" calcext:value-type="float">
            <text:p>1,110E-16</text:p>
          </table:table-cell>
          <table:table-cell table:style-name="ce39" table:formula="of:=[.F230]-[.E230]" office:value-type="float" office:value="2.23024625159951E-020" calcext:value-type="float">
            <text:p>2,230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409983" calcext:value-type="float">
            <text:p>1,410E-14</text:p>
          </table:table-cell>
          <table:table-cell table:style-name="ce45" table:formula="of:=[.I230]-[.H230]" office:value-type="float" office:value="0.00000000000001409983" calcext:value-type="float">
            <text:p>1,410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30]-[.K230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5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-0.00000000000004270195" calcext:value-type="float">
            <text:p>-4,270E-14</text:p>
          </table:table-cell>
          <table:table-cell table:style-name="ce34" table:formula="of:=[.C231]-[.B231]" office:value-type="float" office:value="-0.00000000000004274355" calcext:value-type="float">
            <text:p>-4,274E-14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4.16333634234434E-017" calcext:value-type="float">
            <text:p>4,163E-17</text:p>
          </table:table-cell>
          <table:table-cell table:style-name="ce39" table:formula="of:=[.F231]-[.E231]" office:value-type="float" office:value="3.33634234434006E-020" calcext:value-type="float">
            <text:p>3,336E-20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-0.00000000000004159173" calcext:value-type="float">
            <text:p>-4,159E-14</text:p>
          </table:table-cell>
          <table:table-cell table:style-name="ce45" table:formula="of:=[.I231]-[.H231]" office:value-type="float" office:value="-0.00000000000004163333" calcext:value-type="float">
            <text:p>-4,163E-14</text:p>
          </table:table-cell>
          <table:table-cell table:style-name="ce17" office:value-type="float" office:value="5.97E-016" calcext:value-type="float">
            <text:p>5,970E-16</text:p>
          </table:table-cell>
          <table:table-cell table:style-name="ce26" office:value-type="float" office:value="5.96744875736022E-016" calcext:value-type="float">
            <text:p>5,967E-16</text:p>
          </table:table-cell>
          <table:table-cell table:style-name="ce50" table:formula="of:=[.L231]-[.K231]" office:value-type="float" office:value="-2.55124263978002E-019" calcext:value-type="float">
            <text:p>-2,551E-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36</text:p>
          </table:table-cell>
          <table:table-cell table:style-name="ce17" office:value-type="float" office:value="0.00102" calcext:value-type="float">
            <text:p>1,020E-03</text:p>
          </table:table-cell>
          <table:table-cell table:style-name="ce26" office:value-type="float" office:value="-0.00124553173889237" calcext:value-type="float">
            <text:p>-1,246E-03</text:p>
          </table:table-cell>
          <table:table-cell table:style-name="ce34" table:formula="of:=[.C232]-[.B232]" office:value-type="float" office:value="-0.00226553173889237" calcext:value-type="float">
            <text:p>-2,266E-03</text:p>
          </table:table-cell>
          <table:table-cell table:style-name="ce17" office:value-type="float" office:value="0.00104" calcext:value-type="float">
            <text:p>1,040E-03</text:p>
          </table:table-cell>
          <table:table-cell table:style-name="ce26" office:value-type="float" office:value="0.00104078394202683" calcext:value-type="float">
            <text:p>1,041E-03</text:p>
          </table:table-cell>
          <table:table-cell table:style-name="ce39" table:formula="of:=[.F232]-[.E232]" office:value-type="float" office:value="0.0000007839420268301" calcext:value-type="float">
            <text:p>7,839E-07</text:p>
          </table:table-cell>
          <table:table-cell table:style-name="ce17" office:value-type="float" office:value="-0.000889" calcext:value-type="float">
            <text:p>-8,890E-04</text:p>
          </table:table-cell>
          <table:table-cell table:style-name="ce26" office:value-type="float" office:value="0.00134739224752072" calcext:value-type="float">
            <text:p>1,347E-03</text:p>
          </table:table-cell>
          <table:table-cell table:style-name="ce45" table:formula="of:=[.I232]-[.H232]" office:value-type="float" office:value="0.00223639224752072" calcext:value-type="float">
            <text:p>2,236E-03</text:p>
          </table:table-cell>
          <table:table-cell table:style-name="ce17" office:value-type="float" office:value="0.00111" calcext:value-type="float">
            <text:p>1,110E-03</text:p>
          </table:table-cell>
          <table:table-cell table:style-name="ce26" office:value-type="float" office:value="0.00110738923596975" calcext:value-type="float">
            <text:p>1,107E-03</text:p>
          </table:table-cell>
          <table:table-cell table:style-name="ce50" table:formula="of:=[.L232]-[.K232]" office:value-type="float" office:value="-0.00000261076403024999" calcext:value-type="float">
            <text:p>-2,611E-06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1.14352971536391E-017" calcext:value-type="float">
            <text:p>1,144E-17</text:p>
          </table:table-cell>
          <table:table-cell table:style-name="ce34" table:formula="of:=[.C233]-[.B233]" office:value-type="float" office:value="1.14352971536391E-017" calcext:value-type="float">
            <text:p>1,144E-1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33]-[.E23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33]-[.H23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33]-[.K233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38</text:p>
          </table:table-cell>
          <table:table-cell table:style-name="ce17" office:value-type="float" office:value="-0.5" calcext:value-type="float">
            <text:p>-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34" table:formula="of:=[.C234]-[.B234]" office:value-type="float" office:value="1" calcext:value-type="float">
            <text:p>1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39" table:formula="of:=[.F234]-[.E234]" office:value-type="float" office:value="0" calcext:value-type="float">
            <text:p>0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45" table:formula="of:=[.I234]-[.H234]" office:value-type="float" office:value="0" calcext:value-type="float">
            <text:p>0,000E+00</text:p>
          </table:table-cell>
          <table:table-cell table:style-name="ce17" office:value-type="float" office:value="-0.5" calcext:value-type="float">
            <text:p>-5,000E-01</text:p>
          </table:table-cell>
          <table:table-cell table:style-name="ce26" office:value-type="float" office:value="-0.5" calcext:value-type="float">
            <text:p>-5,000E-01</text:p>
          </table:table-cell>
          <table:table-cell table:style-name="ce50" table:formula="of:=[.L234]-[.K234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39</text:p>
          </table:table-cell>
          <table:table-cell table:style-name="ce17" office:value-type="float" office:value="-0.001" calcext:value-type="float">
            <text:p>-1,000E-03</text:p>
          </table:table-cell>
          <table:table-cell table:style-name="ce26" office:value-type="float" office:value="0.999" calcext:value-type="float">
            <text:p>9,990E-01</text:p>
          </table:table-cell>
          <table:table-cell table:style-name="ce34" table:formula="of:=[.C235]-[.B235]" office:value-type="float" office:value="1" calcext:value-type="float">
            <text:p>1,000E+00</text:p>
          </table:table-cell>
          <table:table-cell table:style-name="ce17" office:value-type="float" office:value="-0.001" calcext:value-type="float">
            <text:p>-1,000E-03</text:p>
          </table:table-cell>
          <table:table-cell table:style-name="ce26" office:value-type="float" office:value="-0.001" calcext:value-type="float">
            <text:p>-1,000E-03</text:p>
          </table:table-cell>
          <table:table-cell table:style-name="ce39" table:formula="of:=[.F235]-[.E235]" office:value-type="float" office:value="0" calcext:value-type="float">
            <text:p>0,000E+00</text:p>
          </table:table-cell>
          <table:table-cell table:style-name="ce17" office:value-type="float" office:value="-0.001" calcext:value-type="float">
            <text:p>-1,000E-03</text:p>
          </table:table-cell>
          <table:table-cell table:style-name="ce26" office:value-type="float" office:value="0.999" calcext:value-type="float">
            <text:p>9,990E-01</text:p>
          </table:table-cell>
          <table:table-cell table:style-name="ce45" table:formula="of:=[.I235]-[.H235]" office:value-type="float" office:value="1" calcext:value-type="float">
            <text:p>1,000E+00</text:p>
          </table:table-cell>
          <table:table-cell table:style-name="ce17" office:value-type="float" office:value="-0.001" calcext:value-type="float">
            <text:p>-1,000E-03</text:p>
          </table:table-cell>
          <table:table-cell table:style-name="ce26" office:value-type="float" office:value="-0.001" calcext:value-type="float">
            <text:p>-1,000E-03</text:p>
          </table:table-cell>
          <table:table-cell table:style-name="ce50" table:formula="of:=[.L235]-[.K235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40</text:p>
          </table:table-cell>
          <table:table-cell table:style-name="ce17" office:value-type="float" office:value="-360288000000000" calcext:value-type="float">
            <text:p>-3,603E+14</text:p>
          </table:table-cell>
          <table:table-cell table:style-name="ce26" office:value-type="float" office:value="333599972397814" calcext:value-type="float">
            <text:p>3,336E+14</text:p>
          </table:table-cell>
          <table:table-cell table:style-name="ce34" table:formula="of:=[.C236]-[.B236]" office:value-type="float" office:value="693887972397814" calcext:value-type="float">
            <text:p>6,939E+14</text:p>
          </table:table-cell>
          <table:table-cell table:style-name="ce17" office:value-type="float" office:value="-105967000000000" calcext:value-type="float">
            <text:p>-1,060E+14</text:p>
          </table:table-cell>
          <table:table-cell table:style-name="ce26" office:value-type="float" office:value="-103531025916563" calcext:value-type="float">
            <text:p>-1,035E+14</text:p>
          </table:table-cell>
          <table:table-cell table:style-name="ce39" table:formula="of:=[.F236]-[.E236]" office:value-type="float" office:value="2435974083437" calcext:value-type="float">
            <text:p>2,436E+12</text:p>
          </table:table-cell>
          <table:table-cell table:style-name="ce17" office:value-type="float" office:value="-648840000000" calcext:value-type="float">
            <text:p>-6,488E+11</text:p>
          </table:table-cell>
          <table:table-cell table:style-name="ce26" office:value-type="float" office:value="77648269437422.3" calcext:value-type="float">
            <text:p>7,765E+13</text:p>
          </table:table-cell>
          <table:table-cell table:style-name="ce45" table:formula="of:=[.I236]-[.H236]" office:value-type="float" office:value="78297109437422.3" calcext:value-type="float">
            <text:p>7,830E+13</text:p>
          </table:table-cell>
          <table:table-cell table:style-name="ce17" office:value-type="float" office:value="-692861000000000" calcext:value-type="float">
            <text:p>-6,929E+14</text:p>
          </table:table-cell>
          <table:table-cell table:style-name="ce26" office:value-type="float" office:value="-692861481133922" calcext:value-type="float">
            <text:p>-6,929E+14</text:p>
          </table:table-cell>
          <table:table-cell table:style-name="ce50" table:formula="of:=[.L236]-[.K236]" office:value-type="float" office:value="-481133922" calcext:value-type="float">
            <text:p>-4,811E+08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4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2475797" calcext:value-type="float">
            <text:p>2,476E-14</text:p>
          </table:table-cell>
          <table:table-cell table:style-name="ce34" table:formula="of:=[.C237]-[.B237]" office:value-type="float" office:value="0.00000000000002475797" calcext:value-type="float">
            <text:p>2,476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37]-[.E23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37]-[.H237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37]-[.K237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42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6394885" calcext:value-type="float">
            <text:p>6,395E-14</text:p>
          </table:table-cell>
          <table:table-cell table:style-name="ce34" table:formula="of:=[.C238]-[.B238]" office:value-type="float" office:value="0.00000000000006394885" calcext:value-type="float">
            <text:p>6,395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38]-[.E238]" office:value-type="float" office:value="0" calcext:value-type="float">
            <text:p>0,000E+00</text:p>
          </table:table-cell>
          <table:table-cell table:style-name="ce17" office:value-type="float" office:value="-2.66E-015" calcext:value-type="float">
            <text:p>-2,660E-15</text:p>
          </table:table-cell>
          <table:table-cell table:style-name="ce26" office:value-type="float" office:value="-0.00000000000002131628" calcext:value-type="float">
            <text:p>-2,132E-14</text:p>
          </table:table-cell>
          <table:table-cell table:style-name="ce45" table:formula="of:=[.I238]-[.H238]" office:value-type="float" office:value="-0.00000000000001865628" calcext:value-type="float">
            <text:p>-1,866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50" table:formula="of:=[.L238]-[.K238]" office:value-type="float" office:value="-0" calcext:value-type="float">
            <text:p>-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43</text:p>
          </table:table-cell>
          <table:table-cell table:style-name="ce17" office:value-type="float" office:value="-3.53E-045" calcext:value-type="float">
            <text:p>-3,530E-45</text:p>
          </table:table-cell>
          <table:table-cell table:style-name="ce26" office:value-type="float" office:value="1.5134023414708E-043" calcext:value-type="float">
            <text:p>1,513E-43</text:p>
          </table:table-cell>
          <table:table-cell table:style-name="ce34" table:formula="of:=[.C239]-[.B239]" office:value-type="float" office:value="1.5487023414708E-043" calcext:value-type="float">
            <text:p>1,549E-43</text:p>
          </table:table-cell>
          <table:table-cell table:style-name="ce17" office:value-type="float" office:value="-5.52E-045" calcext:value-type="float">
            <text:p>-5,520E-45</text:p>
          </table:table-cell>
          <table:table-cell table:style-name="ce26" office:value-type="float" office:value="-3.81068453020973E-036" calcext:value-type="float">
            <text:p>-3,811E-36</text:p>
          </table:table-cell>
          <table:table-cell table:style-name="ce39" table:formula="of:=[.F239]-[.E239]" office:value-type="float" office:value="-3.81068452468973E-036" calcext:value-type="float">
            <text:p>-3,811E-36</text:p>
          </table:table-cell>
          <table:table-cell table:style-name="ce17" office:value-type="float" office:value="2.37E-046" calcext:value-type="float">
            <text:p>2,370E-46</text:p>
          </table:table-cell>
          <table:table-cell table:style-name="ce26" office:value-type="float" office:value="-9.58053182348883E-045" calcext:value-type="float">
            <text:p>-9,581E-45</text:p>
          </table:table-cell>
          <table:table-cell table:style-name="ce45" table:formula="of:=[.I239]-[.H239]" office:value-type="float" office:value="-9.81753182348883E-045" calcext:value-type="float">
            <text:p>-9,818E-45</text:p>
          </table:table-cell>
          <table:table-cell table:style-name="ce17" office:value-type="float" office:value="7.01E-046" calcext:value-type="float">
            <text:p>7,010E-46</text:p>
          </table:table-cell>
          <table:table-cell table:style-name="ce26" office:value-type="float" office:value="7.00649232162409E-046" calcext:value-type="float">
            <text:p>7,006E-46</text:p>
          </table:table-cell>
          <table:table-cell table:style-name="ce50" table:formula="of:=[.L239]-[.K239]" office:value-type="float" office:value="-3.50767837591039E-049" calcext:value-type="float">
            <text:p>-3,508E-4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44</text:p>
          </table:table-cell>
          <table:table-cell table:style-name="ce17" office:value-type="float" office:value="-1.01E-073" calcext:value-type="float">
            <text:p>-1,010E-73</text:p>
          </table:table-cell>
          <table:table-cell table:style-name="ce26" office:value-type="float" office:value="4.29791018780252E-072" calcext:value-type="float">
            <text:p>4,298E-72</text:p>
          </table:table-cell>
          <table:table-cell table:style-name="ce34" table:formula="of:=[.C240]-[.B240]" office:value-type="float" office:value="4.39891018780252E-072" calcext:value-type="float">
            <text:p>4,399E-72</text:p>
          </table:table-cell>
          <table:table-cell table:style-name="ce17" office:value-type="float" office:value="8.83E-074" calcext:value-type="float">
            <text:p>8,830E-74</text:p>
          </table:table-cell>
          <table:table-cell table:style-name="ce26" office:value-type="float" office:value="-5.63914336139682E-057" calcext:value-type="float">
            <text:p>-5,639E-57</text:p>
          </table:table-cell>
          <table:table-cell table:style-name="ce39" table:formula="of:=[.F240]-[.E240]" office:value-type="float" office:value="-5.63914336139682E-057" calcext:value-type="float">
            <text:p>-5,639E-57</text:p>
          </table:table-cell>
          <table:table-cell table:style-name="ce17" office:value-type="float" office:value="-1.05E-056" calcext:value-type="float">
            <text:p>-1,050E-56</text:p>
          </table:table-cell>
          <table:table-cell table:style-name="ce26" office:value-type="float" office:value="1.31777573258297E-072" calcext:value-type="float">
            <text:p>1,318E-72</text:p>
          </table:table-cell>
          <table:table-cell table:style-name="ce45" table:formula="of:=[.I240]-[.H240]" office:value-type="float" office:value="1.05E-056" calcext:value-type="float">
            <text:p>1,050E-56</text:p>
          </table:table-cell>
          <table:table-cell table:style-name="ce17" office:value-type="float" office:value="5.53E-076" calcext:value-type="float">
            <text:p>5,530E-76</text:p>
          </table:table-cell>
          <table:table-cell table:style-name="ce26" office:value-type="float" office:value="5.52714787526044E-076" calcext:value-type="float">
            <text:p>5,527E-76</text:p>
          </table:table-cell>
          <table:table-cell table:style-name="ce50" table:formula="of:=[.L240]-[.K240]" office:value-type="float" office:value="-2.85212473955946E-079" calcext:value-type="float">
            <text:p>-2,852E-7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45</text:p>
          </table:table-cell>
          <table:table-cell table:style-name="ce17" office:value-type="float" office:value="-2.52E-102" calcext:value-type="float">
            <text:p>-2,520E-102</text:p>
          </table:table-cell>
          <table:table-cell table:style-name="ce26" office:value-type="float" office:value="1.22056319567106E-100" calcext:value-type="float">
            <text:p>1,221E-100</text:p>
          </table:table-cell>
          <table:table-cell table:style-name="ce34" table:formula="of:=[.C241]-[.B241]" office:value-type="float" office:value="1.24576319567106E-100" calcext:value-type="float">
            <text:p>1,246E-100</text:p>
          </table:table-cell>
          <table:table-cell table:style-name="ce17" office:value-type="float" office:value="-2.73E-105" calcext:value-type="float">
            <text:p>-2,730E-105</text:p>
          </table:table-cell>
          <table:table-cell table:style-name="ce26" office:value-type="float" office:value="1.20813174907942E-074" calcext:value-type="float">
            <text:p>1,208E-74</text:p>
          </table:table-cell>
          <table:table-cell table:style-name="ce39" table:formula="of:=[.F241]-[.E241]" office:value-type="float" office:value="1.20813174907942E-074" calcext:value-type="float">
            <text:p>1,208E-74</text:p>
          </table:table-cell>
          <table:table-cell table:style-name="ce17" office:value-type="float" office:value="-9.45E-072" calcext:value-type="float">
            <text:p>-9,450E-72</text:p>
          </table:table-cell>
          <table:table-cell table:style-name="ce26" office:value-type="float" office:value="-5.93899081568777E-101" calcext:value-type="float">
            <text:p>-5,939E-101</text:p>
          </table:table-cell>
          <table:table-cell table:style-name="ce45" table:formula="of:=[.I241]-[.H241]" office:value-type="float" office:value="9.45E-072" calcext:value-type="float">
            <text:p>9,450E-72</text:p>
          </table:table-cell>
          <table:table-cell table:style-name="ce17" office:value-type="float" office:value="4.36E-106" calcext:value-type="float">
            <text:p>4,360E-106</text:p>
          </table:table-cell>
          <table:table-cell table:style-name="ce26" office:value-type="float" office:value="4.36015087616835E-106" calcext:value-type="float">
            <text:p>4,360E-106</text:p>
          </table:table-cell>
          <table:table-cell table:style-name="ce50" table:formula="of:=[.L241]-[.K241]" office:value-type="float" office:value="1.50876168350288E-110" calcext:value-type="float">
            <text:p>1,509E-11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46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171055441079" calcext:value-type="float">
            <text:p>1,711E-09</text:p>
          </table:table-cell>
          <table:table-cell table:style-name="ce34" table:formula="of:=[.C242]-[.B242]" office:value-type="float" office:value="0.00000000171055441079" calcext:value-type="float">
            <text:p>1,711E-09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42]-[.E242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42]-[.H242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42]-[.K242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47</text:p>
          </table:table-cell>
          <table:table-cell table:style-name="ce17" office:value-type="float" office:value="-6.66E-016" calcext:value-type="float">
            <text:p>-6,660E-16</text:p>
          </table:table-cell>
          <table:table-cell table:style-name="ce26" office:value-type="float" office:value="0.00000000000408140188" calcext:value-type="float">
            <text:p>4,081E-12</text:p>
          </table:table-cell>
          <table:table-cell table:style-name="ce34" table:formula="of:=[.C243]-[.B243]" office:value-type="float" office:value="0.00000000000408206788" calcext:value-type="float">
            <text:p>4,082E-12</text:p>
          </table:table-cell>
          <table:table-cell table:style-name="ce17" office:value-type="float" office:value="-6.66E-016" calcext:value-type="float">
            <text:p>-6,660E-16</text:p>
          </table:table-cell>
          <table:table-cell table:style-name="ce26" office:value-type="float" office:value="-6.66133814775094E-016" calcext:value-type="float">
            <text:p>-6,661E-16</text:p>
          </table:table-cell>
          <table:table-cell table:style-name="ce39" table:formula="of:=[.F243]-[.E243]" office:value-type="float" office:value="-1.33814775094048E-019" calcext:value-type="float">
            <text:p>-1,338E-19</text:p>
          </table:table-cell>
          <table:table-cell table:style-name="ce17" office:value-type="float" office:value="1.11E-015" calcext:value-type="float">
            <text:p>1,110E-15</text:p>
          </table:table-cell>
          <table:table-cell table:style-name="ce26" office:value-type="float" office:value="0.00000000000098876463" calcext:value-type="float">
            <text:p>9,888E-13</text:p>
          </table:table-cell>
          <table:table-cell table:style-name="ce45" table:formula="of:=[.I243]-[.H243]" office:value-type="float" office:value="0.00000000000098765463" calcext:value-type="float">
            <text:p>9,877E-13</text:p>
          </table:table-cell>
          <table:table-cell table:style-name="ce17" office:value-type="float" office:value="1.11E-015" calcext:value-type="float">
            <text:p>1,110E-15</text:p>
          </table:table-cell>
          <table:table-cell table:style-name="ce26" office:value-type="float" office:value="1.11022302462516E-015" calcext:value-type="float">
            <text:p>1,110E-15</text:p>
          </table:table-cell>
          <table:table-cell table:style-name="ce50" table:formula="of:=[.L243]-[.K243]" office:value-type="float" office:value="2.2302462516E-019" calcext:value-type="float">
            <text:p>2,230E-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48</text:p>
          </table:table-cell>
          <table:table-cell table:style-name="ce17" office:value-type="float" office:value="2.89E-015" calcext:value-type="float">
            <text:p>2,890E-15</text:p>
          </table:table-cell>
          <table:table-cell table:style-name="ce26" office:value-type="float" office:value="0.00000000003970090923" calcext:value-type="float">
            <text:p>3,970E-11</text:p>
          </table:table-cell>
          <table:table-cell table:style-name="ce34" table:formula="of:=[.C244]-[.B244]" office:value-type="float" office:value="0.00000000003969801923" calcext:value-type="float">
            <text:p>3,970E-11</text:p>
          </table:table-cell>
          <table:table-cell table:style-name="ce17" office:value-type="float" office:value="-0.00000000000032" calcext:value-type="float">
            <text:p>-3,200E-13</text:p>
          </table:table-cell>
          <table:table-cell table:style-name="ce26" office:value-type="float" office:value="-0.00000000000032041036" calcext:value-type="float">
            <text:p>-3,204E-13</text:p>
          </table:table-cell>
          <table:table-cell table:style-name="ce39" table:formula="of:=[.F244]-[.E244]" office:value-type="float" office:value="-4.10364906819976E-016" calcext:value-type="float">
            <text:p>-4,104E-16</text:p>
          </table:table-cell>
          <table:table-cell table:style-name="ce17" office:value-type="float" office:value="2.89E-015" calcext:value-type="float">
            <text:p>2,890E-15</text:p>
          </table:table-cell>
          <table:table-cell table:style-name="ce26" office:value-type="float" office:value="-0.0000000000588193938" calcext:value-type="float">
            <text:p>-5,882E-11</text:p>
          </table:table-cell>
          <table:table-cell table:style-name="ce45" table:formula="of:=[.I244]-[.H244]" office:value-type="float" office:value="-0.0000000000588222838" calcext:value-type="float">
            <text:p>-5,882E-11</text:p>
          </table:table-cell>
          <table:table-cell table:style-name="ce17" office:value-type="float" office:value="2.89E-015" calcext:value-type="float">
            <text:p>2,890E-15</text:p>
          </table:table-cell>
          <table:table-cell table:style-name="ce26" office:value-type="float" office:value="2.88657986402541E-015" calcext:value-type="float">
            <text:p>2,887E-15</text:p>
          </table:table-cell>
          <table:table-cell table:style-name="ce50" table:formula="of:=[.L244]-[.K244]" office:value-type="float" office:value="-3.42013597458986E-018" calcext:value-type="float">
            <text:p>-3,420E-18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49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-6.77236045021345E-015" calcext:value-type="float">
            <text:p>-6,772E-15</text:p>
          </table:table-cell>
          <table:table-cell table:style-name="ce34" table:formula="of:=[.C245]-[.B245]" office:value-type="float" office:value="-6.66136045021345E-015" calcext:value-type="float">
            <text:p>-6,661E-15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-1.11022302462516E-016" calcext:value-type="float">
            <text:p>-1,110E-16</text:p>
          </table:table-cell>
          <table:table-cell table:style-name="ce39" table:formula="of:=[.F245]-[.E245]" office:value-type="float" office:value="-2.23024625159951E-020" calcext:value-type="float">
            <text:p>-2,230E-20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8.88178419700125E-016" calcext:value-type="float">
            <text:p>8,882E-16</text:p>
          </table:table-cell>
          <table:table-cell table:style-name="ce45" table:formula="of:=[.I245]-[.H245]" office:value-type="float" office:value="4.44178419700125E-016" calcext:value-type="float">
            <text:p>4,442E-16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-1.11022302462516E-016" calcext:value-type="float">
            <text:p>-1,110E-16</text:p>
          </table:table-cell>
          <table:table-cell table:style-name="ce50" table:formula="of:=[.L245]-[.K245]" office:value-type="float" office:value="-2.23024625159951E-020" calcext:value-type="float">
            <text:p>-2,230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5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3552714" calcext:value-type="float">
            <text:p>3,553E-14</text:p>
          </table:table-cell>
          <table:table-cell table:style-name="ce34" table:formula="of:=[.C246]-[.B246]" office:value-type="float" office:value="0.00000000000003552714" calcext:value-type="float">
            <text:p>3,553E-14</text:p>
          </table:table-cell>
          <table:table-cell table:style-name="ce17" office:value-type="float" office:value="4E-015" calcext:value-type="float">
            <text:p>4,000E-15</text:p>
          </table:table-cell>
          <table:table-cell table:style-name="ce26" office:value-type="float" office:value="3.99680288865056E-015" calcext:value-type="float">
            <text:p>3,997E-15</text:p>
          </table:table-cell>
          <table:table-cell table:style-name="ce39" table:formula="of:=[.F246]-[.E246]" office:value-type="float" office:value="-3.19711134943992E-018" calcext:value-type="float">
            <text:p>-3,197E-1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46]-[.H246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46]-[.K246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5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1.77635683940025E-015" calcext:value-type="float">
            <text:p>-1,776E-15</text:p>
          </table:table-cell>
          <table:table-cell table:style-name="ce34" table:formula="of:=[.C247]-[.B247]" office:value-type="float" office:value="-1.77635683940025E-015" calcext:value-type="float">
            <text:p>-1,776E-15</text:p>
          </table:table-cell>
          <table:table-cell table:style-name="ce17" office:value-type="float" office:value="2.22E-016" calcext:value-type="float">
            <text:p>2,220E-16</text:p>
          </table:table-cell>
          <table:table-cell table:style-name="ce26" office:value-type="float" office:value="2.22044604925031E-016" calcext:value-type="float">
            <text:p>2,220E-16</text:p>
          </table:table-cell>
          <table:table-cell table:style-name="ce39" table:formula="of:=[.F247]-[.E247]" office:value-type="float" office:value="4.46049250310041E-020" calcext:value-type="float">
            <text:p>4,460E-2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9.99200722162636E-015" calcext:value-type="float">
            <text:p>9,992E-15</text:p>
          </table:table-cell>
          <table:table-cell table:style-name="ce45" table:formula="of:=[.I247]-[.H247]" office:value-type="float" office:value="9.99200722162636E-015" calcext:value-type="float">
            <text:p>9,992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47]-[.K247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52</text:p>
          </table:table-cell>
          <table:table-cell table:style-name="ce17" office:value-type="float" office:value="9.99E-016" calcext:value-type="float">
            <text:p>9,990E-16</text:p>
          </table:table-cell>
          <table:table-cell table:style-name="ce26" office:value-type="float" office:value="-9.99200722162641E-015" calcext:value-type="float">
            <text:p>-9,992E-15</text:p>
          </table:table-cell>
          <table:table-cell table:style-name="ce34" table:formula="of:=[.C248]-[.B248]" office:value-type="float" office:value="-0.00000000000001099101" calcext:value-type="float">
            <text:p>-1,099E-14</text:p>
          </table:table-cell>
          <table:table-cell table:style-name="ce17" office:value-type="float" office:value="9.99E-016" calcext:value-type="float">
            <text:p>9,990E-16</text:p>
          </table:table-cell>
          <table:table-cell table:style-name="ce26" office:value-type="float" office:value="9.99200722162641E-016" calcext:value-type="float">
            <text:p>9,992E-16</text:p>
          </table:table-cell>
          <table:table-cell table:style-name="ce39" table:formula="of:=[.F248]-[.E248]" office:value-type="float" office:value="2.00722162641022E-019" calcext:value-type="float">
            <text:p>2,007E-19</text:p>
          </table:table-cell>
          <table:table-cell table:style-name="ce17" office:value-type="float" office:value="9.99E-016" calcext:value-type="float">
            <text:p>9,990E-16</text:p>
          </table:table-cell>
          <table:table-cell table:style-name="ce26" office:value-type="float" office:value="0.00000000000009869883" calcext:value-type="float">
            <text:p>9,870E-14</text:p>
          </table:table-cell>
          <table:table-cell table:style-name="ce45" table:formula="of:=[.I248]-[.H248]" office:value-type="float" office:value="0.00000000000009769983" calcext:value-type="float">
            <text:p>9,770E-14</text:p>
          </table:table-cell>
          <table:table-cell table:style-name="ce17" office:value-type="float" office:value="9.99E-016" calcext:value-type="float">
            <text:p>9,990E-16</text:p>
          </table:table-cell>
          <table:table-cell table:style-name="ce26" office:value-type="float" office:value="9.99200722162641E-016" calcext:value-type="float">
            <text:p>9,992E-16</text:p>
          </table:table-cell>
          <table:table-cell table:style-name="ce50" table:formula="of:=[.L248]-[.K248]" office:value-type="float" office:value="2.00722162641022E-019" calcext:value-type="float">
            <text:p>2,007E-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53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6.66133814775094E-015" calcext:value-type="float">
            <text:p>6,661E-15</text:p>
          </table:table-cell>
          <table:table-cell table:style-name="ce34" table:formula="of:=[.C249]-[.B249]" office:value-type="float" office:value="6.21733814775094E-015" calcext:value-type="float">
            <text:p>6,217E-15</text:p>
          </table:table-cell>
          <table:table-cell table:style-name="ce17" office:value-type="float" office:value="-2.22E-016" calcext:value-type="float">
            <text:p>-2,220E-16</text:p>
          </table:table-cell>
          <table:table-cell table:style-name="ce26" office:value-type="float" office:value="-2.22044604925031E-016" calcext:value-type="float">
            <text:p>-2,220E-16</text:p>
          </table:table-cell>
          <table:table-cell table:style-name="ce39" table:formula="of:=[.F249]-[.E249]" office:value-type="float" office:value="-4.46049250310041E-020" calcext:value-type="float">
            <text:p>-4,460E-20</text:p>
          </table:table-cell>
          <table:table-cell table:style-name="ce17" office:value-type="float" office:value="6.66E-016" calcext:value-type="float">
            <text:p>6,660E-16</text:p>
          </table:table-cell>
          <table:table-cell table:style-name="ce26" office:value-type="float" office:value="0.00000000000001731948" calcext:value-type="float">
            <text:p>1,732E-14</text:p>
          </table:table-cell>
          <table:table-cell table:style-name="ce45" table:formula="of:=[.I249]-[.H249]" office:value-type="float" office:value="0.00000000000001665348" calcext:value-type="float">
            <text:p>1,665E-14</text:p>
          </table:table-cell>
          <table:table-cell table:style-name="ce17" office:value-type="float" office:value="-2.22E-016" calcext:value-type="float">
            <text:p>-2,220E-16</text:p>
          </table:table-cell>
          <table:table-cell table:style-name="ce26" office:value-type="float" office:value="-2.22044604925031E-016" calcext:value-type="float">
            <text:p>-2,220E-16</text:p>
          </table:table-cell>
          <table:table-cell table:style-name="ce50" table:formula="of:=[.L249]-[.K249]" office:value-type="float" office:value="-4.46049250310041E-020" calcext:value-type="float">
            <text:p>-4,460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54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0.00000000000001287859" calcext:value-type="float">
            <text:p>1,288E-14</text:p>
          </table:table-cell>
          <table:table-cell table:style-name="ce34" table:formula="of:=[.C250]-[.B250]" office:value-type="float" office:value="0.00000000000001298959" calcext:value-type="float">
            <text:p>1,299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0]-[.E250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221245" calcext:value-type="float">
            <text:p>1,221E-14</text:p>
          </table:table-cell>
          <table:table-cell table:style-name="ce45" table:formula="of:=[.I250]-[.H250]" office:value-type="float" office:value="0.00000000000001221245" calcext:value-type="float">
            <text:p>1,221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0]-[.K250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5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1.30697032279927E-015" calcext:value-type="float">
            <text:p>-1,307E-15</text:p>
          </table:table-cell>
          <table:table-cell table:style-name="ce34" table:formula="of:=[.C251]-[.B251]" office:value-type="float" office:value="-1.30697032279927E-015" calcext:value-type="float">
            <text:p>-1,307E-15</text:p>
          </table:table-cell>
          <table:table-cell table:style-name="ce17" office:value-type="float" office:value="-1.23E-015" calcext:value-type="float">
            <text:p>-1,230E-15</text:p>
          </table:table-cell>
          <table:table-cell table:style-name="ce26" office:value-type="float" office:value="-1.22528467762432E-015" calcext:value-type="float">
            <text:p>-1,225E-15</text:p>
          </table:table-cell>
          <table:table-cell table:style-name="ce39" table:formula="of:=[.F251]-[.E251]" office:value-type="float" office:value="4.71532237568012E-018" calcext:value-type="float">
            <text:p>4,715E-1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1]-[.H251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1]-[.K251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56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2131628" calcext:value-type="float">
            <text:p>-2,132E-14</text:p>
          </table:table-cell>
          <table:table-cell table:style-name="ce34" table:formula="of:=[.C252]-[.B252]" office:value-type="float" office:value="-0.00000000000002131628" calcext:value-type="float">
            <text:p>-2,132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2]-[.E252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3863576" calcext:value-type="float">
            <text:p>3,864E-14</text:p>
          </table:table-cell>
          <table:table-cell table:style-name="ce45" table:formula="of:=[.I252]-[.H252]" office:value-type="float" office:value="0.00000000000003863576" calcext:value-type="float">
            <text:p>3,864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2]-[.K252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5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18474111" calcext:value-type="float">
            <text:p>-1,847E-13</text:p>
          </table:table-cell>
          <table:table-cell table:style-name="ce34" table:formula="of:=[.C253]-[.B253]" office:value-type="float" office:value="-0.00000000000018474111" calcext:value-type="float">
            <text:p>-1,847E-13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3]-[.E25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2593481" calcext:value-type="float">
            <text:p>-2,593E-13</text:p>
          </table:table-cell>
          <table:table-cell table:style-name="ce45" table:formula="of:=[.I253]-[.H253]" office:value-type="float" office:value="-0.0000000000002593481" calcext:value-type="float">
            <text:p>-2,593E-13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3]-[.K253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5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3.44169137633799E-015" calcext:value-type="float">
            <text:p>-3,442E-15</text:p>
          </table:table-cell>
          <table:table-cell table:style-name="ce34" table:formula="of:=[.C254]-[.B254]" office:value-type="float" office:value="-3.44169137633799E-015" calcext:value-type="float">
            <text:p>-3,442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4]-[.E25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4]-[.H25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4]-[.K254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59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7.105427357601E-015" calcext:value-type="float">
            <text:p>-7,105E-15</text:p>
          </table:table-cell>
          <table:table-cell table:style-name="ce34" table:formula="of:=[.C255]-[.B255]" office:value-type="float" office:value="-7.105427357601E-015" calcext:value-type="float">
            <text:p>-7,105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5]-[.E25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5]-[.H25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5]-[.K255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6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010303" calcext:value-type="float">
            <text:p>1,010E-14</text:p>
          </table:table-cell>
          <table:table-cell table:style-name="ce34" table:formula="of:=[.C256]-[.B256]" office:value-type="float" office:value="0.00000000000001010303" calcext:value-type="float">
            <text:p>1,010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6]-[.E256]" office:value-type="float" office:value="0" calcext:value-type="float">
            <text:p>0,000E+00</text:p>
          </table:table-cell>
          <table:table-cell table:style-name="ce17" office:value-type="float" office:value="-1.11E-016" calcext:value-type="float">
            <text:p>-1,110E-16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6]-[.H256]" office:value-type="float" office:value="1.11E-016" calcext:value-type="float">
            <text:p>1,110E-16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6]-[.K256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61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0.00000000000005262457" calcext:value-type="float">
            <text:p>5,262E-14</text:p>
          </table:table-cell>
          <table:table-cell table:style-name="ce34" table:formula="of:=[.C257]-[.B257]" office:value-type="float" office:value="0.00000000000005218057" calcext:value-type="float">
            <text:p>5,218E-14</text:p>
          </table:table-cell>
          <table:table-cell table:style-name="ce17" office:value-type="float" office:value="-3.33E-016" calcext:value-type="float">
            <text:p>-3,330E-16</text:p>
          </table:table-cell>
          <table:table-cell table:style-name="ce26" office:value-type="float" office:value="-3.33066907387547E-016" calcext:value-type="float">
            <text:p>-3,331E-16</text:p>
          </table:table-cell>
          <table:table-cell table:style-name="ce39" table:formula="of:=[.F257]-[.E257]" office:value-type="float" office:value="-6.69073875470238E-020" calcext:value-type="float">
            <text:p>-6,691E-20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-0.00000000000002942091" calcext:value-type="float">
            <text:p>-2,942E-14</text:p>
          </table:table-cell>
          <table:table-cell table:style-name="ce45" table:formula="of:=[.I257]-[.H257]" office:value-type="float" office:value="-0.00000000000002986491" calcext:value-type="float">
            <text:p>-2,986E-14</text:p>
          </table:table-cell>
          <table:table-cell table:style-name="ce17" office:value-type="float" office:value="-3.33E-016" calcext:value-type="float">
            <text:p>-3,330E-16</text:p>
          </table:table-cell>
          <table:table-cell table:style-name="ce26" office:value-type="float" office:value="-3.33066907387547E-016" calcext:value-type="float">
            <text:p>-3,331E-16</text:p>
          </table:table-cell>
          <table:table-cell table:style-name="ce50" table:formula="of:=[.L257]-[.K257]" office:value-type="float" office:value="-6.69073875470238E-020" calcext:value-type="float">
            <text:p>-6,691E-2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62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1509903" calcext:value-type="float">
            <text:p>-1,510E-14</text:p>
          </table:table-cell>
          <table:table-cell table:style-name="ce34" table:formula="of:=[.C258]-[.B258]" office:value-type="float" office:value="-0.00000000000001509903" calcext:value-type="float">
            <text:p>-1,510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8]-[.E258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8]-[.H258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8]-[.K258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3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24345" calcext:value-type="float">
            <text:p>1,243E-14</text:p>
          </table:table-cell>
          <table:table-cell table:style-name="ce34" table:formula="of:=[.C259]-[.B259]" office:value-type="float" office:value="0.0000000000000124345" calcext:value-type="float">
            <text:p>1,243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59]-[.E259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59]-[.H259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59]-[.K259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1.41553435639707E-015" calcext:value-type="float">
            <text:p>1,416E-15</text:p>
          </table:table-cell>
          <table:table-cell table:style-name="ce34" table:formula="of:=[.C260]-[.B260]" office:value-type="float" office:value="1.41553435639707E-015" calcext:value-type="float">
            <text:p>1,416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60]-[.E260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60]-[.H260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0]-[.K260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5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-2.55351295663786E-015" calcext:value-type="float">
            <text:p>-2,554E-15</text:p>
          </table:table-cell>
          <table:table-cell table:style-name="ce34" table:formula="of:=[.C261]-[.B261]" office:value-type="float" office:value="-2.60901295663786E-015" calcext:value-type="float">
            <text:p>-2,609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61]-[.E261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1.77635683940025E-015" calcext:value-type="float">
            <text:p>1,776E-15</text:p>
          </table:table-cell>
          <table:table-cell table:style-name="ce45" table:formula="of:=[.I261]-[.H261]" office:value-type="float" office:value="1.77635683940025E-015" calcext:value-type="float">
            <text:p>1,776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1]-[.K261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6</text:p>
          </table:table-cell>
          <table:table-cell table:style-name="ce17" office:value-type="float" office:value="-4.44E-016" calcext:value-type="float">
            <text:p>-4,440E-16</text:p>
          </table:table-cell>
          <table:table-cell table:style-name="ce26" office:value-type="float" office:value="0.00000000000010580425" calcext:value-type="float">
            <text:p>1,058E-13</text:p>
          </table:table-cell>
          <table:table-cell table:style-name="ce34" table:formula="of:=[.C262]-[.B262]" office:value-type="float" office:value="0.00000000000010624825" calcext:value-type="float">
            <text:p>1,062E-13</text:p>
          </table:table-cell>
          <table:table-cell table:style-name="ce17" office:value-type="float" office:value="0.0000000000000231" calcext:value-type="float">
            <text:p>2,310E-14</text:p>
          </table:table-cell>
          <table:table-cell table:style-name="ce26" office:value-type="float" office:value="0.00000000000002309264" calcext:value-type="float">
            <text:p>2,309E-14</text:p>
          </table:table-cell>
          <table:table-cell table:style-name="ce39" table:formula="of:=[.F262]-[.E262]" office:value-type="float" office:value="-7.36108779670043E-018" calcext:value-type="float">
            <text:p>-7,361E-18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-3.10862446895044E-015" calcext:value-type="float">
            <text:p>-3,109E-15</text:p>
          </table:table-cell>
          <table:table-cell table:style-name="ce45" table:formula="of:=[.I262]-[.H262]" office:value-type="float" office:value="-3.55262446895044E-015" calcext:value-type="float">
            <text:p>-3,553E-15</text:p>
          </table:table-cell>
          <table:table-cell table:style-name="ce17" office:value-type="float" office:value="4.44E-016" calcext:value-type="float">
            <text:p>4,440E-16</text:p>
          </table:table-cell>
          <table:table-cell table:style-name="ce26" office:value-type="float" office:value="4.44089209850063E-016" calcext:value-type="float">
            <text:p>4,441E-16</text:p>
          </table:table-cell>
          <table:table-cell table:style-name="ce50" table:formula="of:=[.L262]-[.K262]" office:value-type="float" office:value="8.92098500629943E-020" calcext:value-type="float">
            <text:p>8,921E-2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.00000000000001376677" calcext:value-type="float">
            <text:p>1,377E-14</text:p>
          </table:table-cell>
          <table:table-cell table:style-name="ce34" table:formula="of:=[.C263]-[.B263]" office:value-type="float" office:value="0.00000000000001376677" calcext:value-type="float">
            <text:p>1,377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63]-[.E26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63]-[.H263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3]-[.K263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8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1731948" calcext:value-type="float">
            <text:p>-1,732E-14</text:p>
          </table:table-cell>
          <table:table-cell table:style-name="ce34" table:formula="of:=[.C264]-[.B264]" office:value-type="float" office:value="-0.00000000000001731948" calcext:value-type="float">
            <text:p>-1,732E-14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64]-[.E26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64]-[.H264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4]-[.K264]" office:value-type="float" office:value="0" calcext:value-type="float">
            <text:p>0,000E+0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69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3.99680288865056E-015" calcext:value-type="float">
            <text:p>3,997E-15</text:p>
          </table:table-cell>
          <table:table-cell table:style-name="ce34" table:formula="of:=[.C265]-[.B265]" office:value-type="float" office:value="3.99680288865056E-015" calcext:value-type="float">
            <text:p>3,997E-15</text:p>
          </table:table-cell>
          <table:table-cell table:style-name="ce17" office:value-type="float" office:value="6.66E-016" calcext:value-type="float">
            <text:p>6,660E-16</text:p>
          </table:table-cell>
          <table:table-cell table:style-name="ce26" office:value-type="float" office:value="6.66133814775094E-016" calcext:value-type="float">
            <text:p>6,661E-16</text:p>
          </table:table-cell>
          <table:table-cell table:style-name="ce39" table:formula="of:=[.F265]-[.E265]" office:value-type="float" office:value="1.33814775094048E-019" calcext:value-type="float">
            <text:p>1,338E-19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65]-[.H265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5]-[.K265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70</text:p>
          </table:table-cell>
          <table:table-cell table:style-name="ce17" office:value-type="float" office:value="-1.45E-018" calcext:value-type="float">
            <text:p>-1,450E-18</text:p>
          </table:table-cell>
          <table:table-cell table:style-name="ce26" office:value-type="float" office:value="0.00000000000001773094" calcext:value-type="float">
            <text:p>1,773E-14</text:p>
          </table:table-cell>
          <table:table-cell table:style-name="ce34" table:formula="of:=[.C266]-[.B266]" office:value-type="float" office:value="0.00000000000001773239" calcext:value-type="float">
            <text:p>1,773E-14</text:p>
          </table:table-cell>
          <table:table-cell table:style-name="ce17" office:value-type="float" office:value="-1.42E-018" calcext:value-type="float">
            <text:p>-1,420E-18</text:p>
          </table:table-cell>
          <table:table-cell table:style-name="ce26" office:value-type="float" office:value="-1.42301535138722E-018" calcext:value-type="float">
            <text:p>-1,423E-18</text:p>
          </table:table-cell>
          <table:table-cell table:style-name="ce39" table:formula="of:=[.F266]-[.E266]" office:value-type="float" office:value="-3.01535138721999E-021" calcext:value-type="float">
            <text:p>-3,015E-21</text:p>
          </table:table-cell>
          <table:table-cell table:style-name="ce17" office:value-type="float" office:value="-1.45E-018" calcext:value-type="float">
            <text:p>-1,450E-18</text:p>
          </table:table-cell>
          <table:table-cell table:style-name="ce26" office:value-type="float" office:value="0.0000000000000135619" calcext:value-type="float">
            <text:p>1,356E-14</text:p>
          </table:table-cell>
          <table:table-cell table:style-name="ce45" table:formula="of:=[.I266]-[.H266]" office:value-type="float" office:value="0.00000000000001356335" calcext:value-type="float">
            <text:p>1,356E-14</text:p>
          </table:table-cell>
          <table:table-cell table:style-name="ce17" office:value-type="float" office:value="-1.42E-018" calcext:value-type="float">
            <text:p>-1,420E-18</text:p>
          </table:table-cell>
          <table:table-cell table:style-name="ce26" office:value-type="float" office:value="-1.36202897918491E-018" calcext:value-type="float">
            <text:p>-1,362E-18</text:p>
          </table:table-cell>
          <table:table-cell table:style-name="ce50" table:formula="of:=[.L266]-[.K266]" office:value-type="float" office:value="5.797102081509E-020" calcext:value-type="float">
            <text:p>5,797E-20</text:p>
          </table:table-cell>
          <table:table-cell table:number-columns-repeated="4"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71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.00000000000001390473" calcext:value-type="float">
            <text:p>-1,390E-14</text:p>
          </table:table-cell>
          <table:table-cell table:style-name="ce34" table:formula="of:=[.C267]-[.B267]" office:value-type="float" office:value="-0.00000000000001390473" calcext:value-type="float">
            <text:p>-1,390E-14</text:p>
          </table:table-cell>
          <table:table-cell table:style-name="ce17" office:value-type="float" office:value="0.0000000000000107" calcext:value-type="float">
            <text:p>1,070E-14</text:p>
          </table:table-cell>
          <table:table-cell table:style-name="ce26" office:value-type="float" office:value="0.00000000000001067108" calcext:value-type="float">
            <text:p>1,067E-14</text:p>
          </table:table-cell>
          <table:table-cell table:style-name="ce39" table:formula="of:=[.F267]-[.E267]" office:value-type="float" office:value="-2.89243264184994E-017" calcext:value-type="float">
            <text:p>-2,892E-17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1.94019557701484E-015" calcext:value-type="float">
            <text:p>-1,940E-15</text:p>
          </table:table-cell>
          <table:table-cell table:style-name="ce45" table:formula="of:=[.I267]-[.H267]" office:value-type="float" office:value="-1.94019557701484E-015" calcext:value-type="float">
            <text:p>-1,940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67]-[.K267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72</text:p>
          </table:table-cell>
          <table:table-cell table:style-name="ce17" office:value-type="float" office:value="-3.41E-027" calcext:value-type="float">
            <text:p>-3,410E-27</text:p>
          </table:table-cell>
          <table:table-cell table:style-name="ce26" office:value-type="float" office:value="9.61140848539558E-026" calcext:value-type="float">
            <text:p>9,611E-26</text:p>
          </table:table-cell>
          <table:table-cell table:style-name="ce34" table:formula="of:=[.C268]-[.B268]" office:value-type="float" office:value="9.95240848539558E-026" calcext:value-type="float">
            <text:p>9,952E-26</text:p>
          </table:table-cell>
          <table:table-cell table:style-name="ce17" office:value-type="float" office:value="7.97E-027" calcext:value-type="float">
            <text:p>7,970E-27</text:p>
          </table:table-cell>
          <table:table-cell table:style-name="ce26" office:value-type="float" office:value="-0.00000000000133973231" calcext:value-type="float">
            <text:p>-1,340E-12</text:p>
          </table:table-cell>
          <table:table-cell table:style-name="ce39" table:formula="of:=[.F268]-[.E268]" office:value-type="float" office:value="-0.00000000000133973231" calcext:value-type="float">
            <text:p>-1,340E-12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1.3460884921315E-027" calcext:value-type="float">
            <text:p>1,346E-27</text:p>
          </table:table-cell>
          <table:table-cell table:style-name="ce45" table:formula="of:=[.I268]-[.H268]" office:value-type="float" office:value="1" calcext:value-type="float">
            <text:p>1,000E+00</text:p>
          </table:table-cell>
          <table:table-cell table:style-name="ce17" office:value-type="float" office:value="1.09E-027" calcext:value-type="float">
            <text:p>1,090E-27</text:p>
          </table:table-cell>
          <table:table-cell table:style-name="ce26" office:value-type="float" office:value="1.08623568828613E-027" calcext:value-type="float">
            <text:p>1,086E-27</text:p>
          </table:table-cell>
          <table:table-cell table:style-name="ce50" table:formula="of:=[.L268]-[.K268]" office:value-type="float" office:value="-3.76431171387005E-030" calcext:value-type="float">
            <text:p>-3,764E-3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73</text:p>
          </table:table-cell>
          <table:table-cell table:style-name="ce17" office:value-type="float" office:value="-3.41E-027" calcext:value-type="float">
            <text:p>-3,410E-27</text:p>
          </table:table-cell>
          <table:table-cell table:style-name="ce26" office:value-type="float" office:value="9.61141809680892E-026" calcext:value-type="float">
            <text:p>9,611E-26</text:p>
          </table:table-cell>
          <table:table-cell table:style-name="ce34" table:formula="of:=[.C269]-[.B269]" office:value-type="float" office:value="9.95241809680892E-026" calcext:value-type="float">
            <text:p>9,952E-26</text:p>
          </table:table-cell>
          <table:table-cell table:style-name="ce17" office:value-type="float" office:value="2.23E-028" calcext:value-type="float">
            <text:p>2,230E-28</text:p>
          </table:table-cell>
          <table:table-cell table:style-name="ce26" office:value-type="float" office:value="0.00000000000003974923" calcext:value-type="float">
            <text:p>3,975E-14</text:p>
          </table:table-cell>
          <table:table-cell table:style-name="ce39" table:formula="of:=[.F269]-[.E269]" office:value-type="float" office:value="0.00000000000003974923" calcext:value-type="float">
            <text:p>3,975E-14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1.34608983822067E-027" calcext:value-type="float">
            <text:p>1,346E-27</text:p>
          </table:table-cell>
          <table:table-cell table:style-name="ce45" table:formula="of:=[.I269]-[.H269]" office:value-type="float" office:value="1" calcext:value-type="float">
            <text:p>1,000E+00</text:p>
          </table:table-cell>
          <table:table-cell table:style-name="ce17" office:value-type="float" office:value="1.09E-027" calcext:value-type="float">
            <text:p>1,090E-27</text:p>
          </table:table-cell>
          <table:table-cell table:style-name="ce26" office:value-type="float" office:value="1.08623677452237E-027" calcext:value-type="float">
            <text:p>1,086E-27</text:p>
          </table:table-cell>
          <table:table-cell table:style-name="ce50" table:formula="of:=[.L269]-[.K269]" office:value-type="float" office:value="-3.76322547763012E-030" calcext:value-type="float">
            <text:p>-3,763E-3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74</text:p>
          </table:table-cell>
          <table:table-cell table:style-name="ce17" office:value-type="float" office:value="4.17E-045" calcext:value-type="float">
            <text:p>4,170E-45</text:p>
          </table:table-cell>
          <table:table-cell table:style-name="ce26" office:value-type="float" office:value="1.36002242435392E-044" calcext:value-type="float">
            <text:p>1,360E-44</text:p>
          </table:table-cell>
          <table:table-cell table:style-name="ce34" table:formula="of:=[.C270]-[.B270]" office:value-type="float" office:value="9.4302242435392E-045" calcext:value-type="float">
            <text:p>9,430E-45</text:p>
          </table:table-cell>
          <table:table-cell table:style-name="ce17" office:value-type="float" office:value="2.36E-045" calcext:value-type="float">
            <text:p>2,360E-45</text:p>
          </table:table-cell>
          <table:table-cell table:style-name="ce26" office:value-type="float" office:value="1.59222828006154E-031" calcext:value-type="float">
            <text:p>1,592E-31</text:p>
          </table:table-cell>
          <table:table-cell table:style-name="ce39" table:formula="of:=[.F270]-[.E270]" office:value-type="float" office:value="1.59222828006152E-031" calcext:value-type="float">
            <text:p>1,592E-31</text:p>
          </table:table-cell>
          <table:table-cell table:style-name="ce17" office:value-type="float" office:value="4.17E-045" calcext:value-type="float">
            <text:p>4,170E-45</text:p>
          </table:table-cell>
          <table:table-cell table:style-name="ce26" office:value-type="float" office:value="-1.8917529268385E-044" calcext:value-type="float">
            <text:p>-1,892E-44</text:p>
          </table:table-cell>
          <table:table-cell table:style-name="ce45" table:formula="of:=[.I270]-[.H270]" office:value-type="float" office:value="-2.3087529268385E-044" calcext:value-type="float">
            <text:p>-2,309E-44</text:p>
          </table:table-cell>
          <table:table-cell table:style-name="ce17" office:value-type="float" office:value="-1.58E-045" calcext:value-type="float">
            <text:p>-1,580E-45</text:p>
          </table:table-cell>
          <table:table-cell table:style-name="ce26" office:value-type="float" office:value="-1.58415833473048E-045" calcext:value-type="float">
            <text:p>-1,584E-45</text:p>
          </table:table-cell>
          <table:table-cell table:style-name="ce50" table:formula="of:=[.L270]-[.K270]" office:value-type="float" office:value="-4.15833473048015E-048" calcext:value-type="float">
            <text:p>-4,158E-48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7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34" table:formula="of:=[.C271]-[.B271]" office:value-type="float" office:value="-0" calcext:value-type="float">
            <text:p>-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39" table:formula="of:=[.F271]-[.E271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45" table:formula="of:=[.I271]-[.H271]" office:value-type="float" office:value="0" calcext:value-type="float">
            <text:p>0,000E+00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-0" calcext:value-type="float">
            <text:p>-0,000E+00</text:p>
          </table:table-cell>
          <table:table-cell table:style-name="ce50" table:formula="of:=[.L271]-[.K271]" office:value-type="float" office:value="-0" calcext:value-type="float">
            <text:p>-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76</text:p>
          </table:table-cell>
          <table:table-cell table:style-name="ce17" office:value-type="float" office:value="1.000001" calcext:value-type="float">
            <text:p>1,000E+00</text:p>
          </table:table-cell>
          <table:table-cell table:style-name="ce26" office:value-type="float" office:value="1.000001" calcext:value-type="float">
            <text:p>1,000E+00</text:p>
          </table:table-cell>
          <table:table-cell table:style-name="ce34" table:formula="of:=[.C272]-[.B272]" office:value-type="float" office:value="0" calcext:value-type="float">
            <text:p>0,000E+00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-1" calcext:value-type="float">
            <text:p>-1,000E+00</text:p>
          </table:table-cell>
          <table:table-cell table:style-name="ce39" table:formula="of:=[.F272]-[.E272]" office:value-type="float" office:value="0" calcext:value-type="float">
            <text:p>0,000E+00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1.000001" calcext:value-type="float">
            <text:p>1,000E+00</text:p>
          </table:table-cell>
          <table:table-cell table:style-name="ce45" table:formula="of:=[.I272]-[.H272]" office:value-type="float" office:value="2.000001" calcext:value-type="float">
            <text:p>2,000E+00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-1" calcext:value-type="float">
            <text:p>-1,000E+00</text:p>
          </table:table-cell>
          <table:table-cell table:style-name="ce50" table:formula="of:=[.L272]-[.K272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77</text:p>
          </table:table-cell>
          <table:table-cell table:style-name="ce17" office:value-type="float" office:value="-145277000000000" calcext:value-type="float">
            <text:p>-1,453E+14</text:p>
          </table:table-cell>
          <table:table-cell table:style-name="ce26" office:value-type="float" office:value="-12794317123211.6" calcext:value-type="float">
            <text:p>-1,279E+13</text:p>
          </table:table-cell>
          <table:table-cell table:style-name="ce34" table:formula="of:=[.C273]-[.B273]" office:value-type="float" office:value="132482682876788" calcext:value-type="float">
            <text:p>1,325E+14</text:p>
          </table:table-cell>
          <table:table-cell table:style-name="ce17" office:value-type="float" office:value="8918020000000" calcext:value-type="float">
            <text:p>8,918E+12</text:p>
          </table:table-cell>
          <table:table-cell table:style-name="ce26" office:value-type="float" office:value="8918019064099.99" calcext:value-type="float">
            <text:p>8,918E+12</text:p>
          </table:table-cell>
          <table:table-cell table:style-name="ce39" table:formula="of:=[.F273]-[.E273]" office:value-type="float" office:value="-935900.009765625" calcext:value-type="float">
            <text:p>-9,359E+05</text:p>
          </table:table-cell>
          <table:table-cell table:style-name="ce17" office:value-type="float" office:value="-796463000000" calcext:value-type="float">
            <text:p>-7,965E+11</text:p>
          </table:table-cell>
          <table:table-cell table:style-name="ce26" office:value-type="float" office:value="-12776169155661" calcext:value-type="float">
            <text:p>-1,278E+13</text:p>
          </table:table-cell>
          <table:table-cell table:style-name="ce45" table:formula="of:=[.I273]-[.H273]" office:value-type="float" office:value="-11979706155661" calcext:value-type="float">
            <text:p>-1,198E+13</text:p>
          </table:table-cell>
          <table:table-cell table:style-name="ce17" office:value-type="float" office:value="-281475000000000" calcext:value-type="float">
            <text:p>-2,815E+14</text:p>
          </table:table-cell>
          <table:table-cell table:style-name="ce26" office:value-type="float" office:value="-281474976710656" calcext:value-type="float">
            <text:p>-2,815E+14</text:p>
          </table:table-cell>
          <table:table-cell table:style-name="ce50" table:formula="of:=[.L273]-[.K273]" office:value-type="float" office:value="23289344" calcext:value-type="float">
            <text:p>2,329E+0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78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34" table:formula="of:=[.C274]-[.B274]" office:value-type="float" office:value="0" calcext:value-type="float">
            <text:p>0,000E+00</text:p>
          </table:table-cell>
          <table:table-cell table:style-name="ce17" office:value-type="float" office:value="-0.5" calcext:value-type="float">
            <text:p>-5,000E-01</text:p>
          </table:table-cell>
          <table:table-cell table:style-name="ce26" office:value-type="float" office:value="-0.5" calcext:value-type="float">
            <text:p>-5,000E-01</text:p>
          </table:table-cell>
          <table:table-cell table:style-name="ce39" table:formula="of:=[.F274]-[.E274]" office:value-type="float" office:value="0" calcext:value-type="float">
            <text:p>0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45" table:formula="of:=[.I274]-[.H274]" office:value-type="float" office:value="0" calcext:value-type="float">
            <text:p>0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50" table:formula="of:=[.L274]-[.K274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79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34" table:formula="of:=[.C275]-[.B275]" office:value-type="float" office:value="0" calcext:value-type="float">
            <text:p>0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39" table:formula="of:=[.F275]-[.E275]" office:value-type="float" office:value="0" calcext:value-type="float">
            <text:p>0,000E+00</text:p>
          </table:table-cell>
          <table:table-cell table:style-name="ce17" office:value-type="float" office:value="0.5" calcext:value-type="float">
            <text:p>5,000E-01</text:p>
          </table:table-cell>
          <table:table-cell table:style-name="ce26" office:value-type="float" office:value="0.5" calcext:value-type="float">
            <text:p>5,000E-01</text:p>
          </table:table-cell>
          <table:table-cell table:style-name="ce45" table:formula="of:=[.I275]-[.H275]" office:value-type="float" office:value="0" calcext:value-type="float">
            <text:p>0,000E+00</text:p>
          </table:table-cell>
          <table:table-cell table:style-name="ce17" office:value-type="float" office:value="-0.5" calcext:value-type="float">
            <text:p>-5,000E-01</text:p>
          </table:table-cell>
          <table:table-cell table:style-name="ce26" office:value-type="float" office:value="-0.5" calcext:value-type="float">
            <text:p>-5,000E-01</text:p>
          </table:table-cell>
          <table:table-cell table:style-name="ce50" table:formula="of:=[.L275]-[.K275]" office:value-type="float" office:value="0" calcext:value-type="float">
            <text:p>0,000E+0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80</text:p>
          </table:table-cell>
          <table:table-cell table:style-name="ce17" office:value-type="float" office:value="-0.000000000000426" calcext:value-type="float">
            <text:p>-4,260E-13</text:p>
          </table:table-cell>
          <table:table-cell table:style-name="ce26" office:value-type="float" office:value="0.00000000045138580634" calcext:value-type="float">
            <text:p>4,514E-10</text:p>
          </table:table-cell>
          <table:table-cell table:style-name="ce34" table:formula="of:=[.C276]-[.B276]" office:value-type="float" office:value="0.00000000045181180634" calcext:value-type="float">
            <text:p>4,518E-10</text:p>
          </table:table-cell>
          <table:table-cell table:style-name="ce17" office:value-type="float" office:value="-0.000000000103" calcext:value-type="float">
            <text:p>-1,030E-10</text:p>
          </table:table-cell>
          <table:table-cell table:style-name="ce26" office:value-type="float" office:value="0.00000000000036349309" calcext:value-type="float">
            <text:p>3,635E-13</text:p>
          </table:table-cell>
          <table:table-cell table:style-name="ce39" table:formula="of:=[.F276]-[.E276]" office:value-type="float" office:value="0.00000000010336349309" calcext:value-type="float">
            <text:p>1,034E-10</text:p>
          </table:table-cell>
          <table:table-cell table:style-name="ce17" office:value-type="float" office:value="-0.000000000000765" calcext:value-type="float">
            <text:p>-7,650E-13</text:p>
          </table:table-cell>
          <table:table-cell table:style-name="ce26" office:value-type="float" office:value="-0.0000000004287082642" calcext:value-type="float">
            <text:p>-4,287E-10</text:p>
          </table:table-cell>
          <table:table-cell table:style-name="ce45" table:formula="of:=[.I276]-[.H276]" office:value-type="float" office:value="-0.0000000004279432642" calcext:value-type="float">
            <text:p>-4,279E-10</text:p>
          </table:table-cell>
          <table:table-cell table:style-name="ce17" office:value-type="float" office:value="0.0000000000000443" calcext:value-type="float">
            <text:p>4,430E-14</text:p>
          </table:table-cell>
          <table:table-cell table:style-name="ce26" office:value-type="float" office:value="0.00000000000004432479" calcext:value-type="float">
            <text:p>4,432E-14</text:p>
          </table:table-cell>
          <table:table-cell table:style-name="ce50" table:formula="of:=[.L276]-[.K276]" office:value-type="float" office:value="2.47868964214011E-017" calcext:value-type="float">
            <text:p>2,479E-1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81</text:p>
          </table:table-cell>
          <table:table-cell table:style-name="ce17" office:value-type="float" office:value="1.99" calcext:value-type="float">
            <text:p>1,990E+00</text:p>
          </table:table-cell>
          <table:table-cell table:style-name="ce26" office:value-type="float" office:value="1.9994730524838" calcext:value-type="float">
            <text:p>1,999E+00</text:p>
          </table:table-cell>
          <table:table-cell table:style-name="ce34" table:formula="of:=[.C277]-[.B277]" office:value-type="float" office:value="0.00947305248380004" calcext:value-type="float">
            <text:p>9,473E-03</text:p>
          </table:table-cell>
          <table:table-cell table:style-name="ce17" office:value-type="float" office:value="0.373" calcext:value-type="float">
            <text:p>3,730E-01</text:p>
          </table:table-cell>
          <table:table-cell table:style-name="ce26" office:value-type="float" office:value="0.372521450420047" calcext:value-type="float">
            <text:p>3,725E-01</text:p>
          </table:table-cell>
          <table:table-cell table:style-name="ce39" table:formula="of:=[.F277]-[.E277]" office:value-type="float" office:value="-0.000478549579953025" calcext:value-type="float">
            <text:p>-4,785E-04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-1" calcext:value-type="float">
            <text:p>-1,000E+00</text:p>
          </table:table-cell>
          <table:table-cell table:style-name="ce45" table:formula="of:=[.I277]-[.H277]" office:value-type="float" office:value="0" calcext:value-type="float">
            <text:p>0,000E+00</text:p>
          </table:table-cell>
          <table:table-cell table:style-name="ce17" office:value-type="float" office:value="-1" calcext:value-type="float">
            <text:p>-1,000E+00</text:p>
          </table:table-cell>
          <table:table-cell table:style-name="ce26" office:value-type="float" office:value="-1" calcext:value-type="float">
            <text:p>-1,000E+00</text:p>
          </table:table-cell>
          <table:table-cell table:style-name="ce50" table:formula="of:=[.L277]-[.K277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2</text:p>
          </table:table-cell>
          <table:table-cell table:style-name="ce17" office:value-type="float" office:value="-5.69E-015" calcext:value-type="float">
            <text:p>-5,690E-15</text:p>
          </table:table-cell>
          <table:table-cell table:style-name="ce26" office:value-type="float" office:value="0.00000000000034958147" calcext:value-type="float">
            <text:p>3,496E-13</text:p>
          </table:table-cell>
          <table:table-cell table:style-name="ce34" table:formula="of:=[.C278]-[.B278]" office:value-type="float" office:value="0.00000000000035527147" calcext:value-type="float">
            <text:p>3,553E-13</text:p>
          </table:table-cell>
          <table:table-cell table:style-name="ce17" office:value-type="float" office:value="8.52E-015" calcext:value-type="float">
            <text:p>8,520E-15</text:p>
          </table:table-cell>
          <table:table-cell table:style-name="ce26" office:value-type="float" office:value="8.52096171399808E-015" calcext:value-type="float">
            <text:p>8,521E-15</text:p>
          </table:table-cell>
          <table:table-cell table:style-name="ce39" table:formula="of:=[.F278]-[.E278]" office:value-type="float" office:value="9.61713998079998E-019" calcext:value-type="float">
            <text:p>9,617E-19</text:p>
          </table:table-cell>
          <table:table-cell table:style-name="ce17" office:value-type="float" office:value="1.42E-015" calcext:value-type="float">
            <text:p>1,420E-15</text:p>
          </table:table-cell>
          <table:table-cell table:style-name="ce26" office:value-type="float" office:value="-0.0000000000010590695" calcext:value-type="float">
            <text:p>-1,059E-12</text:p>
          </table:table-cell>
          <table:table-cell table:style-name="ce45" table:formula="of:=[.I278]-[.H278]" office:value-type="float" office:value="-0.0000000000010604895" calcext:value-type="float">
            <text:p>-1,060E-12</text:p>
          </table:table-cell>
          <table:table-cell table:style-name="ce17" office:value-type="float" office:value="-3.61E-016" calcext:value-type="float">
            <text:p>-3,610E-16</text:p>
          </table:table-cell>
          <table:table-cell table:style-name="ce26" office:value-type="float" office:value="-3.60822483003176E-016" calcext:value-type="float">
            <text:p>-3,608E-16</text:p>
          </table:table-cell>
          <table:table-cell table:style-name="ce50" table:formula="of:=[.L278]-[.K278]" office:value-type="float" office:value="1.77516996823975E-019" calcext:value-type="float">
            <text:p>1,775E-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83</text:p>
          </table:table-cell>
          <table:table-cell table:style-name="ce17" office:value-type="float" office:value="2.7E-038" calcext:value-type="float">
            <text:p>2,700E-38</text:p>
          </table:table-cell>
          <table:table-cell table:style-name="ce26" office:value-type="float" office:value="4.27213758661066E-038" calcext:value-type="float">
            <text:p>4,272E-38</text:p>
          </table:table-cell>
          <table:table-cell table:style-name="ce34" table:formula="of:=[.C279]-[.B279]" office:value-type="float" office:value="1.57213758661066E-038" calcext:value-type="float">
            <text:p>1,572E-38</text:p>
          </table:table-cell>
          <table:table-cell table:style-name="ce17" office:value-type="float" office:value="2.46E-037" calcext:value-type="float">
            <text:p>2,460E-37</text:p>
          </table:table-cell>
          <table:table-cell table:style-name="ce26" office:value-type="float" office:value="1.40203938399493E-029" calcext:value-type="float">
            <text:p>1,402E-29</text:p>
          </table:table-cell>
          <table:table-cell table:style-name="ce39" table:formula="of:=[.F279]-[.E279]" office:value-type="float" office:value="1.40203935939493E-029" calcext:value-type="float">
            <text:p>1,402E-29</text:p>
          </table:table-cell>
          <table:table-cell table:style-name="ce17" office:value-type="float" office:value="-1.81E-039" calcext:value-type="float">
            <text:p>-1,810E-39</text:p>
          </table:table-cell>
          <table:table-cell table:style-name="ce26" office:value-type="float" office:value="7.22873966044239E-038" calcext:value-type="float">
            <text:p>7,229E-38</text:p>
          </table:table-cell>
          <table:table-cell table:style-name="ce45" table:formula="of:=[.I279]-[.H279]" office:value-type="float" office:value="7.40973966044239E-038" calcext:value-type="float">
            <text:p>7,410E-38</text:p>
          </table:table-cell>
          <table:table-cell table:style-name="ce17" office:value-type="float" office:value="-4.99E-038" calcext:value-type="float">
            <text:p>-4,990E-38</text:p>
          </table:table-cell>
          <table:table-cell table:style-name="ce26" office:value-type="float" office:value="-4.98631304743153E-038" calcext:value-type="float">
            <text:p>-4,986E-38</text:p>
          </table:table-cell>
          <table:table-cell table:style-name="ce50" table:formula="of:=[.L279]-[.K279]" office:value-type="float" office:value="3.68695256847032E-041" calcext:value-type="float">
            <text:p>3,687E-41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4</text:p>
          </table:table-cell>
          <table:table-cell table:style-name="ce17" office:value-type="float" office:value="0.0000000000000137" calcext:value-type="float">
            <text:p>1,370E-14</text:p>
          </table:table-cell>
          <table:table-cell table:style-name="ce26" office:value-type="float" office:value="0.00000000000022871288" calcext:value-type="float">
            <text:p>2,287E-13</text:p>
          </table:table-cell>
          <table:table-cell table:style-name="ce34" table:formula="of:=[.C280]-[.B280]" office:value-type="float" office:value="0.00000000000021501288" calcext:value-type="float">
            <text:p>2,150E-13</text:p>
          </table:table-cell>
          <table:table-cell table:style-name="ce17" office:value-type="float" office:value="-0.0000000000000112" calcext:value-type="float">
            <text:p>-1,120E-14</text:p>
          </table:table-cell>
          <table:table-cell table:style-name="ce26" office:value-type="float" office:value="-0.00000000000001119937" calcext:value-type="float">
            <text:p>-1,120E-14</text:p>
          </table:table-cell>
          <table:table-cell table:style-name="ce39" table:formula="of:=[.F280]-[.E280]" office:value-type="float" office:value="6.25239093700821E-019" calcext:value-type="float">
            <text:p>6,252E-19</text:p>
          </table:table-cell>
          <table:table-cell table:style-name="ce17" office:value-type="float" office:value="-7.79E-015" calcext:value-type="float">
            <text:p>-7,790E-15</text:p>
          </table:table-cell>
          <table:table-cell table:style-name="ce26" office:value-type="float" office:value="-7.79237785408782E-015" calcext:value-type="float">
            <text:p>-7,792E-15</text:p>
          </table:table-cell>
          <table:table-cell table:style-name="ce45" table:formula="of:=[.I280]-[.H280]" office:value-type="float" office:value="-2.37785408781986E-018" calcext:value-type="float">
            <text:p>-2,378E-18</text:p>
          </table:table-cell>
          <table:table-cell table:style-name="ce17" office:value-type="float" office:value="-5.55E-016" calcext:value-type="float">
            <text:p>-5,550E-16</text:p>
          </table:table-cell>
          <table:table-cell table:style-name="ce26" office:value-type="float" office:value="-5.55111512312578E-016" calcext:value-type="float">
            <text:p>-5,551E-16</text:p>
          </table:table-cell>
          <table:table-cell table:style-name="ce50" table:formula="of:=[.L280]-[.K280]" office:value-type="float" office:value="-1.11512312577929E-019" calcext:value-type="float">
            <text:p>-1,115E-1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5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-0.00000000000001160183" calcext:value-type="float">
            <text:p>-1,160E-14</text:p>
          </table:table-cell>
          <table:table-cell table:style-name="ce34" table:formula="of:=[.C281]-[.B281]" office:value-type="float" office:value="-0.00000000000001165733" calcext:value-type="float">
            <text:p>-1,166E-14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5.55111512312578E-017" calcext:value-type="float">
            <text:p>5,551E-17</text:p>
          </table:table-cell>
          <table:table-cell table:style-name="ce39" table:formula="of:=[.F281]-[.E281]" office:value-type="float" office:value="1.11512312578003E-020" calcext:value-type="float">
            <text:p>1,115E-20</text:p>
          </table:table-cell>
          <table:table-cell table:style-name="ce17" office:value-type="float" office:value="5.55E-017" calcext:value-type="float">
            <text:p>5,550E-17</text:p>
          </table:table-cell>
          <table:table-cell table:style-name="ce26" office:value-type="float" office:value="5.55111512312578E-017" calcext:value-type="float">
            <text:p>5,551E-17</text:p>
          </table:table-cell>
          <table:table-cell table:style-name="ce45" table:formula="of:=[.I281]-[.H281]" office:value-type="float" office:value="1.11512312578003E-020" calcext:value-type="float">
            <text:p>1,115E-20</text:p>
          </table:table-cell>
          <table:table-cell table:style-name="ce17" office:value-type="float" office:value="-3.89E-016" calcext:value-type="float">
            <text:p>-3,890E-16</text:p>
          </table:table-cell>
          <table:table-cell table:style-name="ce26" office:value-type="float" office:value="-3.88578058618805E-016" calcext:value-type="float">
            <text:p>-3,886E-16</text:p>
          </table:table-cell>
          <table:table-cell table:style-name="ce50" table:formula="of:=[.L281]-[.K281]" office:value-type="float" office:value="4.21941381195024E-019" calcext:value-type="float">
            <text:p>4,219E-1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6</text:p>
          </table:table-cell>
          <table:table-cell table:style-name="ce17" office:value-type="float" office:value="-2.6E-018" calcext:value-type="float">
            <text:p>-2,600E-18</text:p>
          </table:table-cell>
          <table:table-cell table:style-name="ce26" office:value-type="float" office:value="-2.59341159658533E-016" calcext:value-type="float">
            <text:p>-2,593E-16</text:p>
          </table:table-cell>
          <table:table-cell table:style-name="ce34" table:formula="of:=[.C282]-[.B282]" office:value-type="float" office:value="-2.56741159658533E-016" calcext:value-type="float">
            <text:p>-2,567E-16</text:p>
          </table:table-cell>
          <table:table-cell table:style-name="ce17" office:value-type="float" office:value="1.82E-017" calcext:value-type="float">
            <text:p>1,820E-17</text:p>
          </table:table-cell>
          <table:table-cell table:style-name="ce26" office:value-type="float" office:value="-2.60208521396521E-018" calcext:value-type="float">
            <text:p>-2,602E-18</text:p>
          </table:table-cell>
          <table:table-cell table:style-name="ce39" table:formula="of:=[.F282]-[.E282]" office:value-type="float" office:value="-2.08020852139652E-017" calcext:value-type="float">
            <text:p>-2,080E-17</text:p>
          </table:table-cell>
          <table:table-cell table:style-name="ce17" office:value-type="float" office:value="1.01E-016" calcext:value-type="float">
            <text:p>1,010E-16</text:p>
          </table:table-cell>
          <table:table-cell table:style-name="ce26" office:value-type="float" office:value="8.76035355368288E-017" calcext:value-type="float">
            <text:p>8,760E-17</text:p>
          </table:table-cell>
          <table:table-cell table:style-name="ce45" table:formula="of:=[.I282]-[.H282]" office:value-type="float" office:value="-1.33964644631712E-017" calcext:value-type="float">
            <text:p>-1,340E-17</text:p>
          </table:table-cell>
          <table:table-cell table:style-name="ce17" office:value-type="float" office:value="5.29E-017" calcext:value-type="float">
            <text:p>5,290E-17</text:p>
          </table:table-cell>
          <table:table-cell table:style-name="ce26" office:value-type="float" office:value="5.29090660172926E-017" calcext:value-type="float">
            <text:p>5,291E-17</text:p>
          </table:table-cell>
          <table:table-cell table:style-name="ce50" table:formula="of:=[.L282]-[.K282]" office:value-type="float" office:value="9.06601729259742E-021" calcext:value-type="float">
            <text:p>9,066E-21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7</text:p>
          </table:table-cell>
          <table:table-cell table:style-name="ce17" office:value-type="float" office:value="7.08E-016" calcext:value-type="float">
            <text:p>7,080E-16</text:p>
          </table:table-cell>
          <table:table-cell table:style-name="ce26" office:value-type="float" office:value="0.00000000000003134992" calcext:value-type="float">
            <text:p>3,135E-14</text:p>
          </table:table-cell>
          <table:table-cell table:style-name="ce34" table:formula="of:=[.C283]-[.B283]" office:value-type="float" office:value="0.00000000000003064192" calcext:value-type="float">
            <text:p>3,064E-14</text:p>
          </table:table-cell>
          <table:table-cell table:style-name="ce17" office:value-type="float" office:value="2.64E-016" calcext:value-type="float">
            <text:p>2,640E-16</text:p>
          </table:table-cell>
          <table:table-cell table:style-name="ce26" office:value-type="float" office:value="2.63677968348475E-016" calcext:value-type="float">
            <text:p>2,637E-16</text:p>
          </table:table-cell>
          <table:table-cell table:style-name="ce39" table:formula="of:=[.F283]-[.E283]" office:value-type="float" office:value="-3.22031651524977E-019" calcext:value-type="float">
            <text:p>-3,220E-19</text:p>
          </table:table-cell>
          <table:table-cell table:style-name="ce17" office:value-type="float" office:value="7.08E-016" calcext:value-type="float">
            <text:p>7,080E-16</text:p>
          </table:table-cell>
          <table:table-cell table:style-name="ce26" office:value-type="float" office:value="0.00000000000004156397" calcext:value-type="float">
            <text:p>4,156E-14</text:p>
          </table:table-cell>
          <table:table-cell table:style-name="ce45" table:formula="of:=[.I283]-[.H283]" office:value-type="float" office:value="0.00000000000004085597" calcext:value-type="float">
            <text:p>4,086E-14</text:p>
          </table:table-cell>
          <table:table-cell table:style-name="ce17" office:value-type="float" office:value="2.64E-016" calcext:value-type="float">
            <text:p>2,640E-16</text:p>
          </table:table-cell>
          <table:table-cell table:style-name="ce26" office:value-type="float" office:value="2.63677968348475E-016" calcext:value-type="float">
            <text:p>2,637E-16</text:p>
          </table:table-cell>
          <table:table-cell table:style-name="ce50" table:formula="of:=[.L283]-[.K283]" office:value-type="float" office:value="-3.22031651524977E-019" calcext:value-type="float">
            <text:p>-3,220E-1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8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-0.00000000000002615963" calcext:value-type="float">
            <text:p>-2,616E-14</text:p>
          </table:table-cell>
          <table:table-cell table:style-name="ce34" table:formula="of:=[.C284]-[.B284]" office:value-type="float" office:value="-0.00000000000002620123" calcext:value-type="float">
            <text:p>-2,620E-14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4.16333634234434E-017" calcext:value-type="float">
            <text:p>4,163E-17</text:p>
          </table:table-cell>
          <table:table-cell table:style-name="ce39" table:formula="of:=[.F284]-[.E284]" office:value-type="float" office:value="3.33634234434006E-020" calcext:value-type="float">
            <text:p>3,336E-20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4.16333634234434E-017" calcext:value-type="float">
            <text:p>4,163E-17</text:p>
          </table:table-cell>
          <table:table-cell table:style-name="ce45" table:formula="of:=[.I284]-[.H284]" office:value-type="float" office:value="3.33634234434006E-020" calcext:value-type="float">
            <text:p>3,336E-20</text:p>
          </table:table-cell>
          <table:table-cell table:style-name="ce17" office:value-type="float" office:value="4.16E-017" calcext:value-type="float">
            <text:p>4,160E-17</text:p>
          </table:table-cell>
          <table:table-cell table:style-name="ce26" office:value-type="float" office:value="4.16333634234434E-017" calcext:value-type="float">
            <text:p>4,163E-17</text:p>
          </table:table-cell>
          <table:table-cell table:style-name="ce50" table:formula="of:=[.L284]-[.K284]" office:value-type="float" office:value="3.33634234434006E-020" calcext:value-type="float">
            <text:p>3,336E-2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89</text:p>
          </table:table-cell>
          <table:table-cell table:style-name="ce17" office:value-type="float" office:value="-2.5E-016" calcext:value-type="float">
            <text:p>-2,500E-16</text:p>
          </table:table-cell>
          <table:table-cell table:style-name="ce26" office:value-type="float" office:value="0.0000000000002344791" calcext:value-type="float">
            <text:p>2,345E-13</text:p>
          </table:table-cell>
          <table:table-cell table:style-name="ce34" table:formula="of:=[.C285]-[.B285]" office:value-type="float" office:value="0.0000000000002347291" calcext:value-type="float">
            <text:p>2,347E-13</text:p>
          </table:table-cell>
          <table:table-cell table:style-name="ce17" office:value-type="float" office:value="1.8E-015" calcext:value-type="float">
            <text:p>1,800E-15</text:p>
          </table:table-cell>
          <table:table-cell table:style-name="ce26" office:value-type="float" office:value="1.80411241501588E-015" calcext:value-type="float">
            <text:p>1,804E-15</text:p>
          </table:table-cell>
          <table:table-cell table:style-name="ce39" table:formula="of:=[.F285]-[.E285]" office:value-type="float" office:value="4.11241501588011E-018" calcext:value-type="float">
            <text:p>4,112E-18</text:p>
          </table:table-cell>
          <table:table-cell table:style-name="ce17" office:value-type="float" office:value="1.8E-015" calcext:value-type="float">
            <text:p>1,800E-15</text:p>
          </table:table-cell>
          <table:table-cell table:style-name="ce26" office:value-type="float" office:value="-0.00000000000001074141" calcext:value-type="float">
            <text:p>-1,074E-14</text:p>
          </table:table-cell>
          <table:table-cell table:style-name="ce45" table:formula="of:=[.I285]-[.H285]" office:value-type="float" office:value="-0.00000000000001254141" calcext:value-type="float">
            <text:p>-1,254E-14</text:p>
          </table:table-cell>
          <table:table-cell table:style-name="ce17" office:value-type="float" office:value="-2.61E-015" calcext:value-type="float">
            <text:p>-2,610E-15</text:p>
          </table:table-cell>
          <table:table-cell table:style-name="ce26" office:value-type="float" office:value="-2.60902410786912E-015" calcext:value-type="float">
            <text:p>-2,609E-15</text:p>
          </table:table-cell>
          <table:table-cell table:style-name="ce50" table:formula="of:=[.L285]-[.K285]" office:value-type="float" office:value="9.7589213087997E-019" calcext:value-type="float">
            <text:p>9,759E-1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90</text:p>
          </table:table-cell>
          <table:table-cell table:style-name="ce17" office:value-type="float" office:value="3.47E-018" calcext:value-type="float">
            <text:p>3,470E-18</text:p>
          </table:table-cell>
          <table:table-cell table:style-name="ce26" office:value-type="float" office:value="-4.51721993144361E-015" calcext:value-type="float">
            <text:p>-4,517E-15</text:p>
          </table:table-cell>
          <table:table-cell table:style-name="ce34" table:formula="of:=[.C286]-[.B286]" office:value-type="float" office:value="-4.52068993144361E-015" calcext:value-type="float">
            <text:p>-4,521E-15</text:p>
          </table:table-cell>
          <table:table-cell table:style-name="ce17" office:value-type="float" office:value="-3.12E-016" calcext:value-type="float">
            <text:p>-3,120E-16</text:p>
          </table:table-cell>
          <table:table-cell table:style-name="ce26" office:value-type="float" office:value="-9.0205620750794E-017" calcext:value-type="float">
            <text:p>-9,021E-17</text:p>
          </table:table-cell>
          <table:table-cell table:style-name="ce39" table:formula="of:=[.F286]-[.E286]" office:value-type="float" office:value="2.21794379249206E-016" calcext:value-type="float">
            <text:p>2,218E-16</text:p>
          </table:table-cell>
          <table:table-cell table:style-name="ce17" office:value-type="float" office:value="-3.47E-018" calcext:value-type="float">
            <text:p>-3,470E-18</text:p>
          </table:table-cell>
          <table:table-cell table:style-name="ce26" office:value-type="float" office:value="-4.26741975090295E-015" calcext:value-type="float">
            <text:p>-4,267E-15</text:p>
          </table:table-cell>
          <table:table-cell table:style-name="ce45" table:formula="of:=[.I286]-[.H286]" office:value-type="float" office:value="-4.26394975090295E-015" calcext:value-type="float">
            <text:p>-4,264E-15</text:p>
          </table:table-cell>
          <table:table-cell table:style-name="ce17" office:value-type="float" office:value="0" calcext:value-type="float">
            <text:p>0,000E+00</text:p>
          </table:table-cell>
          <table:table-cell table:style-name="ce26" office:value-type="float" office:value="0" calcext:value-type="float">
            <text:p>0,000E+00</text:p>
          </table:table-cell>
          <table:table-cell table:style-name="ce50" table:formula="of:=[.L286]-[.K286]" office:value-type="float" office:value="0" calcext:value-type="float">
            <text:p>0,000E+00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0" office:value-type="string" calcext:value-type="string">
            <text:p>f91</text:p>
          </table:table-cell>
          <table:table-cell table:style-name="ce17" office:value-type="float" office:value="8.67E-018" calcext:value-type="float">
            <text:p>8,670E-18</text:p>
          </table:table-cell>
          <table:table-cell table:style-name="ce26" office:value-type="float" office:value="-9.90527104782757E-016" calcext:value-type="float">
            <text:p>-9,905E-16</text:p>
          </table:table-cell>
          <table:table-cell table:style-name="ce34" table:formula="of:=[.C287]-[.B287]" office:value-type="float" office:value="-9.99197104782757E-016" calcext:value-type="float">
            <text:p>-9,992E-16</text:p>
          </table:table-cell>
          <table:table-cell table:style-name="ce17" office:value-type="float" office:value="1.61E-016" calcext:value-type="float">
            <text:p>1,610E-16</text:p>
          </table:table-cell>
          <table:table-cell table:style-name="ce26" office:value-type="float" office:value="1.61329283265843E-016" calcext:value-type="float">
            <text:p>1,613E-16</text:p>
          </table:table-cell>
          <table:table-cell table:style-name="ce39" table:formula="of:=[.F287]-[.E287]" office:value-type="float" office:value="3.29283265843007E-019" calcext:value-type="float">
            <text:p>3,293E-19</text:p>
          </table:table-cell>
          <table:table-cell table:style-name="ce17" office:value-type="float" office:value="-4.68E-017" calcext:value-type="float">
            <text:p>-4,680E-17</text:p>
          </table:table-cell>
          <table:table-cell table:style-name="ce26" office:value-type="float" office:value="-0.00000000000002370847" calcext:value-type="float">
            <text:p>-2,371E-14</text:p>
          </table:table-cell>
          <table:table-cell table:style-name="ce45" table:formula="of:=[.I287]-[.H287]" office:value-type="float" office:value="-0.00000000000002366167" calcext:value-type="float">
            <text:p>-2,366E-14</text:p>
          </table:table-cell>
          <table:table-cell table:style-name="ce17" office:value-type="float" office:value="6.42E-017" calcext:value-type="float">
            <text:p>6,420E-17</text:p>
          </table:table-cell>
          <table:table-cell table:style-name="ce26" office:value-type="float" office:value="6.41847686111419E-017" calcext:value-type="float">
            <text:p>6,418E-17</text:p>
          </table:table-cell>
          <table:table-cell table:style-name="ce50" table:formula="of:=[.L287]-[.K287]" office:value-type="float" office:value="-1.5231388858101E-020" calcext:value-type="float">
            <text:p>-1,523E-20</text:p>
          </table:table-cell>
          <table:table-cell table:number-columns-repeated="2"/>
          <table:table-cell table:style-name="ce52"/>
          <table:table-cell table:number-columns-repeated="1008"/>
        </table:table-row>
        <table:table-row table:style-name="ro1">
          <table:table-cell table:style-name="ce11" office:value-type="string" calcext:value-type="string">
            <text:p>f92</text:p>
          </table:table-cell>
          <table:table-cell table:style-name="ce18" office:value-type="float" office:value="2.17E-019" calcext:value-type="float">
            <text:p>2,170E-19</text:p>
          </table:table-cell>
          <table:table-cell table:style-name="ce27" office:value-type="float" office:value="2.02528965820292E-016" calcext:value-type="float">
            <text:p>2,025E-16</text:p>
          </table:table-cell>
          <table:table-cell table:style-name="ce35" table:formula="of:=[.C288]-[.B288]" office:value-type="float" office:value="2.02311965820292E-016" calcext:value-type="float">
            <text:p>2,023E-16</text:p>
          </table:table-cell>
          <table:table-cell table:style-name="ce18" office:value-type="float" office:value="2.17E-019" calcext:value-type="float">
            <text:p>2,170E-19</text:p>
          </table:table-cell>
          <table:table-cell table:style-name="ce27" office:value-type="float" office:value="2.16840434497101E-019" calcext:value-type="float">
            <text:p>2,168E-19</text:p>
          </table:table-cell>
          <table:table-cell table:style-name="ce40" table:formula="of:=[.F288]-[.E288]" office:value-type="float" office:value="-1.59565502898999E-022" calcext:value-type="float">
            <text:p>-1,596E-22</text:p>
          </table:table-cell>
          <table:table-cell table:style-name="ce18" office:value-type="float" office:value="2.17E-019" calcext:value-type="float">
            <text:p>2,170E-19</text:p>
          </table:table-cell>
          <table:table-cell table:style-name="ce27" office:value-type="float" office:value="1.27068494615301E-016" calcext:value-type="float">
            <text:p>1,271E-16</text:p>
          </table:table-cell>
          <table:table-cell table:style-name="ce46" table:formula="of:=[.I288]-[.H288]" office:value-type="float" office:value="1.26851494615301E-016" calcext:value-type="float">
            <text:p>1,269E-16</text:p>
          </table:table-cell>
          <table:table-cell table:style-name="ce18" office:value-type="float" office:value="2.17E-019" calcext:value-type="float">
            <text:p>2,170E-19</text:p>
          </table:table-cell>
          <table:table-cell table:style-name="ce27" office:value-type="float" office:value="-2.16840434497101E-019" calcext:value-type="float">
            <text:p>-2,168E-19</text:p>
          </table:table-cell>
          <table:table-cell table:style-name="ce51" table:formula="of:=[.L288]-[.K288]" office:value-type="float" office:value="-4.33840434497101E-019" calcext:value-type="float">
            <text:p>-4,338E-19</text:p>
          </table:table-cell>
          <table:table-cell table:number-columns-repeated="2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>
          <table:table-cell table:number-columns-repeated="15"/>
          <table:table-cell table:style-name="ce52"/>
          <table:table-cell/>
          <table:table-cell table:style-name="ce52"/>
          <table:table-cell table:number-columns-repeated="1006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D197:Лист1.D288 Лист1.D101:Лист1.D192 Лист1.G101:Лист1.G192 Лист1.J101:Лист1.J192 Лист1.M101:Лист1.M192">
            <calcext:condition calcext:apply-style-name="Bad" calcext:value="&gt;0.0000000000001" calcext:base-cell-address="Лист1.D197"/>
          </calcext:conditional-format>
          <calcext:conditional-format calcext:target-range-address="Лист1.G197:Лист1.G288">
            <calcext:condition calcext:apply-style-name="Bad" calcext:value="&gt;0.0000000000001" calcext:base-cell-address="Лист1.G197"/>
          </calcext:conditional-format>
          <calcext:conditional-format calcext:target-range-address="Лист1.J197:Лист1.J288">
            <calcext:condition calcext:apply-style-name="Bad" calcext:value="&gt;0.0000000000001" calcext:base-cell-address="Лист1.J197"/>
          </calcext:conditional-format>
          <calcext:conditional-format calcext:target-range-address="Лист1.M197:Лист1.M288">
            <calcext:condition calcext:apply-style-name="Bad" calcext:value="&gt;0.0000000000001" calcext:base-cell-address="Лист1.M197"/>
          </calcext:conditional-format>
          <calcext:conditional-format calcext:target-range-address="Лист1.M4:Лист1.M95">
            <calcext:color-scale>
              <calcext:color-scale-entry calcext:value="0" calcext:type="minimum" calcext:color="#b4c7dc"/>
              <calcext:color-scale-entry calcext:value="0" calcext:type="number" calcext:color="#ffffff"/>
              <calcext:color-scale-entry calcext:value="0" calcext:type="maximum" calcext:color="#ffd7d7"/>
            </calcext:color-scale>
          </calcext:conditional-format>
          <calcext:conditional-format calcext:target-range-address="Лист1.J4:Лист1.J95">
            <calcext:color-scale>
              <calcext:color-scale-entry calcext:value="0" calcext:type="minimum" calcext:color="#dee6ef"/>
              <calcext:color-scale-entry calcext:value="0" calcext:type="number" calcext:color="#ffffff"/>
              <calcext:color-scale-entry calcext:value="10" calcext:type="number" calcext:color="#ffd7d7"/>
            </calcext:color-scale>
          </calcext:conditional-format>
          <calcext:conditional-format calcext:target-range-address="Лист1.G4:Лист1.G95">
            <calcext:color-scale>
              <calcext:color-scale-entry calcext:value="0" calcext:type="minimum" calcext:color="#b4c7dc"/>
              <calcext:color-scale-entry calcext:value="0" calcext:type="number" calcext:color="#fffff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ef" svg:font-family="Alef" style:font-pitch="variable"/>
    <style:font-face style:name="Arial Nova" svg:font-family="'Arial Nova'" style:font-family-generic="swiss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ascadia Mono" svg:font-family="'Cascadia Mono'" style:font-family-generic="modern" style:font-pitch="fixed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5T02:00:00.695000000</meta:creation-date>
    <dc:date>2026-06-05T02:57:29.533000000</dc:date>
    <meta:editing-duration>PT25M58S</meta:editing-duration>
    <meta:editing-cycles>4</meta:editing-cycles>
    <meta:generator>LibreOffice/7.3.2.2$Windows_X86_64 LibreOffice_project/49f2b1bff42cfccbd8f788c8dc32c1c309559be0</meta:generator>
    <meta:document-statistic meta:table-count="1" meta:cell-count="3658" meta:object-count="0"/>
  </office:meta>
</office:document-meta>
</file>